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000000228B3D2C896.png" manifest:media-type="image/png"/>
  <manifest:file-entry manifest:full-path="Pictures/10000000000008A2000006F319D8BFCF.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face style:name="Tahoma" svg:font-family="Tahoma"/>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automatic-styles>
    <style:style style:name="Таблица10" style:family="table">
      <style:table-properties style:width="6.6924in" table:align="margins"/>
    </style:style>
    <style:style style:name="Таблица10.A" style:family="table-column">
      <style:table-column-properties style:column-width="1.3021in" style:rel-column-width="12750*"/>
    </style:style>
    <style:style style:name="Таблица10.B" style:family="table-column">
      <style:table-column-properties style:column-width="5.3903in" style:rel-column-width="52785*"/>
    </style:style>
    <style:style style:name="Таблица10.A1" style:family="table-cell">
      <style:table-cell-properties fo:padding="0.0382in" fo:border-left="0.05pt solid #000000" fo:border-right="none" fo:border-top="0.05pt solid #000000" fo:border-bottom="0.05pt solid #000000"/>
    </style:style>
    <style:style style:name="Таблица10.B1" style:family="table-cell">
      <style:table-cell-properties fo:padding="0.0382in" fo:border="0.05pt solid #000000"/>
    </style:style>
    <style:style style:name="Таблица10.A2" style:family="table-cell" style:data-style-name="N0">
      <style:table-cell-properties fo:padding="0.0382in" fo:border-left="0.05pt solid #000000" fo:border-right="none" fo:border-top="none" fo:border-bottom="0.05pt solid #000000"/>
    </style:style>
    <style:style style:name="Таблица10.B2" style:family="table-cell">
      <style:table-cell-properties fo:padding="0.0382in" fo:border-left="0.05pt solid #000000" fo:border-right="0.05pt solid #000000" fo:border-top="none" fo:border-bottom="0.05pt solid #000000"/>
    </style:style>
    <style:style style:name="Таблица10.B3" style:family="table-cell">
      <style:table-cell-properties fo:padding="0.0382in" fo:border-left="0.05pt solid #000000" fo:border-right="0.05pt solid #000000" fo:border-top="none" fo:border-bottom="0.05pt solid #000000"/>
    </style:style>
    <style:style style:name="Таблица10.B4" style:family="table-cell">
      <style:table-cell-properties fo:padding="0.0382in" fo:border-left="0.05pt solid #000000" fo:border-right="0.05pt solid #000000" fo:border-top="none" fo:border-bottom="0.05pt solid #000000"/>
    </style:style>
    <style:style style:name="Таблица10.B5" style:family="table-cell">
      <style:table-cell-properties fo:padding="0.0382in" fo:border-left="0.05pt solid #000000" fo:border-right="0.05pt solid #000000" fo:border-top="none" fo:border-bottom="0.05pt solid #000000"/>
    </style:style>
    <style:style style:name="Table2" style:family="table">
      <style:table-properties style:width="6.6924in" table:align="margins" style:may-break-between-rows="false"/>
    </style:style>
    <style:style style:name="Table2.A" style:family="table-column">
      <style:table-column-properties style:column-width="0.6771in" style:rel-column-width="6630*"/>
    </style:style>
    <style:style style:name="Table2.B" style:family="table-column">
      <style:table-column-properties style:column-width="6.0153in" style:rel-column-width="5890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5.9444in" fo:margin-left="0in" fo:margin-right="-0.0049in" table:align="margins"/>
    </style:style>
    <style:style style:name="Table4.A" style:family="table-column">
      <style:table-column-properties style:column-width="5.9444in" style:rel-column-width="65535*"/>
    </style:style>
    <style:style style:name="Table4.A1" style:family="table-cell">
      <style:table-cell-properties fo:padding="0.0382in" fo:border-left="0.05pt solid #000000" fo:border-right="0.05pt solid #000000" fo:border-top="0.05pt solid #000000" fo:border-bottom="none"/>
    </style:style>
    <style:style style:name="Table4.A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may-break-between-rows="false"/>
    </style:style>
    <style:style style:name="Table6.A" style:family="table-column">
      <style:table-column-properties style:column-width="0.6771in" style:rel-column-width="6630*"/>
    </style:style>
    <style:style style:name="Table6.B" style:family="table-column">
      <style:table-column-properties style:column-width="6.0153in" style:rel-column-width="5890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5.9444in" fo:margin-left="0in" fo:margin-right="-0.0049in" table:align="margins"/>
    </style:style>
    <style:style style:name="Table7.A" style:family="table-column">
      <style:table-column-properties style:column-width="2.8076in" style:rel-column-width="30953*"/>
    </style:style>
    <style:style style:name="Table7.B" style:family="table-column">
      <style:table-column-properties style:column-width="3.1368in" style:rel-column-width="34582*"/>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8" style:family="table">
      <style:table-properties style:width="6.6924in" table:align="margins" style:may-break-between-rows="false"/>
    </style:style>
    <style:style style:name="Table8.A" style:family="table-column">
      <style:table-column-properties style:column-width="0.6771in" style:rel-column-width="6630*"/>
    </style:style>
    <style:style style:name="Table8.B" style:family="table-column">
      <style:table-column-properties style:column-width="6.0153in" style:rel-column-width="58905*"/>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9396in" table:align="margins"/>
    </style:style>
    <style:style style:name="Table9.A" style:family="table-column">
      <style:table-column-properties style:column-width="5.9396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Table10" style:family="table">
      <style:table-properties style:width="6.6924in" table:align="margins" style:may-break-between-rows="false"/>
    </style:style>
    <style:style style:name="Table10.A" style:family="table-column">
      <style:table-column-properties style:column-width="0.6771in" style:rel-column-width="6630*"/>
    </style:style>
    <style:style style:name="Table10.B" style:family="table-column">
      <style:table-column-properties style:column-width="6.0153in" style:rel-column-width="58905*"/>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5.9396in" table:align="margins"/>
    </style:style>
    <style:style style:name="Table11.A" style:family="table-column">
      <style:table-column-properties style:column-width="5.9396in" style:rel-column-width="65535*"/>
    </style:style>
    <style:style style:name="Table11.A1" style:family="table-cell">
      <style:table-cell-properties fo:padding="0.0382in" fo:border="0.05pt solid #000000"/>
    </style:style>
    <style:style style:name="Table36" style:family="table">
      <style:table-properties style:width="6.6924in" table:align="margins" style:may-break-between-rows="false"/>
    </style:style>
    <style:style style:name="Table36.A" style:family="table-column">
      <style:table-column-properties style:column-width="0.6771in" style:rel-column-width="6630*"/>
    </style:style>
    <style:style style:name="Table36.B" style:family="table-column">
      <style:table-column-properties style:column-width="6.0153in" style:rel-column-width="58905*"/>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5.9396in" table:align="margins"/>
    </style:style>
    <style:style style:name="Table37.A" style:family="table-column">
      <style:table-column-properties style:column-width="5.9396in" style:rel-column-width="65535*"/>
    </style:style>
    <style:style style:name="Table37.1" style:family="table-row">
      <style:table-row-properties style:min-row-height="0.25in"/>
    </style:style>
    <style:style style:name="Table37.A1" style:family="table-cell">
      <style:table-cell-properties fo:padding="0.0382in" fo:border="0.05pt solid #000000"/>
    </style:style>
    <style:style style:name="Table12" style:family="table">
      <style:table-properties style:width="6.6924in" table:align="margins" style:may-break-between-rows="false"/>
    </style:style>
    <style:style style:name="Table12.A" style:family="table-column">
      <style:table-column-properties style:column-width="0.6764in" style:rel-column-width="6623*"/>
    </style:style>
    <style:style style:name="Table12.B" style:family="table-column">
      <style:table-column-properties style:column-width="6.016in" style:rel-column-width="58912*"/>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2" style:family="table-row">
      <style:table-row-properties style:min-row-height="3.5472in"/>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5.9403in" table:align="margins"/>
    </style:style>
    <style:style style:name="Table13.A" style:family="table-column">
      <style:table-column-properties style:column-width="1.1882in" style:rel-column-width="13107*"/>
    </style:style>
    <style:style style:name="Table13.A1" style:family="table-cell">
      <style:table-cell-properties fo:padding="0.0382in" fo:border-left="0.05pt solid #000000" fo:border-right="none" fo:border-top="0.05pt solid #000000" fo:border-bottom="0.05pt solid #000000"/>
    </style:style>
    <style:style style:name="Table13.E1" style:family="table-cell">
      <style:table-cell-properties fo:padding="0.0382in" fo:border="0.05pt solid #000000"/>
    </style:style>
    <style:style style:name="Table14" style:family="table">
      <style:table-properties style:width="5.9375in" table:align="left"/>
    </style:style>
    <style:style style:name="Table14.A" style:family="table-column">
      <style:table-column-properties style:column-width="2.2083in"/>
    </style:style>
    <style:style style:name="Table14.B" style:family="table-column">
      <style:table-column-properties style:column-width="1.8438in"/>
    </style:style>
    <style:style style:name="Table14.C" style:family="table-column">
      <style:table-column-properties style:column-width="1.8854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5" style:family="table">
      <style:table-properties style:width="6.6924in" table:align="margins" style:may-break-between-rows="false"/>
    </style:style>
    <style:style style:name="Table15.A" style:family="table-column">
      <style:table-column-properties style:column-width="0.6764in" style:rel-column-width="6623*"/>
    </style:style>
    <style:style style:name="Table15.B" style:family="table-column">
      <style:table-column-properties style:column-width="6.016in" style:rel-column-width="58912*"/>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5.9403in" table:align="margins"/>
    </style:style>
    <style:style style:name="Table16.A" style:family="table-column">
      <style:table-column-properties style:column-width="2.9701in" style:rel-column-width="32767*"/>
    </style:style>
    <style:style style:name="Table16.B" style:family="table-column">
      <style:table-column-properties style:column-width="2.9701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22" style:family="table">
      <style:table-properties style:width="6.6924in" table:align="margins"/>
    </style:style>
    <style:style style:name="Table22.A" style:family="table-column">
      <style:table-column-properties style:column-width="0.9965in" style:rel-column-width="9758*"/>
    </style:style>
    <style:style style:name="Table22.B" style:family="table-column">
      <style:table-column-properties style:column-width="1.0076in" style:rel-column-width="9867*"/>
    </style:style>
    <style:style style:name="Table22.C" style:family="table-column">
      <style:table-column-properties style:column-width="4.6882in" style:rel-column-width="45910*"/>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18" style:family="table">
      <style:table-properties style:width="6.6924in" table:align="margins"/>
    </style:style>
    <style:style style:name="Table18.A" style:family="table-column">
      <style:table-column-properties style:column-width="1.0076in" style:rel-column-width="9867*"/>
    </style:style>
    <style:style style:name="Table18.B" style:family="table-column">
      <style:table-column-properties style:column-width="1.0188in" style:rel-column-width="9976*"/>
    </style:style>
    <style:style style:name="Table18.C" style:family="table-column">
      <style:table-column-properties style:column-width="0.9743in" style:rel-column-width="9540*"/>
    </style:style>
    <style:style style:name="Table18.D" style:family="table-column">
      <style:table-column-properties style:column-width="3.6917in" style:rel-column-width="36152*"/>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data-style-name="N0">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0.05pt solid #000000" fo:border-top="none" fo:border-bottom="0.05pt solid #000000"/>
    </style:style>
    <style:style style:name="Table18.A8" style:family="table-cell">
      <style:table-cell-properties fo:padding="0.0382in" fo:border-left="0.05pt solid #000000" fo:border-right="none" fo:border-top="none" fo:border-bottom="0.05pt solid #000000"/>
    </style:style>
    <style:style style:name="Table18.B8" style:family="table-cell">
      <style:table-cell-properties fo:padding="0.0382in" fo:border-left="0.05pt solid #000000" fo:border-right="none" fo:border-top="none" fo:border-bottom="0.05pt solid #000000"/>
    </style:style>
    <style:style style:name="Table18.C8" style:family="table-cell">
      <style:table-cell-properties fo:padding="0.0382in" fo:border-left="0.05pt solid #000000" fo:border-right="none" fo:border-top="none" fo:border-bottom="0.05pt solid #000000"/>
    </style:style>
    <style:style style:name="Table18.D8" style:family="table-cell">
      <style:table-cell-properties fo:padding="0.0382in" fo:border-left="0.05pt solid #000000" fo:border-right="0.05pt solid #000000" fo:border-top="none" fo:border-bottom="0.05pt solid #000000"/>
    </style:style>
    <style:style style:name="Table19" style:family="table">
      <style:table-properties style:width="6.3181in" table:align="left"/>
    </style:style>
    <style:style style:name="Table19.A" style:family="table-column">
      <style:table-column-properties style:column-width="1.4944in"/>
    </style:style>
    <style:style style:name="Table19.B" style:family="table-column">
      <style:table-column-properties style:column-width="4.823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Таблица15" style:family="table">
      <style:table-properties style:width="6.3181in" table:align="left"/>
    </style:style>
    <style:style style:name="Таблица15.A" style:family="table-column">
      <style:table-column-properties style:column-width="1.4944in"/>
    </style:style>
    <style:style style:name="Таблица15.B" style:family="table-column">
      <style:table-column-properties style:column-width="4.8236in"/>
    </style:style>
    <style:style style:name="Таблица15.A1" style:family="table-cell">
      <style:table-cell-properties fo:padding="0.0382in" fo:border-left="0.05pt solid #000000" fo:border-right="none" fo:border-top="0.05pt solid #000000" fo:border-bottom="0.05pt solid #000000"/>
    </style:style>
    <style:style style:name="Таблица15.B1" style:family="table-cell">
      <style:table-cell-properties fo:padding="0.0382in" fo:border="0.05pt solid #000000"/>
    </style:style>
    <style:style style:name="Таблица15.A2" style:family="table-cell">
      <style:table-cell-properties fo:padding="0.0382in" fo:border-left="0.05pt solid #000000" fo:border-right="none" fo:border-top="none" fo:border-bottom="0.05pt solid #000000"/>
    </style:style>
    <style:style style:name="Таблица15.B2" style:family="table-cell">
      <style:table-cell-properties fo:padding="0.0382in" fo:border-left="0.05pt solid #000000" fo:border-right="0.05pt solid #000000" fo:border-top="none" fo:border-bottom="0.05pt solid #000000"/>
    </style:style>
    <style:style style:name="Таблица16" style:family="table">
      <style:table-properties style:width="6.3181in" table:align="left"/>
    </style:style>
    <style:style style:name="Таблица16.A" style:family="table-column">
      <style:table-column-properties style:column-width="1.4944in"/>
    </style:style>
    <style:style style:name="Таблица16.B" style:family="table-column">
      <style:table-column-properties style:column-width="4.8236in"/>
    </style:style>
    <style:style style:name="Таблица16.A1" style:family="table-cell">
      <style:table-cell-properties fo:padding="0.0382in" fo:border-left="0.05pt solid #000000" fo:border-right="none" fo:border-top="0.05pt solid #000000" fo:border-bottom="0.05pt solid #000000"/>
    </style:style>
    <style:style style:name="Таблица16.B1" style:family="table-cell">
      <style:table-cell-properties fo:padding="0.0382in" fo:border="0.05pt solid #000000"/>
    </style:style>
    <style:style style:name="Таблица16.A2" style:family="table-cell">
      <style:table-cell-properties fo:padding="0.0382in" fo:border-left="0.05pt solid #000000" fo:border-right="none" fo:border-top="none" fo:border-bottom="0.05pt solid #000000"/>
    </style:style>
    <style:style style:name="Таблица16.B2" style:family="table-cell">
      <style:table-cell-properties fo:padding="0.0382in" fo:border-left="0.05pt solid #000000" fo:border-right="0.05pt solid #000000" fo:border-top="none" fo:border-bottom="0.05pt solid #000000"/>
    </style:style>
    <style:style style:name="Таблица12" style:family="table">
      <style:table-properties style:width="6.6924in" table:align="margins"/>
    </style:style>
    <style:style style:name="Таблица12.A" style:family="table-column">
      <style:table-column-properties style:column-width="3.3458in" style:rel-column-width="32767*"/>
    </style:style>
    <style:style style:name="Таблица12.B" style:family="table-column">
      <style:table-column-properties style:column-width="3.3465in" style:rel-column-width="32768*"/>
    </style:style>
    <style:style style:name="Таблица12.A1" style:family="table-cell">
      <style:table-cell-properties fo:padding="0.0382in" fo:border-left="0.05pt solid #000000" fo:border-right="none" fo:border-top="0.05pt solid #000000" fo:border-bottom="0.05pt solid #000000"/>
    </style:style>
    <style:style style:name="Таблица12.B1" style:family="table-cell">
      <style:table-cell-properties fo:padding="0.0382in" fo:border="0.05pt solid #000000"/>
    </style:style>
    <style:style style:name="приоритеты_5f_внутр_5f_прерываний" style:display-name="приоритеты_внутр_прерываний" style:family="table">
      <style:table-properties style:width="6.6924in" table:align="margins"/>
    </style:style>
    <style:style style:name="приоритеты_5f_внутр_5f_прерываний.A" style:display-name="приоритеты_внутр_прерываний.A" style:family="table-column">
      <style:table-column-properties style:column-width="1.3382in" style:rel-column-width="13106*"/>
    </style:style>
    <style:style style:name="приоритеты_5f_внутр_5f_прерываний.B" style:display-name="приоритеты_внутр_прерываний.B" style:family="table-column">
      <style:table-column-properties style:column-width="1.3382in" style:rel-column-width="13107*"/>
    </style:style>
    <style:style style:name="приоритеты_5f_внутр_5f_прерываний.A1" style:display-name="приоритеты_внутр_прерываний.A1" style:family="table-cell">
      <style:table-cell-properties fo:padding="0in" fo:border="none" style:writing-mode="page"/>
    </style:style>
    <style:style style:name="приоритеты_5f_внутр_5f_прерываний.8" style:display-name="приоритеты_внутр_прерываний.8" style:family="table-row">
      <style:table-row-properties style:min-row-height="0.2208in"/>
    </style:style>
    <style:style style:name="Table21" style:family="table">
      <style:table-properties style:width="6.6924in" fo:break-before="page" table:align="margins" fo:keep-with-next="auto" style:may-break-between-rows="true"/>
    </style:style>
    <style:style style:name="Table21.A" style:family="table-column">
      <style:table-column-properties style:column-width="1.1313in" style:rel-column-width="11077*"/>
    </style:style>
    <style:style style:name="Table21.B" style:family="table-column">
      <style:table-column-properties style:column-width="5.5611in" style:rel-column-width="5445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9" style:family="table-row">
      <style:table-row-properties style:min-row-height="0.6333in"/>
    </style:style>
    <style:style style:name="Таблица6" style:family="table">
      <style:table-properties style:width="6.6924in" table:align="margins" style:may-break-between-rows="false"/>
    </style:style>
    <style:style style:name="Таблица6.A" style:family="table-column">
      <style:table-column-properties style:column-width="0.6771in" style:rel-column-width="6630*"/>
    </style:style>
    <style:style style:name="Таблица6.B" style:family="table-column">
      <style:table-column-properties style:column-width="6.0153in" style:rel-column-width="58905*"/>
    </style:style>
    <style:style style:name="Таблица6.A1" style:family="table-cell">
      <style:table-cell-properties fo:padding="0.0382in" fo:border-left="0.05pt solid #000000" fo:border-right="none" fo:border-top="0.05pt solid #000000" fo:border-bottom="0.05pt solid #000000"/>
    </style:style>
    <style:style style:name="Таблица6.B1" style:family="table-cell">
      <style:table-cell-properties fo:padding="0.0382in" fo:border="0.05pt solid #000000"/>
    </style:style>
    <style:style style:name="Таблица6.A2" style:family="table-cell">
      <style:table-cell-properties fo:padding="0.0382in" fo:border-left="0.05pt solid #000000" fo:border-right="none" fo:border-top="none" fo:border-bottom="0.05pt solid #000000"/>
    </style:style>
    <style:style style:name="Таблица6.B2" style:family="table-cell">
      <style:table-cell-properties fo:padding="0.0382in" fo:border-left="0.05pt solid #000000" fo:border-right="0.05pt solid #000000" fo:border-top="none" fo:border-bottom="0.05pt solid #000000"/>
    </style:style>
    <style:style style:name="Таблица7" style:family="table">
      <style:table-properties style:width="5.9396in" table:align="margins"/>
    </style:style>
    <style:style style:name="Таблица7.A" style:family="table-column">
      <style:table-column-properties style:column-width="1.4688in" style:rel-column-width="16205*"/>
    </style:style>
    <style:style style:name="Таблица7.B" style:family="table-column">
      <style:table-column-properties style:column-width="1.6458in" style:rel-column-width="18159*"/>
    </style:style>
    <style:style style:name="Таблица7.C" style:family="table-column">
      <style:table-column-properties style:column-width="1.2813in" style:rel-column-width="14136*"/>
    </style:style>
    <style:style style:name="Таблица7.D" style:family="table-column">
      <style:table-column-properties style:column-width="1.5438in" style:rel-column-width="17035*"/>
    </style:style>
    <style:style style:name="Таблица7.A1" style:family="table-cell">
      <style:table-cell-properties fo:padding="0.0382in" fo:border-left="0.05pt solid #000000" fo:border-right="none" fo:border-top="0.05pt solid #000000" fo:border-bottom="0.05pt solid #000000"/>
    </style:style>
    <style:style style:name="Таблица7.D1" style:family="table-cell">
      <style:table-cell-properties fo:padding="0.0382in" fo:border="0.05pt solid #000000"/>
    </style:style>
    <style:style style:name="Таблица8" style:family="table">
      <style:table-properties style:width="5.9396in" table:align="margins"/>
    </style:style>
    <style:style style:name="Таблица8.A" style:family="table-column">
      <style:table-column-properties style:column-width="1.4847in" style:rel-column-width="16383*"/>
    </style:style>
    <style:style style:name="Таблица8.D" style:family="table-column">
      <style:table-column-properties style:column-width="1.4854in" style:rel-column-width="16386*"/>
    </style:style>
    <style:style style:name="Таблица8.A1" style:family="table-cell">
      <style:table-cell-properties fo:padding="0.0382in" fo:border-left="0.05pt solid #000000" fo:border-right="none" fo:border-top="0.05pt solid #000000" fo:border-bottom="0.05pt solid #000000"/>
    </style:style>
    <style:style style:name="Таблица8.D1" style:family="table-cell">
      <style:table-cell-properties fo:padding="0.0382in" fo:border="0.05pt solid #000000"/>
    </style:style>
    <style:style style:name="Table20" style:family="table">
      <style:table-properties style:width="6.6924in" table:align="margins" style:may-break-between-rows="false"/>
    </style:style>
    <style:style style:name="Table20.A" style:family="table-column">
      <style:table-column-properties style:column-width="0.6771in" style:rel-column-width="6630*"/>
    </style:style>
    <style:style style:name="Table20.B" style:family="table-column">
      <style:table-column-properties style:column-width="6.0153in" style:rel-column-width="58905*"/>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Таблица2" style:family="table">
      <style:table-properties style:width="6.6924in" table:align="margins" style:may-break-between-rows="false"/>
    </style:style>
    <style:style style:name="Таблица2.A" style:family="table-column">
      <style:table-column-properties style:column-width="0.6771in" style:rel-column-width="6630*"/>
    </style:style>
    <style:style style:name="Таблица2.B" style:family="table-column">
      <style:table-column-properties style:column-width="6.0153in" style:rel-column-width="58905*"/>
    </style:style>
    <style:style style:name="Таблица2.A1" style:family="table-cell">
      <style:table-cell-properties fo:padding="0.0382in" fo:border-left="0.05pt solid #000000" fo:border-right="none" fo:border-top="0.05pt solid #000000" fo:border-bottom="0.05pt solid #000000"/>
    </style:style>
    <style:style style:name="Таблица2.B1" style:family="table-cell">
      <style:table-cell-properties fo:padding="0.0382in" fo:border="0.05pt solid #000000"/>
    </style:style>
    <style:style style:name="Таблица2.A2" style:family="table-cell">
      <style:table-cell-properties fo:padding="0.0382in" fo:border-left="0.05pt solid #000000" fo:border-right="none" fo:border-top="none" fo:border-bottom="0.05pt solid #000000"/>
    </style:style>
    <style:style style:name="Таблица2.B2" style:family="table-cell">
      <style:table-cell-properties fo:padding="0.0382in" fo:border-left="0.05pt solid #000000" fo:border-right="0.05pt solid #000000" fo:border-top="none" fo:border-bottom="0.05pt solid #000000"/>
    </style:style>
    <style:style style:name="Таблица3" style:family="table">
      <style:table-properties style:width="5.9396in" table:align="margins"/>
    </style:style>
    <style:style style:name="Таблица3.A" style:family="table-column">
      <style:table-column-properties style:column-width="0.7424in" style:rel-column-width="8190*"/>
    </style:style>
    <style:style style:name="Таблица3.H" style:family="table-column">
      <style:table-column-properties style:column-width="0.7438in" style:rel-column-width="8205*"/>
    </style:style>
    <style:style style:name="Таблица3.A1" style:family="table-cell">
      <style:table-cell-properties fo:padding="0.0382in" fo:border-left="0.05pt solid #000000" fo:border-right="none" fo:border-top="0.05pt solid #000000" fo:border-bottom="0.05pt solid #000000"/>
    </style:style>
    <style:style style:name="Таблица3.H1" style:family="table-cell">
      <style:table-cell-properties fo:padding="0.0382in" fo:border="0.05pt solid #000000"/>
    </style:style>
    <style:style style:name="Таблица4" style:family="table">
      <style:table-properties style:width="6.6924in" table:align="margins" style:may-break-between-rows="false"/>
    </style:style>
    <style:style style:name="Таблица4.A" style:family="table-column">
      <style:table-column-properties style:column-width="0.6875in" style:rel-column-width="6732*"/>
    </style:style>
    <style:style style:name="Таблица4.B" style:family="table-column">
      <style:table-column-properties style:column-width="6.0049in" style:rel-column-width="58803*"/>
    </style:style>
    <style:style style:name="Таблица4.A1" style:family="table-cell">
      <style:table-cell-properties fo:padding="0.0382in" fo:border-left="0.05pt solid #000000" fo:border-right="none" fo:border-top="0.05pt solid #000000" fo:border-bottom="0.05pt solid #000000"/>
    </style:style>
    <style:style style:name="Таблица4.B1" style:family="table-cell">
      <style:table-cell-properties fo:padding="0.0382in" fo:border="0.05pt solid #000000"/>
    </style:style>
    <style:style style:name="Таблица4.A2" style:family="table-cell">
      <style:table-cell-properties fo:padding="0.0382in" fo:border-left="0.05pt solid #000000" fo:border-right="none" fo:border-top="none" fo:border-bottom="0.05pt solid #000000"/>
    </style:style>
    <style:style style:name="Таблица4.B2" style:family="table-cell">
      <style:table-cell-properties fo:padding="0.0382in" fo:border-left="0.05pt solid #000000" fo:border-right="0.05pt solid #000000" fo:border-top="none" fo:border-bottom="0.05pt solid #000000"/>
    </style:style>
    <style:style style:name="Таблица5" style:family="table">
      <style:table-properties style:width="5.9292in" table:align="margins"/>
    </style:style>
    <style:style style:name="Таблица5.A" style:family="table-column">
      <style:table-column-properties style:column-width="2.9646in" style:rel-column-width="32767*"/>
    </style:style>
    <style:style style:name="Таблица5.B" style:family="table-column">
      <style:table-column-properties style:column-width="0.741in" style:rel-column-width="8191*"/>
    </style:style>
    <style:style style:name="Таблица5.E" style:family="table-column">
      <style:table-column-properties style:column-width="0.7417in" style:rel-column-width="8195*"/>
    </style:style>
    <style:style style:name="Таблица5.A1" style:family="table-cell">
      <style:table-cell-properties fo:padding="0.0382in" fo:border-left="0.05pt solid #000000" fo:border-right="none" fo:border-top="0.05pt solid #000000" fo:border-bottom="0.05pt solid #000000"/>
    </style:style>
    <style:style style:name="Таблица5.E1" style:family="table-cell">
      <style:table-cell-properties fo:padding="0.0382in" fo:border="0.05pt solid #000000"/>
    </style:style>
    <style:style style:name="Таблица1" style:family="table">
      <style:table-properties style:width="6.6924in" table:align="margins" style:may-break-between-rows="false"/>
    </style:style>
    <style:style style:name="Таблица1.A" style:family="table-column">
      <style:table-column-properties style:column-width="0.6771in" style:rel-column-width="6630*"/>
    </style:style>
    <style:style style:name="Таблица1.B" style:family="table-column">
      <style:table-column-properties style:column-width="6.0153in" style:rel-column-width="58905*"/>
    </style:style>
    <style:style style:name="Таблица1.A1" style:family="table-cell">
      <style:table-cell-properties fo:padding="0.0382in" fo:border-left="0.05pt solid #000000" fo:border-right="none" fo:border-top="0.05pt solid #000000" fo:border-bottom="0.05pt solid #000000"/>
    </style:style>
    <style:style style:name="Таблица1.B1" style:family="table-cell">
      <style:table-cell-properties fo:padding="0.0382in" fo:border="0.05pt solid #000000"/>
    </style:style>
    <style:style style:name="Таблица1.A2" style:family="table-cell">
      <style:table-cell-properties fo:padding="0.0382in" fo:border-left="0.05pt solid #000000" fo:border-right="none" fo:border-top="none" fo:border-bottom="0.05pt solid #000000"/>
    </style:style>
    <style:style style:name="Таблица1.B2" style:family="table-cell">
      <style:table-cell-properties fo:padding="0.0382in" fo:border-left="0.05pt solid #000000" fo:border-right="0.05pt solid #000000" fo:border-top="none" fo:border-bottom="0.05pt solid #000000"/>
    </style:style>
    <style:style style:name="Таблица14" style:family="table">
      <style:table-properties style:width="6.6924in" table:align="margins"/>
    </style:style>
    <style:style style:name="Таблица14.A" style:family="table-column">
      <style:table-column-properties style:column-width="0.9271in" style:rel-column-width="9078*"/>
    </style:style>
    <style:style style:name="Таблица14.B" style:family="table-column">
      <style:table-column-properties style:column-width="2.1354in" style:rel-column-width="20911*"/>
    </style:style>
    <style:style style:name="Таблица14.C" style:family="table-column">
      <style:table-column-properties style:column-width="3.6299in" style:rel-column-width="35546*"/>
    </style:style>
    <style:style style:name="Таблица14.A1" style:family="table-cell">
      <style:table-cell-properties fo:padding="0.0382in" fo:border-left="0.05pt solid #000000" fo:border-right="none" fo:border-top="0.05pt solid #000000" fo:border-bottom="0.05pt solid #000000"/>
    </style:style>
    <style:style style:name="Таблица14.C1" style:family="table-cell">
      <style:table-cell-properties fo:padding="0.0382in" fo:border="0.05pt solid #000000"/>
    </style:style>
    <style:style style:name="Таблица14.A2" style:family="table-cell" style:data-style-name="N0">
      <style:table-cell-properties fo:padding="0.0382in" fo:border-left="0.05pt solid #000000" fo:border-right="none" fo:border-top="none" fo:border-bottom="0.05pt solid #000000"/>
    </style:style>
    <style:style style:name="Таблица14.B2" style:family="table-cell">
      <style:table-cell-properties fo:padding="0.0382in" fo:border-left="0.05pt solid #000000" fo:border-right="none" fo:border-top="none" fo:border-bottom="0.05pt solid #000000"/>
    </style:style>
    <style:style style:name="Таблица14.C2" style:family="table-cell">
      <style:table-cell-properties fo:padding="0.0382in" fo:border-left="0.05pt solid #000000" fo:border-right="0.05pt solid #000000" fo:border-top="none" fo:border-bottom="0.05pt solid #000000"/>
    </style:style>
    <style:style style:name="Таблица14.B3" style:family="table-cell">
      <style:table-cell-properties fo:padding="0.0382in" fo:border-left="0.05pt solid #000000" fo:border-right="none" fo:border-top="none" fo:border-bottom="0.05pt solid #000000"/>
    </style:style>
    <style:style style:name="Таблица14.C3" style:family="table-cell">
      <style:table-cell-properties fo:padding="0.0382in" fo:border-left="0.05pt solid #000000" fo:border-right="0.05pt solid #000000" fo:border-top="none" fo:border-bottom="0.05pt solid #000000"/>
    </style:style>
    <style:style style:name="Таблица14.B4" style:family="table-cell">
      <style:table-cell-properties fo:padding="0.0382in" fo:border-left="0.05pt solid #000000" fo:border-right="none" fo:border-top="none" fo:border-bottom="0.05pt solid #000000"/>
    </style:style>
    <style:style style:name="Таблица14.C4" style:family="table-cell">
      <style:table-cell-properties fo:padding="0.0382in" fo:border-left="0.05pt solid #000000" fo:border-right="0.05pt solid #000000" fo:border-top="none" fo:border-bottom="0.05pt solid #000000"/>
    </style:style>
    <style:style style:name="Таблица14.B5" style:family="table-cell">
      <style:table-cell-properties fo:padding="0.0382in" fo:border-left="0.05pt solid #000000" fo:border-right="none" fo:border-top="none" fo:border-bottom="0.05pt solid #000000"/>
    </style:style>
    <style:style style:name="Таблица14.C5" style:family="table-cell">
      <style:table-cell-properties fo:padding="0.0382in" fo:border-left="0.05pt solid #000000" fo:border-right="0.05pt solid #000000" fo:border-top="none" fo:border-bottom="0.05pt solid #000000"/>
    </style:style>
    <style:style style:name="Таблица14.B6" style:family="table-cell">
      <style:table-cell-properties fo:padding="0.0382in" fo:border-left="0.05pt solid #000000" fo:border-right="none" fo:border-top="none" fo:border-bottom="0.05pt solid #000000"/>
    </style:style>
    <style:style style:name="Таблица14.C6" style:family="table-cell">
      <style:table-cell-properties fo:padding="0.0382in" fo:border-left="0.05pt solid #000000" fo:border-right="0.05pt solid #000000" fo:border-top="none" fo:border-bottom="0.05pt solid #000000"/>
    </style:style>
    <style:style style:name="Таблица14.B7" style:family="table-cell">
      <style:table-cell-properties fo:padding="0.0382in" fo:border-left="0.05pt solid #000000" fo:border-right="none" fo:border-top="none" fo:border-bottom="0.05pt solid #000000"/>
    </style:style>
    <style:style style:name="Таблица14.C7" style:family="table-cell">
      <style:table-cell-properties fo:padding="0.0382in" fo:border-left="0.05pt solid #000000" fo:border-right="0.05pt solid #000000" fo:border-top="none" fo:border-bottom="0.05pt solid #000000"/>
    </style:style>
    <style:style style:name="Таблица13" style:family="table">
      <style:table-properties style:width="6.6924in" table:align="margins"/>
    </style:style>
    <style:style style:name="Таблица13.A" style:family="table-column">
      <style:table-column-properties style:column-width="0.9271in" style:rel-column-width="9078*"/>
    </style:style>
    <style:style style:name="Таблица13.B" style:family="table-column">
      <style:table-column-properties style:column-width="2.1771in" style:rel-column-width="21319*"/>
    </style:style>
    <style:style style:name="Таблица13.C" style:family="table-column">
      <style:table-column-properties style:column-width="3.5882in" style:rel-column-width="35138*"/>
    </style:style>
    <style:style style:name="Таблица13.A1" style:family="table-cell">
      <style:table-cell-properties fo:padding="0.0382in" fo:border-left="0.05pt solid #000000" fo:border-right="none" fo:border-top="0.05pt solid #000000" fo:border-bottom="0.05pt solid #000000"/>
    </style:style>
    <style:style style:name="Таблица13.C1" style:family="table-cell">
      <style:table-cell-properties fo:padding="0.0382in" fo:border="0.05pt solid #000000"/>
    </style:style>
    <style:style style:name="Таблица13.A2" style:family="table-cell" style:data-style-name="N0">
      <style:table-cell-properties fo:padding="0.0382in" fo:border-left="0.05pt solid #000000" fo:border-right="none" fo:border-top="none" fo:border-bottom="0.05pt solid #000000"/>
    </style:style>
    <style:style style:name="Таблица13.B2" style:family="table-cell">
      <style:table-cell-properties fo:padding="0.0382in" fo:border-left="0.05pt solid #000000" fo:border-right="none" fo:border-top="none" fo:border-bottom="0.05pt solid #000000"/>
    </style:style>
    <style:style style:name="Таблица13.C2" style:family="table-cell">
      <style:table-cell-properties fo:padding="0.0382in" fo:border-left="0.05pt solid #000000" fo:border-right="0.05pt solid #000000" fo:border-top="none" fo:border-bottom="0.05pt solid #000000"/>
    </style:style>
    <style:style style:name="Таблица13.B3" style:family="table-cell">
      <style:table-cell-properties fo:padding="0.0382in" fo:border-left="0.05pt solid #000000" fo:border-right="none" fo:border-top="none" fo:border-bottom="0.05pt solid #000000"/>
    </style:style>
    <style:style style:name="Таблица13.C3" style:family="table-cell">
      <style:table-cell-properties fo:padding="0.0382in" fo:border-left="0.05pt solid #000000" fo:border-right="0.05pt solid #000000" fo:border-top="none" fo:border-bottom="0.05pt solid #000000"/>
    </style:style>
    <style:style style:name="Таблица13.B4" style:family="table-cell">
      <style:table-cell-properties fo:padding="0.0382in" fo:border-left="0.05pt solid #000000" fo:border-right="none" fo:border-top="none" fo:border-bottom="0.05pt solid #000000"/>
    </style:style>
    <style:style style:name="Таблица13.C4" style:family="table-cell">
      <style:table-cell-properties fo:padding="0.0382in" fo:border-left="0.05pt solid #000000" fo:border-right="0.05pt solid #000000" fo:border-top="none" fo:border-bottom="0.05pt solid #000000"/>
    </style:style>
    <style:style style:name="Таблица13.B5" style:family="table-cell">
      <style:table-cell-properties fo:padding="0.0382in" fo:border-left="0.05pt solid #000000" fo:border-right="none" fo:border-top="none" fo:border-bottom="0.05pt solid #000000"/>
    </style:style>
    <style:style style:name="Таблица13.C5" style:family="table-cell">
      <style:table-cell-properties fo:padding="0.0382in" fo:border-left="0.05pt solid #000000" fo:border-right="0.05pt solid #000000" fo:border-top="none" fo:border-bottom="0.05pt solid #000000"/>
    </style:style>
    <style:style style:name="Таблица13.B6" style:family="table-cell">
      <style:table-cell-properties fo:padding="0.0382in" fo:border-left="0.05pt solid #000000" fo:border-right="none" fo:border-top="none" fo:border-bottom="0.05pt solid #000000"/>
    </style:style>
    <style:style style:name="Таблица13.C6" style:family="table-cell">
      <style:table-cell-properties fo:padding="0.0382in" fo:border-left="0.05pt solid #000000" fo:border-right="0.05pt solid #000000" fo:border-top="none" fo:border-bottom="0.05pt solid #000000"/>
    </style:style>
    <style:style style:name="Таблица13.B7" style:family="table-cell">
      <style:table-cell-properties fo:padding="0.0382in" fo:border-left="0.05pt solid #000000" fo:border-right="none" fo:border-top="none" fo:border-bottom="0.05pt solid #000000"/>
    </style:style>
    <style:style style:name="Таблица13.C7" style:family="table-cell">
      <style:table-cell-properties fo:padding="0.0382in" fo:border-left="0.05pt solid #000000" fo:border-right="0.05pt solid #000000" fo:border-top="none" fo:border-bottom="0.05pt solid #000000"/>
    </style:style>
    <style:style style:name="Таблица13.B8" style:family="table-cell">
      <style:table-cell-properties fo:padding="0.0382in" fo:border-left="0.05pt solid #000000" fo:border-right="none" fo:border-top="none" fo:border-bottom="0.05pt solid #000000"/>
    </style:style>
    <style:style style:name="Таблица13.C8" style:family="table-cell">
      <style:table-cell-properties fo:padding="0.0382in" fo:border-left="0.05pt solid #000000" fo:border-right="0.05pt solid #000000" fo:border-top="none" fo:border-bottom="0.05pt solid #000000"/>
    </style:style>
    <style:style style:name="Таблица13.B9" style:family="table-cell">
      <style:table-cell-properties fo:padding="0.0382in" fo:border-left="0.05pt solid #000000" fo:border-right="none" fo:border-top="none" fo:border-bottom="0.05pt solid #000000"/>
    </style:style>
    <style:style style:name="Таблица13.C9" style:family="table-cell">
      <style:table-cell-properties fo:padding="0.0382in" fo:border-left="0.05pt solid #000000" fo:border-right="0.05pt solid #000000" fo:border-top="none" fo:border-bottom="0.05pt solid #000000"/>
    </style:style>
    <style:style style:name="Table35" style:family="table">
      <style:table-properties style:width="6.6924in" table:align="margins"/>
    </style:style>
    <style:style style:name="Table35.A" style:family="table-column">
      <style:table-column-properties style:column-width="2.2306in" style:rel-column-width="21845*"/>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C2" style:family="table-cell">
      <style:table-cell-properties fo:padding="0.0382in" fo:border-left="0.05pt solid #000000" fo:border-right="0.05pt solid #000000" fo:border-top="none" fo:border-bottom="0.05pt solid #000000"/>
    </style:style>
    <style:style style:name="Table1" style:family="table">
      <style:table-properties style:width="6.6924in" table:align="margins" style:may-break-between-rows="false"/>
    </style:style>
    <style:style style:name="Table1.A" style:family="table-column">
      <style:table-column-properties style:column-width="0.6771in" style:rel-column-width="6630*"/>
    </style:style>
    <style:style style:name="Table1.B" style:family="table-column">
      <style:table-column-properties style:column-width="6.0153in" style:rel-column-width="5890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5" style:family="table">
      <style:table-properties style:width="5.9396in" table:align="margins"/>
    </style:style>
    <style:style style:name="Table5.A" style:family="table-column">
      <style:table-column-properties style:column-width="1.9799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3" style:family="table">
      <style:table-properties style:width="6.6924in" table:align="margins" style:may-break-between-rows="false"/>
    </style:style>
    <style:style style:name="Table3.A" style:family="table-column">
      <style:table-column-properties style:column-width="0.6764in" style:rel-column-width="6623*"/>
    </style:style>
    <style:style style:name="Table3.B" style:family="table-column">
      <style:table-column-properties style:column-width="6.016in" style:rel-column-width="58912*"/>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Таблица9" style:family="table">
      <style:table-properties style:width="6.6924in" fo:break-before="auto" fo:break-after="auto" table:align="margins" style:may-break-between-rows="false"/>
    </style:style>
    <style:style style:name="Таблица9.A" style:family="table-column">
      <style:table-column-properties style:column-width="0.6764in" style:rel-column-width="6623*"/>
    </style:style>
    <style:style style:name="Таблица9.B" style:family="table-column">
      <style:table-column-properties style:column-width="6.016in" style:rel-column-width="58912*"/>
    </style:style>
    <style:style style:name="Таблица9.A1" style:family="table-cell">
      <style:table-cell-properties fo:padding="0.0382in" fo:border-left="0.05pt solid #000000" fo:border-right="none" fo:border-top="0.05pt solid #000000" fo:border-bottom="0.05pt solid #000000"/>
    </style:style>
    <style:style style:name="Таблица9.B1" style:family="table-cell">
      <style:table-cell-properties fo:padding="0.0382in" fo:border="0.05pt solid #000000"/>
    </style:style>
    <style:style style:name="Таблица9.A2" style:family="table-cell">
      <style:table-cell-properties fo:padding="0.0382in" fo:border-left="0.05pt solid #000000" fo:border-right="none" fo:border-top="none" fo:border-bottom="0.05pt solid #000000"/>
    </style:style>
    <style:style style:name="Таблица9.B2" style:family="table-cell">
      <style:table-cell-properties fo:padding="0.0382in" fo:border-left="0.05pt solid #000000" fo:border-right="0.05pt solid #000000" fo:border-top="none" fo:border-bottom="0.05pt solid #000000"/>
    </style:style>
    <style:style style:name="Table17" style:family="table">
      <style:table-properties style:width="6.6924in" table:align="margins" style:may-break-between-rows="true"/>
    </style:style>
    <style:style style:name="Table17.A" style:family="table-column">
      <style:table-column-properties style:column-width="0.6764in" style:rel-column-width="6623*"/>
    </style:style>
    <style:style style:name="Table17.B" style:family="table-column">
      <style:table-column-properties style:column-width="6.016in" style:rel-column-width="58912*"/>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Таблица11" style:family="table">
      <style:table-properties style:width="6.6924in" table:align="margins" style:may-break-between-rows="false"/>
    </style:style>
    <style:style style:name="Таблица11.A" style:family="table-column">
      <style:table-column-properties style:column-width="0.6757in" style:rel-column-width="6616*"/>
    </style:style>
    <style:style style:name="Таблица11.B" style:family="table-column">
      <style:table-column-properties style:column-width="6.0167in" style:rel-column-width="58919*"/>
    </style:style>
    <style:style style:name="Таблица11.A1" style:family="table-cell">
      <style:table-cell-properties fo:padding="0.0382in" fo:border-left="0.05pt solid #000000" fo:border-right="none" fo:border-top="0.05pt solid #000000" fo:border-bottom="0.05pt solid #000000"/>
    </style:style>
    <style:style style:name="Таблица11.B1" style:family="table-cell">
      <style:table-cell-properties fo:padding="0.0382in" fo:border="0.05pt solid #000000"/>
    </style:style>
    <style:style style:name="Таблица11.A2" style:family="table-cell">
      <style:table-cell-properties fo:padding="0.0382in" fo:border-left="0.05pt solid #000000" fo:border-right="none" fo:border-top="none" fo:border-bottom="0.05pt solid #000000"/>
    </style:style>
    <style:style style:name="Таблица11.B2" style:family="table-cell">
      <style:table-cell-properties fo:padding="0.0382in" fo:border-left="0.05pt solid #000000" fo:border-right="0.05pt solid #000000" fo:border-top="none" fo:border-bottom="0.05pt solid #000000"/>
    </style:style>
    <style:style style:name="Table23" style:family="table">
      <style:table-properties style:width="6.6847in" fo:margin-left="0.025in" fo:margin-right="-0.0174in" table:align="margins"/>
    </style:style>
    <style:style style:name="Table23.A" style:family="table-column">
      <style:table-column-properties style:column-width="0.7896in" style:rel-column-width="7740*"/>
    </style:style>
    <style:style style:name="Table23.B" style:family="table-column">
      <style:table-column-properties style:column-width="0.7146in" style:rel-column-width="7005*"/>
    </style:style>
    <style:style style:name="Table23.C" style:family="table-column">
      <style:table-column-properties style:column-width="5.1806in" style:rel-column-width="50790*"/>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5.1097in" fo:margin-left="0in" fo:margin-right="-0.0049in" table:align="margins"/>
    </style:style>
    <style:style style:name="Table24.A" style:family="table-column">
      <style:table-column-properties style:column-width="5.1097in" style:rel-column-width="65535*"/>
    </style:style>
    <style:style style:name="Table24.A1" style:family="table-cell">
      <style:table-cell-properties fo:padding="0.0382in" fo:border-left="0.05pt solid #000000" fo:border-right="0.05pt solid #000000" fo:border-top="0.05pt solid #000000" fo:border-bottom="none"/>
    </style:style>
    <style:style style:name="Table24.A2" style:family="table-cell">
      <style:table-cell-properties fo:padding="0.0382in" fo:border-left="0.05pt solid #000000" fo:border-right="0.05pt solid #000000" fo:border-top="none" fo:border-bottom="none"/>
    </style:style>
    <style:style style:name="Table24.A7" style:family="table-cell">
      <style:table-cell-properties fo:padding="0.0382in" fo:border-left="0.05pt solid #000000" fo:border-right="0.05pt solid #000000" fo:border-top="none" fo:border-bottom="0.05pt solid #000000"/>
    </style:style>
    <style:style style:name="Table25" style:family="table">
      <style:table-properties style:width="5.1049in" table:align="margins"/>
    </style:style>
    <style:style style:name="Table25.A" style:family="table-column">
      <style:table-column-properties style:column-width="5.1049in" style:rel-column-width="65535*"/>
    </style:style>
    <style:style style:name="Table25.A1" style:family="table-cell">
      <style:table-cell-properties fo:background-color="transparent" fo:padding="0.0382in" fo:border-left="0.05pt solid #000000" fo:border-right="0.05pt solid #000000" fo:border-top="0.05pt solid #000000" fo:border-bottom="0.05pt solid #808080">
        <style:background-image/>
      </style:table-cell-properties>
    </style:style>
    <style:style style:name="Table25.A2" style:family="table-cell">
      <style:table-cell-properties fo:background-color="transparent" fo:padding="0.0382in" fo:border-left="0.05pt solid #000000" fo:border-right="0.05pt solid #000000" fo:border-top="none" fo:border-bottom="0.05pt solid #808080">
        <style:background-image/>
      </style:table-cell-properties>
    </style:style>
    <style:style style:name="Table25.A5"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6" style:family="table">
      <style:table-properties style:width="5.1049in" table:align="margins"/>
    </style:style>
    <style:style style:name="Table26.A" style:family="table-column">
      <style:table-column-properties style:column-width="5.1049in" style:rel-column-width="65535*"/>
    </style:style>
    <style:style style:name="Table26.A1" style:family="table-cell">
      <style:table-cell-properties fo:padding="0.0382in" fo:border="0.05pt solid #000000"/>
    </style:style>
    <style:style style:name="Table26.A2" style:family="table-cell">
      <style:table-cell-properties fo:padding="0.0382in" fo:border-left="0.05pt solid #000000" fo:border-right="0.05pt solid #000000" fo:border-top="none" fo:border-bottom="0.05pt solid #000000"/>
    </style:style>
    <style:style style:name="Table27" style:family="table">
      <style:table-properties style:width="5.1049in" table:align="margins"/>
    </style:style>
    <style:style style:name="Table27.A" style:family="table-column">
      <style:table-column-properties style:column-width="5.1049in" style:rel-column-width="65535*"/>
    </style:style>
    <style:style style:name="Table27.A1" style:family="table-cell">
      <style:table-cell-properties fo:padding="0.0382in" fo:border="0.05pt solid #000000"/>
    </style:style>
    <style:style style:name="Table38" style:family="table">
      <style:table-properties style:width="5.1049in" table:align="margins"/>
    </style:style>
    <style:style style:name="Table38.A" style:family="table-column">
      <style:table-column-properties style:column-width="5.1049in" style:rel-column-width="65535*"/>
    </style:style>
    <style:style style:name="Table38.A1" style:family="table-cell">
      <style:table-cell-properties fo:padding="0.0382in" fo:border="0.05pt solid #000000"/>
    </style:style>
    <style:style style:name="Table28" style:family="table">
      <style:table-properties style:width="4.9507in" table:align="left"/>
    </style:style>
    <style:style style:name="Table28.A" style:family="table-column">
      <style:table-column-properties style:column-width="0.784in"/>
    </style:style>
    <style:style style:name="Table28.B" style:family="table-column">
      <style:table-column-properties style:column-width="1.0299in"/>
    </style:style>
    <style:style style:name="Table28.C" style:family="table-column">
      <style:table-column-properties style:column-width="1.1597in"/>
    </style:style>
    <style:style style:name="Table28.D" style:family="table-column">
      <style:table-column-properties style:column-width="0.991in"/>
    </style:style>
    <style:style style:name="Table28.E" style:family="table-column">
      <style:table-column-properties style:column-width="0.9861in"/>
    </style:style>
    <style:style style:name="Table28.A1" style:family="table-cell">
      <style:table-cell-properties fo:padding="0.0382in" fo:border-left="0.05pt solid #000000" fo:border-right="none" fo:border-top="0.05pt solid #000000" fo:border-bottom="0.05pt solid #000000"/>
    </style:style>
    <style:style style:name="Table28.E1" style:family="table-cell">
      <style:table-cell-properties fo:padding="0.0382in" fo:border="0.05pt solid #000000"/>
    </style:style>
    <style:style style:name="Table29" style:family="table">
      <style:table-properties style:width="5.9375in" table:align="left"/>
    </style:style>
    <style:style style:name="Table29.A" style:family="table-column">
      <style:table-column-properties style:column-width="2.0368in"/>
    </style:style>
    <style:style style:name="Table29.B" style:family="table-column">
      <style:table-column-properties style:column-width="1.5681in"/>
    </style:style>
    <style:style style:name="Table29.C" style:family="table-column">
      <style:table-column-properties style:column-width="2.3326in"/>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30" style:family="table">
      <style:table-properties style:width="5.1049in" table:align="margins"/>
    </style:style>
    <style:style style:name="Table30.A" style:family="table-column">
      <style:table-column-properties style:column-width="5.1049in" style:rel-column-width="65535*"/>
    </style:style>
    <style:style style:name="Table30.A1" style:family="table-cell">
      <style:table-cell-properties fo:padding="0.0382in" fo:border="0.05pt solid #000000"/>
    </style:style>
    <style:style style:name="Table30.A2" style:family="table-cell">
      <style:table-cell-properties fo:padding="0.0382in" fo:border-left="0.05pt solid #000000" fo:border-right="0.05pt solid #000000" fo:border-top="none" fo:border-bottom="0.05pt solid #000000"/>
    </style:style>
    <style:style style:name="Table31" style:family="table">
      <style:table-properties style:width="5.1049in" table:align="margins"/>
    </style:style>
    <style:style style:name="Table31.A" style:family="table-column">
      <style:table-column-properties style:column-width="1.2625in" style:rel-column-width="16205*"/>
    </style:style>
    <style:style style:name="Table31.B" style:family="table-column">
      <style:table-column-properties style:column-width="1.4146in" style:rel-column-width="18159*"/>
    </style:style>
    <style:style style:name="Table31.C" style:family="table-column">
      <style:table-column-properties style:column-width="1.1014in" style:rel-column-width="14136*"/>
    </style:style>
    <style:style style:name="Table31.D" style:family="table-column">
      <style:table-column-properties style:column-width="1.3271in" style:rel-column-width="17035*"/>
    </style:style>
    <style:style style:name="Table31.A1" style:family="table-cell">
      <style:table-cell-properties fo:padding="0.0382in" fo:border-left="0.05pt solid #000000" fo:border-right="none" fo:border-top="0.05pt solid #000000" fo:border-bottom="0.05pt solid #000000"/>
    </style:style>
    <style:style style:name="Table31.D1" style:family="table-cell">
      <style:table-cell-properties fo:padding="0.0382in" fo:border="0.05pt solid #000000"/>
    </style:style>
    <style:style style:name="Table32" style:family="table">
      <style:table-properties style:width="5.1049in" table:align="margins"/>
    </style:style>
    <style:style style:name="Table32.A" style:family="table-column">
      <style:table-column-properties style:column-width="1.2764in" style:rel-column-width="16383*"/>
    </style:style>
    <style:style style:name="Table32.D" style:family="table-column">
      <style:table-column-properties style:column-width="1.2764in" style:rel-column-width="16386*"/>
    </style:style>
    <style:style style:name="Table32.A1" style:family="table-cell">
      <style:table-cell-properties fo:padding="0.0382in" fo:border-left="0.05pt solid #000000" fo:border-right="none" fo:border-top="0.05pt solid #000000" fo:border-bottom="0.05pt solid #000000"/>
    </style:style>
    <style:style style:name="Table32.D1" style:family="table-cell">
      <style:table-cell-properties fo:padding="0.0382in" fo:border="0.05pt solid #000000"/>
    </style:style>
    <style:style style:name="Table33" style:family="table">
      <style:table-properties style:width="5.1049in" table:align="margins"/>
    </style:style>
    <style:style style:name="Table33.A" style:family="table-column">
      <style:table-column-properties style:column-width="0.6375in" style:rel-column-width="8182*"/>
    </style:style>
    <style:style style:name="Table33.B" style:family="table-column">
      <style:table-column-properties style:column-width="0.6382in" style:rel-column-width="8191*"/>
    </style:style>
    <style:style style:name="Table33.E" style:family="table-column">
      <style:table-column-properties style:column-width="0.5653in" style:rel-column-width="7254*"/>
    </style:style>
    <style:style style:name="Table33.F" style:family="table-column">
      <style:table-column-properties style:column-width="0.7104in" style:rel-column-width="9119*"/>
    </style:style>
    <style:style style:name="Table33.H" style:family="table-column">
      <style:table-column-properties style:column-width="0.6403in" style:rel-column-width="8216*"/>
    </style:style>
    <style:style style:name="Table33.A1" style:family="table-cell">
      <style:table-cell-properties fo:padding="0.0382in" fo:border-left="0.05pt solid #000000" fo:border-right="none" fo:border-top="0.05pt solid #000000" fo:border-bottom="0.05pt solid #000000"/>
    </style:style>
    <style:style style:name="Table33.H1" style:family="table-cell">
      <style:table-cell-properties fo:padding="0.0382in" fo:border="0.05pt solid #000000"/>
    </style:style>
    <style:style style:name="Table34" style:family="table">
      <style:table-properties style:width="5.1049in" table:align="margins"/>
    </style:style>
    <style:style style:name="Table34.A" style:family="table-column">
      <style:table-column-properties style:column-width="2.5514in" style:rel-column-width="32758*"/>
    </style:style>
    <style:style style:name="Table34.B" style:family="table-column">
      <style:table-column-properties style:column-width="0.5438in" style:rel-column-width="6978*"/>
    </style:style>
    <style:style style:name="Table34.C" style:family="table-column">
      <style:table-column-properties style:column-width="0.7326in" style:rel-column-width="9405*"/>
    </style:style>
    <style:style style:name="Table34.D" style:family="table-column">
      <style:table-column-properties style:column-width="0.6382in" style:rel-column-width="8191*"/>
    </style:style>
    <style:style style:name="Table34.E" style:family="table-column">
      <style:table-column-properties style:column-width="0.6389in" style:rel-column-width="8203*"/>
    </style:style>
    <style:style style:name="Table34.A1" style:family="table-cell">
      <style:table-cell-properties fo:padding="0.0382in" fo:border-left="0.05pt solid #000000" fo:border-right="none" fo:border-top="0.05pt solid #000000" fo:border-bottom="0.05pt solid #000000"/>
    </style:style>
    <style:style style:name="Table34.E1" style:family="table-cell">
      <style:table-cell-properties fo:padding="0.0382in" fo:border="0.05pt solid #000000"/>
    </style:style>
    <style:style style:name="P1" style:family="paragraph" style:parent-style-name="Text_20_body" style:master-page-name="First_20_Page">
      <style:paragraph-properties fo:text-align="center" style:justify-single-word="false" style:page-number="auto"/>
      <style:text-properties fo:font-size="20pt" fo:font-weight="bold" style:font-size-asian="20pt" style:font-weight-asian="bold" style:font-size-complex="20pt" style:font-weight-complex="bold"/>
    </style:style>
    <style:style style:name="P2"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3" style:family="paragraph" style:parent-style-name="Text_20_body">
      <style:paragraph-properties fo:text-align="center" style:justify-single-word="false"/>
      <style:text-properties fo:font-size="20pt" fo:language="ru" fo:country="RU" fo:font-weight="bold" style:font-size-asian="20pt" style:font-weight-asian="bold" style:font-size-complex="20pt" style:font-weight-complex="bold"/>
    </style:style>
    <style:style style:name="P4" style:family="paragraph" style:parent-style-name="Text_20_body">
      <style:paragraph-properties fo:text-align="center" style:justify-single-word="false"/>
      <style:text-properties fo:language="ru" fo:country="RU"/>
    </style:style>
    <style:style style:name="P5" style:family="paragraph" style:parent-style-name="Text_20_body">
      <style:text-properties fo:language="en" fo:country="US"/>
    </style:style>
    <style:style style:name="P6" style:family="paragraph" style:parent-style-name="Text_20_body">
      <style:text-properties fo:language="ru" fo:country="RU"/>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6.6925in" style:type="right" style:leader-style="dotted" style:leader-text="."/>
        </style:tab-stops>
      </style:paragraph-properties>
    </style:style>
    <style:style style:name="P9" style:family="paragraph" style:parent-style-name="Contents_20_2">
      <style:paragraph-properties>
        <style:tab-stops>
          <style:tab-stop style:position="6.4957in" style:type="right" style:leader-style="dotted" style:leader-text="."/>
        </style:tab-stops>
      </style:paragraph-properties>
    </style:style>
    <style:style style:name="P10" style:family="paragraph" style:parent-style-name="Contents_20_3">
      <style:paragraph-properties>
        <style:tab-stops>
          <style:tab-stop style:position="6.2992in" style:type="right" style:leader-style="dotted" style:leader-text="."/>
        </style:tab-stops>
      </style:paragraph-properties>
    </style:style>
    <style:style style:name="P11" style:family="paragraph" style:parent-style-name="Heading_20_1">
      <style:paragraph-properties fo:break-before="page"/>
      <style:text-properties fo:language="ru" fo:country="RU"/>
    </style:style>
    <style:style style:name="P12" style:family="paragraph" style:parent-style-name="Text_20_body" style:list-style-name="L1"/>
    <style:style style:name="P13" style:family="paragraph" style:parent-style-name="Text_20_body" style:list-style-name="L1">
      <style:text-properties fo:language="ru" fo:country="RU"/>
    </style:style>
    <style:style style:name="P14" style:family="paragraph" style:parent-style-name="Footnote">
      <style:text-properties fo:language="en" fo:country="US"/>
    </style:style>
    <style:style style:name="P15" style:family="paragraph" style:parent-style-name="Heading_20_1">
      <style:paragraph-properties fo:break-before="page"/>
    </style:style>
    <style:style style:name="P16" style:family="paragraph" style:parent-style-name="Heading_20_2">
      <style:text-properties fo:language="en" fo:country="US"/>
    </style:style>
    <style:style style:name="P17" style:family="paragraph" style:parent-style-name="Text_20_body" style:list-style-name="L2"/>
    <style:style style:name="P18" style:family="paragraph" style:parent-style-name="Text_20_body" style:list-style-name="L2">
      <style:text-properties fo:language="ru" fo:country="RU"/>
    </style:style>
    <style:style style:name="P19" style:family="paragraph" style:parent-style-name="Text_20_body" style:list-style-name="L3">
      <style:text-properties fo:background-color="transparent"/>
    </style:style>
    <style:style style:name="P20" style:family="paragraph" style:parent-style-name="Text_20_body" style:list-style-name="L3">
      <style:text-properties fo:language="ru" fo:country="RU" fo:background-color="transparent"/>
    </style:style>
    <style:style style:name="P21" style:family="paragraph" style:parent-style-name="Text_20_body" style:list-style-name="L3">
      <style:text-properties fo:language="ru" fo:country="RU"/>
    </style:style>
    <style:style style:name="P22" style:family="paragraph" style:parent-style-name="Text_20_body" style:list-style-name="L3"/>
    <style:style style:name="P23" style:family="paragraph" style:parent-style-name="Heading_20_2">
      <style:text-properties fo:language="ru" fo:country="RU" fo:background-color="transparent"/>
    </style:style>
    <style:style style:name="P24" style:family="paragraph" style:parent-style-name="Text_20_body">
      <style:text-properties fo:background-color="transparent"/>
    </style:style>
    <style:style style:name="P25" style:family="paragraph" style:parent-style-name="Heading_20_2">
      <style:text-properties fo:language="ru" fo:country="RU"/>
    </style:style>
    <style:style style:name="P26" style:family="paragraph" style:parent-style-name="Text_20_body" style:list-style-name="L4"/>
    <style:style style:name="P27" style:family="paragraph" style:parent-style-name="Text_20_body" style:list-style-name="L5">
      <style:text-properties fo:language="en" fo:country="US"/>
    </style:style>
    <style:style style:name="P28" style:family="paragraph" style:parent-style-name="Text_20_body">
      <style:text-properties fo:language="ru" fo:country="RU" fo:font-style="italic" style:font-style-asian="italic" style:font-style-complex="italic"/>
    </style:style>
    <style:style style:name="P29" style:family="paragraph" style:parent-style-name="Text_20_body" style:list-style-name="L6">
      <style:text-properties fo:language="en" fo:country="US"/>
    </style:style>
    <style:style style:name="P30" style:family="paragraph" style:parent-style-name="Heading_20_2">
      <style:paragraph-properties fo:margin-left="0.4in" fo:margin-right="0in" fo:text-indent="-0.4in" style:auto-text-indent="false">
        <style:tab-stops/>
      </style:paragraph-properties>
    </style:style>
    <style:style style:name="P31" style:family="paragraph" style:parent-style-name="Text_20_body" style:list-style-name="L7"/>
    <style:style style:name="P32" style:family="paragraph" style:parent-style-name="Table_20_Contents">
      <style:text-properties fo:font-style="italic" fo:font-weight="bold" style:font-style-asian="italic" style:font-weight-asian="bold" style:font-style-complex="italic" style:font-weight-complex="bold"/>
    </style:style>
    <style:style style:name="P33" style:family="paragraph" style:parent-style-name="Table_20_Contents">
      <style:paragraph-properties fo:text-align="center" style:justify-single-word="false"/>
    </style:style>
    <style:style style:name="P34" style:family="paragraph" style:parent-style-name="Text_20_body" style:list-style-name="L8">
      <style:text-properties fo:language="en" fo:country="US"/>
    </style:style>
    <style:style style:name="P35" style:family="paragraph" style:parent-style-name="Text_20_body" style:list-style-name="L8">
      <style:text-properties fo:language="ru" fo:country="RU"/>
    </style:style>
    <style:style style:name="P36" style:family="paragraph" style:parent-style-name="Text_20_body">
      <style:text-properties fo:language="ru" fo:country="RU" fo:background-color="transparent"/>
    </style:style>
    <style:style style:name="P37" style:family="paragraph" style:parent-style-name="Table_20_Contents">
      <style:text-properties fo:language="ru" fo:country="RU" fo:font-style="italic" fo:font-weight="bold" style:font-style-asian="italic" style:font-weight-asian="bold" style:font-style-complex="italic" style:font-weight-complex="bold"/>
    </style:style>
    <style:style style:name="P38" style:family="paragraph" style:parent-style-name="Table_20_Contents">
      <style:text-properties fo:font-style="italic" style:font-style-asian="italic" style:font-style-complex="italic"/>
    </style:style>
    <style:style style:name="P39" style:family="paragraph" style:parent-style-name="Table_20_Contents">
      <style:text-properties fo:language="en" fo:country="US" fo:font-weight="bold" style:font-weight-asian="bold" style:font-weight-complex="bold"/>
    </style:style>
    <style:style style:name="P40" style:family="paragraph" style:parent-style-name="Table_20_Contents">
      <style:text-properties fo:language="en" fo:country="US"/>
    </style:style>
    <style:style style:name="P41" style:family="paragraph" style:parent-style-name="Table_20_Contents">
      <style:text-properties fo:language="ru" fo:country="RU"/>
    </style:style>
    <style:style style:name="P42" style:family="paragraph" style:parent-style-name="Standard">
      <style:text-properties fo:language="ru" fo:country="RU" fo:background-color="transparent"/>
    </style:style>
    <style:style style:name="P43" style:family="paragraph" style:parent-style-name="Standard">
      <style:text-properties fo:language="ru" fo:country="RU" officeooo:paragraph-rsid="002a0f53" fo:background-color="transparent"/>
    </style:style>
    <style:style style:name="P44" style:family="paragraph" style:parent-style-name="Table_20_Contents">
      <style:text-properties fo:language="ru" fo:country="RU" fo:font-style="italic" fo:font-weight="bold" officeooo:paragraph-rsid="002a0f53" style:font-style-asian="italic" style:font-weight-asian="bold" style:font-style-complex="italic" style:font-weight-complex="bold"/>
    </style:style>
    <style:style style:name="P45" style:family="paragraph" style:parent-style-name="Table_20_Contents">
      <style:text-properties fo:font-style="italic" officeooo:paragraph-rsid="002a0f53" style:font-style-asian="italic" style:font-style-complex="italic"/>
    </style:style>
    <style:style style:name="P46" style:family="paragraph" style:parent-style-name="Table_20_Contents">
      <style:text-properties fo:language="en" fo:country="US" fo:font-weight="bold" officeooo:paragraph-rsid="002a0f53" style:font-weight-asian="bold" style:font-weight-complex="bold"/>
    </style:style>
    <style:style style:name="P47" style:family="paragraph" style:parent-style-name="Table_20_Contents">
      <style:text-properties fo:language="ru" fo:country="RU" officeooo:paragraph-rsid="002a0f53"/>
    </style:style>
    <style:style style:name="P48" style:family="paragraph" style:parent-style-name="Table_20_Contents">
      <style:text-properties officeooo:paragraph-rsid="002a0f53"/>
    </style:style>
    <style:style style:name="P49" style:family="paragraph" style:parent-style-name="Table_20_Contents">
      <style:text-properties fo:language="en" fo:country="US" officeooo:rsid="002e08dd" officeooo:paragraph-rsid="002e08dd"/>
    </style:style>
    <style:style style:name="P50" style:family="paragraph" style:parent-style-name="Table_20_Contents">
      <style:text-properties fo:language="en" fo:country="US" officeooo:paragraph-rsid="002a0f53"/>
    </style:style>
    <style:style style:name="P51" style:family="paragraph" style:parent-style-name="Standard">
      <style:text-properties fo:background-color="transparent"/>
    </style:style>
    <style:style style:name="P52" style:family="paragraph" style:parent-style-name="Table_20_Contents">
      <style:text-properties fo:language="ru" fo:country="RU" fo:font-style="italic" style:font-style-asian="italic" style:font-style-complex="italic"/>
    </style:style>
    <style:style style:name="P53" style:family="paragraph" style:parent-style-name="Standard">
      <style:text-properties fo:language="ru" fo:country="RU"/>
    </style:style>
    <style:style style:name="P54" style:family="paragraph" style:parent-style-name="Text_20_body" style:list-style-name="L9">
      <style:text-properties fo:language="ru" fo:country="RU"/>
    </style:style>
    <style:style style:name="P55" style:family="paragraph" style:parent-style-name="Heading_20_1">
      <style:text-properties fo:language="ru" fo:country="RU"/>
    </style:style>
    <style:style style:name="P56" style:family="paragraph" style:parent-style-name="Text_20_body" style:list-style-name="L10">
      <style:text-properties fo:language="ru" fo:country="RU"/>
    </style:style>
    <style:style style:name="P57" style:family="paragraph" style:parent-style-name="Text_20_body" style:list-style-name="L10"/>
    <style:style style:name="P58" style:family="paragraph" style:parent-style-name="Text_20_body">
      <style:text-properties fo:language="ru" fo:country="RU" fo:font-weight="normal" style:font-weight-asian="normal" style:font-weight-complex="normal"/>
    </style:style>
    <style:style style:name="P59" style:family="paragraph" style:parent-style-name="Text_20_body">
      <style:text-properties officeooo:paragraph-rsid="0036ebe0"/>
    </style:style>
    <style:style style:name="P60" style:family="paragraph" style:parent-style-name="Text_20_body">
      <style:text-properties fo:language="ru" fo:country="RU" officeooo:rsid="00384978" officeooo:paragraph-rsid="00384978"/>
    </style:style>
    <style:style style:name="P61" style:family="paragraph" style:parent-style-name="Text_20_body">
      <style:text-properties fo:language="ru" fo:country="RU" officeooo:rsid="0041c32d" officeooo:paragraph-rsid="0041c32d"/>
    </style:style>
    <style:style style:name="P62" style:family="paragraph" style:parent-style-name="Text_20_body">
      <style:text-properties fo:language="ru" fo:country="RU" officeooo:rsid="0039b9c3" officeooo:paragraph-rsid="004659fa"/>
    </style:style>
    <style:style style:name="P63" style:family="paragraph" style:parent-style-name="Text_20_body">
      <style:text-properties fo:language="ru" fo:country="RU" officeooo:rsid="0039b9c3" officeooo:paragraph-rsid="003b71ac"/>
    </style:style>
    <style:style style:name="P64" style:family="paragraph" style:parent-style-name="Text_20_body">
      <style:text-properties officeooo:paragraph-rsid="003b71ac"/>
    </style:style>
    <style:style style:name="P65" style:family="paragraph" style:parent-style-name="Table_20_Contents">
      <style:text-properties officeooo:paragraph-rsid="003b71ac"/>
    </style:style>
    <style:style style:name="P66" style:family="paragraph" style:parent-style-name="Table_20_Contents">
      <style:text-properties officeooo:rsid="003b71ac" officeooo:paragraph-rsid="003b71ac"/>
    </style:style>
    <style:style style:name="P67" style:family="paragraph" style:parent-style-name="Table_20_Contents">
      <style:text-properties officeooo:rsid="00493535" officeooo:paragraph-rsid="00493535"/>
    </style:style>
    <style:style style:name="P68" style:family="paragraph" style:parent-style-name="Table_20_Contents">
      <style:text-properties officeooo:paragraph-rsid="004b5131"/>
    </style:style>
    <style:style style:name="P69" style:family="paragraph" style:parent-style-name="Heading_20_3">
      <style:text-properties fo:language="ru" fo:country="RU"/>
    </style:style>
    <style:style style:name="P70" style:family="paragraph" style:parent-style-name="Text_20_body" style:list-style-name="L11">
      <style:text-properties fo:language="ru" fo:country="RU"/>
    </style:style>
    <style:style style:name="P71" style:family="paragraph" style:parent-style-name="Text_20_body" style:list-style-name="L12">
      <style:text-properties fo:language="ru" fo:country="RU"/>
    </style:style>
    <style:style style:name="P72" style:family="paragraph" style:parent-style-name="Text_20_body" style:list-style-name="L13">
      <style:text-properties fo:language="ru" fo:country="RU"/>
    </style:style>
    <style:style style:name="P73" style:family="paragraph" style:parent-style-name="Table_20_Contents">
      <style:text-properties style:font-name="Courier New" fo:font-weight="bold" style:font-weight-asian="bold" style:font-weight-complex="bold"/>
    </style:style>
    <style:style style:name="P74" style:family="paragraph" style:parent-style-name="Table_20_Contents">
      <style:text-properties style:font-name="Courier New" fo:language="en" fo:country="US" fo:font-weight="bold" style:font-weight-asian="bold" style:font-weight-complex="bold"/>
    </style:style>
    <style:style style:name="P75" style:family="paragraph" style:parent-style-name="Heading_20_3">
      <style:text-properties fo:language="en" fo:country="US"/>
    </style:style>
    <style:style style:name="P76" style:family="paragraph" style:parent-style-name="Standard">
      <style:text-properties officeooo:paragraph-rsid="00181d45"/>
    </style:style>
    <style:style style:name="P77" style:family="paragraph" style:parent-style-name="Heading_20_2">
      <style:text-properties fo:language="ru" fo:country="RU" fo:font-style="italic" officeooo:rsid="00181d45" officeooo:paragraph-rsid="00181d45" style:font-style-asian="italic" style:font-style-complex="italic"/>
    </style:style>
    <style:style style:name="P78" style:family="paragraph" style:parent-style-name="Text_20_body">
      <style:text-properties fo:language="ru" fo:country="RU" fo:font-style="normal" officeooo:rsid="00181d45" officeooo:paragraph-rsid="00181d45" style:font-style-asian="normal" style:font-style-complex="normal"/>
    </style:style>
    <style:style style:name="P79" style:family="paragraph" style:parent-style-name="Text_20_body">
      <style:text-properties fo:font-style="normal" officeooo:paragraph-rsid="00181d45" style:font-style-asian="normal" style:font-style-complex="normal"/>
    </style:style>
    <style:style style:name="P80" style:family="paragraph" style:parent-style-name="Text_20_body" style:list-style-name="L14">
      <style:text-properties fo:font-style="normal" officeooo:paragraph-rsid="00181d45" style:font-style-asian="normal" style:font-style-complex="normal"/>
    </style:style>
    <style:style style:name="P81" style:family="paragraph" style:parent-style-name="Text_20_body" style:list-style-name="L14">
      <style:text-properties fo:language="ru" fo:country="RU" fo:font-style="normal" officeooo:rsid="00181d45" officeooo:paragraph-rsid="00181d45" style:font-style-asian="normal" style:font-style-complex="normal"/>
    </style:style>
    <style:style style:name="P82" style:family="paragraph" style:parent-style-name="Text_20_body">
      <style:paragraph-properties fo:margin-top="0in" fo:margin-bottom="0.0437in" style:contextual-spacing="false"/>
      <style:text-properties fo:font-style="normal" officeooo:paragraph-rsid="00181d45" style:font-style-asian="normal" style:font-style-complex="normal"/>
    </style:style>
    <style:style style:name="P83" style:family="paragraph" style:parent-style-name="Text_20_body" style:list-style-name="L14">
      <style:paragraph-properties fo:margin-top="0in" fo:margin-bottom="0.0437in" style:contextual-spacing="false"/>
      <style:text-properties fo:font-style="normal" officeooo:paragraph-rsid="00181d45" style:font-style-asian="normal" style:font-style-complex="normal"/>
    </style:style>
    <style:style style:name="P84" style:family="paragraph" style:parent-style-name="Text_20_body">
      <style:paragraph-properties fo:margin-top="0in" fo:margin-bottom="0.0437in" style:contextual-spacing="false"/>
      <style:text-properties fo:font-style="normal" officeooo:paragraph-rsid="0019e34f" style:font-style-asian="normal" style:font-style-complex="normal"/>
    </style:style>
    <style:style style:name="P85" style:family="paragraph" style:parent-style-name="Text_20_body" style:list-style-name="L15">
      <style:paragraph-properties fo:margin-top="0in" fo:margin-bottom="0.0437in" style:contextual-spacing="false"/>
      <style:text-properties fo:font-style="normal" officeooo:paragraph-rsid="0019e34f" style:font-style-asian="normal" style:font-style-complex="normal"/>
    </style:style>
    <style:style style:name="P86" style:family="paragraph" style:parent-style-name="Text_20_body" style:list-style-name="L15">
      <style:paragraph-properties fo:margin-top="0in" fo:margin-bottom="0.0437in" style:contextual-spacing="false"/>
      <style:text-properties fo:language="ru" fo:country="RU" fo:font-style="normal" officeooo:rsid="0019e34f" officeooo:paragraph-rsid="0019e34f" style:font-style-asian="normal" style:font-style-complex="normal"/>
    </style:style>
    <style:style style:name="P87" style:family="paragraph" style:parent-style-name="Text_20_body">
      <style:text-properties fo:font-style="normal" officeooo:paragraph-rsid="002015f6" style:font-style-asian="normal" style:font-style-complex="normal"/>
    </style:style>
    <style:style style:name="P88" style:family="paragraph" style:parent-style-name="Text_20_body">
      <style:text-properties fo:language="ru" fo:country="RU" fo:font-style="normal" fo:font-weight="normal" officeooo:rsid="002015f6" officeooo:paragraph-rsid="002015f6" style:font-style-asian="normal" style:font-weight-asian="normal" style:font-style-complex="normal" style:font-weight-complex="normal"/>
    </style:style>
    <style:style style:name="P89" style:family="paragraph" style:parent-style-name="Text_20_body">
      <style:text-properties style:font-name="Courier New" fo:language="ru" fo:country="RU" fo:font-style="normal" fo:font-weight="bold" officeooo:rsid="002015f6" officeooo:paragraph-rsid="002015f6" style:font-style-asian="normal" style:font-weight-asian="bold" style:font-style-complex="normal" style:font-weight-complex="bold"/>
    </style:style>
    <style:style style:name="P90" style:family="paragraph" style:parent-style-name="Text_20_body">
      <style:text-properties style:font-name="Times New Roman1" fo:language="ru" fo:country="RU" fo:font-style="normal" fo:font-weight="normal" officeooo:rsid="002015f6" officeooo:paragraph-rsid="002015f6" style:font-style-asian="normal" style:font-weight-asian="normal" style:font-style-complex="normal" style:font-weight-complex="normal"/>
    </style:style>
    <style:style style:name="P91" style:family="paragraph" style:parent-style-name="Heading_20_1">
      <style:text-properties fo:language="ru" fo:country="RU" officeooo:rsid="0066fe48" officeooo:paragraph-rsid="0069f9c3"/>
    </style:style>
    <style:style style:name="P92" style:family="paragraph" style:parent-style-name="Heading_20_2">
      <style:text-properties officeooo:rsid="00688607" officeooo:paragraph-rsid="0069f9c3"/>
    </style:style>
    <style:style style:name="P93" style:family="paragraph" style:parent-style-name="Text_20_body">
      <style:text-properties fo:language="ru" fo:country="RU" officeooo:rsid="0066fe48" officeooo:paragraph-rsid="0069f9c3"/>
    </style:style>
    <style:style style:name="P94" style:family="paragraph" style:parent-style-name="Text_20_body" style:list-style-name="L16">
      <style:text-properties officeooo:rsid="0066fe48" officeooo:paragraph-rsid="0069f9c3"/>
    </style:style>
    <style:style style:name="P95" style:family="paragraph" style:parent-style-name="Text_20_body">
      <style:text-properties officeooo:rsid="0066fe48" officeooo:paragraph-rsid="0069f9c3"/>
    </style:style>
    <style:style style:name="P96" style:family="paragraph" style:parent-style-name="Text_20_body">
      <style:text-properties officeooo:paragraph-rsid="0069f9c3"/>
    </style:style>
    <style:style style:name="P97" style:family="paragraph" style:parent-style-name="Heading_20_2">
      <style:text-properties officeooo:rsid="006f228d" officeooo:paragraph-rsid="0069f9c3"/>
    </style:style>
    <style:style style:name="P98" style:family="paragraph" style:parent-style-name="Text_20_body">
      <style:text-properties officeooo:rsid="00688607" officeooo:paragraph-rsid="0069f9c3"/>
    </style:style>
    <style:style style:name="P99" style:family="paragraph" style:parent-style-name="Text_20_body">
      <style:text-properties officeooo:rsid="006f228d" officeooo:paragraph-rsid="0069f9c3"/>
    </style:style>
    <style:style style:name="P100" style:family="paragraph" style:parent-style-name="Text_20_body">
      <style:text-properties officeooo:rsid="00697d5c" officeooo:paragraph-rsid="0069f9c3"/>
    </style:style>
    <style:style style:name="P101" style:family="paragraph" style:parent-style-name="Text_20_body" style:list-style-name="L17">
      <style:text-properties officeooo:rsid="00697d5c" officeooo:paragraph-rsid="0069f9c3"/>
    </style:style>
    <style:style style:name="P102" style:family="paragraph" style:parent-style-name="Text_20_body" style:list-style-name="L17">
      <style:text-properties officeooo:paragraph-rsid="0069f9c3"/>
    </style:style>
    <style:style style:name="P103" style:family="paragraph" style:parent-style-name="Text_20_body" style:list-style-name="L17">
      <style:text-properties officeooo:rsid="006f228d" officeooo:paragraph-rsid="0069f9c3"/>
    </style:style>
    <style:style style:name="P104" style:family="paragraph" style:parent-style-name="Text_20_body">
      <style:text-properties officeooo:rsid="00705edc" officeooo:paragraph-rsid="0069f9c3"/>
    </style:style>
    <style:style style:name="P105" style:family="paragraph" style:parent-style-name="Text_20_body" style:list-style-name="L18">
      <style:text-properties officeooo:rsid="00697d5c" officeooo:paragraph-rsid="0069f9c3"/>
    </style:style>
    <style:style style:name="P106" style:family="paragraph" style:parent-style-name="Text_20_body" style:list-style-name="L18">
      <style:text-properties officeooo:rsid="006a41e1" officeooo:paragraph-rsid="0069f9c3"/>
    </style:style>
    <style:style style:name="P107" style:family="paragraph" style:parent-style-name="Heading_20_2">
      <style:text-properties officeooo:rsid="007ca93e" officeooo:paragraph-rsid="0069f9c3"/>
    </style:style>
    <style:style style:name="P108" style:family="paragraph" style:parent-style-name="Text_20_body">
      <style:text-properties officeooo:rsid="007c84ce" officeooo:paragraph-rsid="0069f9c3"/>
    </style:style>
    <style:style style:name="P109" style:family="paragraph" style:parent-style-name="Text_20_body" style:list-style-name="L19">
      <style:text-properties fo:font-weight="normal" officeooo:rsid="007ca93e" officeooo:paragraph-rsid="0069f9c3" style:font-weight-asian="normal" style:font-weight-complex="normal"/>
    </style:style>
    <style:style style:name="P110" style:family="paragraph" style:parent-style-name="Text_20_body" style:list-style-name="L19">
      <style:text-properties officeooo:rsid="007ca93e" officeooo:paragraph-rsid="0069f9c3"/>
    </style:style>
    <style:style style:name="P111" style:family="paragraph" style:parent-style-name="Text_20_body" style:list-style-name="L19">
      <style:text-properties officeooo:paragraph-rsid="0069f9c3"/>
    </style:style>
    <style:style style:name="P112" style:family="paragraph" style:parent-style-name="Text_20_body">
      <style:text-properties officeooo:rsid="007ca93e" officeooo:paragraph-rsid="0069f9c3"/>
    </style:style>
    <style:style style:name="P113" style:family="paragraph" style:parent-style-name="Heading_20_2">
      <style:text-properties officeooo:paragraph-rsid="0069f9c3"/>
    </style:style>
    <style:style style:name="P114" style:family="paragraph" style:parent-style-name="Heading_20_3">
      <style:text-properties officeooo:rsid="00714b46" officeooo:paragraph-rsid="00714b46"/>
    </style:style>
    <style:style style:name="P115" style:family="paragraph" style:parent-style-name="Text_20_body">
      <style:text-properties officeooo:paragraph-rsid="0077091e"/>
    </style:style>
    <style:style style:name="P116" style:family="paragraph" style:parent-style-name="Heading_20_4">
      <style:text-properties officeooo:rsid="00714b46" officeooo:paragraph-rsid="0071a9e8"/>
    </style:style>
    <style:style style:name="P117" style:family="paragraph" style:parent-style-name="Table_20_Heading">
      <style:text-properties officeooo:rsid="0071a9e8" officeooo:paragraph-rsid="0071a9e8"/>
    </style:style>
    <style:style style:name="P118" style:family="paragraph" style:parent-style-name="Table_20_Heading">
      <style:text-properties officeooo:rsid="0074662d" officeooo:paragraph-rsid="0074662d"/>
    </style:style>
    <style:style style:name="P119" style:family="paragraph" style:parent-style-name="Table_20_Heading">
      <style:text-properties officeooo:rsid="0071c82e" officeooo:paragraph-rsid="0071c82e"/>
    </style:style>
    <style:style style:name="P120" style:family="paragraph" style:parent-style-name="Table_20_Heading">
      <style:text-properties officeooo:rsid="00739261" officeooo:paragraph-rsid="00739261"/>
    </style:style>
    <style:style style:name="P121" style:family="paragraph" style:parent-style-name="Table_20_Contents">
      <style:paragraph-properties fo:text-align="center" style:justify-single-word="false"/>
      <style:text-properties officeooo:rsid="0074662d" officeooo:paragraph-rsid="0074662d"/>
    </style:style>
    <style:style style:name="P122" style:family="paragraph" style:parent-style-name="Table_20_Contents">
      <style:paragraph-properties fo:text-align="center" style:justify-single-word="false"/>
      <style:text-properties officeooo:rsid="0071a9e8" officeooo:paragraph-rsid="0071a9e8"/>
    </style:style>
    <style:style style:name="P123" style:family="paragraph" style:parent-style-name="Table_20_Contents">
      <style:paragraph-properties fo:text-align="center" style:justify-single-word="false"/>
      <style:text-properties officeooo:rsid="00739261" officeooo:paragraph-rsid="00739261"/>
    </style:style>
    <style:style style:name="P124" style:family="paragraph" style:parent-style-name="Table_20_Contents">
      <style:paragraph-properties fo:text-align="center" style:justify-single-word="false"/>
      <style:text-properties style:font-name="DejaVu Sans Mono" officeooo:rsid="00739261" officeooo:paragraph-rsid="00739261"/>
    </style:style>
    <style:style style:name="P125" style:family="paragraph" style:parent-style-name="Table_20_Contents">
      <style:paragraph-properties fo:text-align="center" style:justify-single-word="false"/>
      <style:text-properties officeooo:rsid="0071c82e" officeooo:paragraph-rsid="0071c82e"/>
    </style:style>
    <style:style style:name="P126" style:family="paragraph" style:parent-style-name="Heading_20_4">
      <style:text-properties officeooo:rsid="0073b8f9" officeooo:paragraph-rsid="0073b8f9"/>
    </style:style>
    <style:style style:name="P127" style:family="paragraph" style:parent-style-name="Text_20_body">
      <style:text-properties officeooo:rsid="0073b8f9" officeooo:paragraph-rsid="0073b8f9"/>
    </style:style>
    <style:style style:name="P128" style:family="paragraph" style:parent-style-name="Heading_20_3">
      <style:text-properties officeooo:rsid="00714b46" officeooo:paragraph-rsid="0077091e"/>
    </style:style>
    <style:style style:name="P129" style:family="paragraph" style:parent-style-name="Text_20_body">
      <style:text-properties officeooo:rsid="0078813b" officeooo:paragraph-rsid="0078813b"/>
    </style:style>
    <style:style style:name="P130" style:family="paragraph" style:parent-style-name="Table_20_Contents" style:list-style-name="L20">
      <style:text-properties fo:language="ru" fo:country="RU" officeooo:rsid="0078f10c" officeooo:paragraph-rsid="0078f10c"/>
    </style:style>
    <style:style style:name="P131" style:family="paragraph" style:parent-style-name="Table_20_Contents" style:list-style-name="L20">
      <style:text-properties fo:language="ru" fo:country="RU" officeooo:rsid="0078647c" officeooo:paragraph-rsid="0078f10c"/>
    </style:style>
    <style:style style:name="P132" style:family="paragraph" style:parent-style-name="Table_20_Contents">
      <style:text-properties fo:language="ru" fo:country="RU" officeooo:rsid="0078647c" officeooo:paragraph-rsid="0078f10c"/>
    </style:style>
    <style:style style:name="P133" style:family="paragraph" style:parent-style-name="Table_20_Contents">
      <style:text-properties fo:language="ru" fo:country="RU" officeooo:rsid="0078f10c" officeooo:paragraph-rsid="0078f10c"/>
    </style:style>
    <style:style style:name="P134" style:family="paragraph" style:parent-style-name="Heading_20_4">
      <style:text-properties officeooo:rsid="0079f00b" officeooo:paragraph-rsid="0079f00b"/>
    </style:style>
    <style:style style:name="P135" style:family="paragraph" style:parent-style-name="Table_20_Contents">
      <style:text-properties fo:language="ru" fo:country="RU" officeooo:rsid="0079f00b" officeooo:paragraph-rsid="0079f00b"/>
    </style:style>
    <style:style style:name="P136" style:family="paragraph" style:parent-style-name="Heading_20_2">
      <style:text-properties officeooo:paragraph-rsid="004bab61"/>
    </style:style>
    <style:style style:name="P137" style:family="paragraph" style:parent-style-name="Text_20_body">
      <style:text-properties officeooo:paragraph-rsid="004bab61"/>
    </style:style>
    <style:style style:name="P138" style:family="paragraph" style:parent-style-name="Text_20_body">
      <style:text-properties officeooo:paragraph-rsid="003fe079"/>
    </style:style>
    <style:style style:name="P139" style:family="paragraph" style:parent-style-name="Table_20_Contents">
      <style:paragraph-properties fo:keep-together="always"/>
      <style:text-properties fo:language="ru" fo:country="RU" fo:font-style="italic" fo:font-weight="bold" style:font-style-asian="italic" style:font-weight-asian="bold" style:font-style-complex="italic" style:font-weight-complex="bold"/>
    </style:style>
    <style:style style:name="P140" style:family="paragraph" style:parent-style-name="Table_20_Contents">
      <style:paragraph-properties fo:keep-together="always"/>
      <style:text-properties fo:font-style="italic" style:font-style-asian="italic" style:font-style-complex="italic"/>
    </style:style>
    <style:style style:name="P141" style:family="paragraph" style:parent-style-name="Table_20_Contents">
      <style:paragraph-properties fo:keep-together="always"/>
      <style:text-properties fo:language="en" fo:country="US" fo:font-weight="bold" style:font-weight-asian="bold" style:font-weight-complex="bold"/>
    </style:style>
    <style:style style:name="P142" style:family="paragraph" style:parent-style-name="Table_20_Contents">
      <style:paragraph-properties fo:keep-together="always"/>
      <style:text-properties fo:language="ru" fo:country="RU"/>
    </style:style>
    <style:style style:name="P143" style:family="paragraph" style:parent-style-name="Table_20_Contents">
      <style:paragraph-properties fo:keep-together="always"/>
      <style:text-properties fo:language="ru" fo:country="RU" fo:background-color="transparent"/>
    </style:style>
    <style:style style:name="P144" style:family="paragraph" style:parent-style-name="Table_20_Contents">
      <style:paragraph-properties fo:keep-together="always"/>
      <style:text-properties fo:language="en" fo:country="US" fo:font-weight="bold" officeooo:rsid="0015de58" officeooo:paragraph-rsid="0015de58" style:font-weight-asian="bold" style:font-weight-complex="bold"/>
    </style:style>
    <style:style style:name="P145" style:family="paragraph" style:parent-style-name="Table_20_Contents">
      <style:paragraph-properties fo:keep-together="always"/>
      <style:text-properties fo:language="ru" fo:country="RU" officeooo:rsid="0015de58" officeooo:paragraph-rsid="0015de58"/>
    </style:style>
    <style:style style:name="P146" style:family="paragraph" style:parent-style-name="Table_20_Contents">
      <style:paragraph-properties fo:keep-together="always"/>
      <style:text-properties fo:language="en" fo:country="US" fo:font-weight="bold" officeooo:rsid="002bb013" officeooo:paragraph-rsid="004c5b47" style:font-weight-asian="bold" style:font-weight-complex="bold"/>
    </style:style>
    <style:style style:name="P147" style:family="paragraph" style:parent-style-name="Table_20_Contents">
      <style:paragraph-properties fo:keep-together="always"/>
      <style:text-properties fo:language="en" fo:country="US" fo:font-weight="bold" officeooo:rsid="002bb013" officeooo:paragraph-rsid="002bb013" style:font-weight-asian="bold" style:font-weight-complex="bold"/>
    </style:style>
    <style:style style:name="P148" style:family="paragraph" style:parent-style-name="Table_20_Contents">
      <style:paragraph-properties fo:keep-together="always"/>
      <style:text-properties fo:language="ru" fo:country="RU" officeooo:rsid="002bb013" officeooo:paragraph-rsid="002bb013"/>
    </style:style>
    <style:style style:name="P149" style:family="paragraph" style:parent-style-name="Table_20_Contents">
      <style:paragraph-properties fo:keep-together="always"/>
      <style:text-properties fo:language="ru" fo:country="RU" officeooo:rsid="0050061a" officeooo:paragraph-rsid="0050061a"/>
    </style:style>
    <style:style style:name="P150" style:family="paragraph" style:parent-style-name="Table_20_Contents">
      <style:text-properties fo:language="en" fo:country="US" fo:font-weight="bold" officeooo:rsid="0066ca9b" officeooo:paragraph-rsid="0066ca9b" style:font-weight-asian="bold" style:font-weight-complex="bold"/>
    </style:style>
    <style:style style:name="P151" style:family="paragraph" style:parent-style-name="Table_20_Contents">
      <style:text-properties fo:language="ru" fo:country="RU" officeooo:rsid="0066ca9b" officeooo:paragraph-rsid="0066ca9b"/>
    </style:style>
    <style:style style:name="P152" style:family="paragraph" style:parent-style-name="Table_20_Contents">
      <style:text-properties fo:language="ru" fo:country="RU" officeooo:rsid="0078b6fa" officeooo:paragraph-rsid="0078b6fa"/>
    </style:style>
    <style:style style:name="P153" style:family="paragraph" style:parent-style-name="Table_20_Contents">
      <style:text-properties fo:language="ru" fo:country="RU" officeooo:rsid="0078647c" officeooo:paragraph-rsid="0078647c"/>
    </style:style>
    <style:style style:name="P154" style:family="paragraph" style:parent-style-name="Table_20_Contents">
      <style:text-properties fo:language="ru" fo:country="RU" officeooo:rsid="0078647c" officeooo:paragraph-rsid="006d46c4"/>
    </style:style>
    <style:style style:name="P155" style:family="paragraph" style:parent-style-name="Table_20_Contents">
      <style:text-properties fo:language="ru" fo:country="RU" officeooo:rsid="0066ca9b" officeooo:paragraph-rsid="006ef3be"/>
    </style:style>
    <style:style style:name="P156" style:family="paragraph" style:parent-style-name="Table_20_Contents">
      <style:text-properties fo:language="ru" fo:country="RU" officeooo:rsid="006b1cca" officeooo:paragraph-rsid="006ef3be"/>
    </style:style>
    <style:style style:name="P157" style:family="paragraph" style:parent-style-name="Table_20_Contents">
      <style:text-properties fo:language="ru" fo:country="RU" officeooo:rsid="006b1cca" officeooo:paragraph-rsid="006b1cca"/>
    </style:style>
    <style:style style:name="P158" style:family="paragraph" style:parent-style-name="Standard">
      <style:paragraph-properties fo:break-before="page"/>
    </style:style>
    <style:style style:name="P159" style:family="paragraph" style:parent-style-name="Standard" style:list-style-name="L21"/>
    <style:style style:name="P160" style:family="paragraph" style:parent-style-name="Text_20_body" style:list-style-name="L22"/>
    <style:style style:name="P161" style:family="paragraph" style:parent-style-name="Text_20_body">
      <style:text-properties officeooo:paragraph-rsid="0032c361"/>
    </style:style>
    <style:style style:name="P162" style:family="paragraph" style:parent-style-name="Text_20_body" style:list-style-name="L23"/>
    <style:style style:name="P163" style:family="paragraph" style:parent-style-name="Text_20_body" style:list-style-name="L24"/>
    <style:style style:name="P164" style:family="paragraph" style:parent-style-name="Heading_20_2">
      <style:text-properties officeooo:rsid="00579205" officeooo:paragraph-rsid="00579205"/>
    </style:style>
    <style:style style:name="P165" style:family="paragraph" style:parent-style-name="Text_20_body">
      <style:text-properties officeooo:rsid="005baf30" officeooo:paragraph-rsid="005dce97"/>
    </style:style>
    <style:style style:name="P166" style:family="paragraph" style:parent-style-name="Heading_20_3">
      <style:text-properties officeooo:rsid="005dce97" officeooo:paragraph-rsid="005dce97"/>
    </style:style>
    <style:style style:name="P167" style:family="paragraph" style:parent-style-name="Text_20_body">
      <style:text-properties officeooo:rsid="005f797d" officeooo:paragraph-rsid="005f797d"/>
    </style:style>
    <style:style style:name="P168" style:family="paragraph" style:parent-style-name="Text_20_body" style:list-style-name="L25">
      <style:text-properties officeooo:rsid="005dce97" officeooo:paragraph-rsid="005dce97"/>
    </style:style>
    <style:style style:name="P169" style:family="paragraph" style:parent-style-name="Text_20_body" style:list-style-name="L25">
      <style:text-properties officeooo:rsid="005dce97" officeooo:paragraph-rsid="005f797d"/>
    </style:style>
    <style:style style:name="P170" style:family="paragraph" style:parent-style-name="Text_20_body">
      <style:text-properties fo:font-weight="normal" officeooo:rsid="006241d4" officeooo:paragraph-rsid="006241d4" style:font-weight-asian="normal" style:font-weight-complex="normal"/>
    </style:style>
    <style:style style:name="P171" style:family="paragraph" style:parent-style-name="Text_20_body" style:list-style-name="L26">
      <style:text-properties officeooo:rsid="006241d4" officeooo:paragraph-rsid="006241d4"/>
    </style:style>
    <style:style style:name="P172" style:family="paragraph" style:parent-style-name="Text_20_body" style:list-style-name="L26">
      <style:text-properties officeooo:rsid="00641275" officeooo:paragraph-rsid="00641275"/>
    </style:style>
    <style:style style:name="P173" style:family="paragraph" style:parent-style-name="Heading_20_3">
      <style:text-properties officeooo:rsid="00646472" officeooo:paragraph-rsid="00646472"/>
    </style:style>
    <style:style style:name="P174" style:family="paragraph" style:parent-style-name="Text_20_body">
      <style:text-properties officeooo:rsid="00657404" officeooo:paragraph-rsid="00657404"/>
    </style:style>
    <style:style style:name="P175" style:family="paragraph" style:parent-style-name="Heading_20_3">
      <style:text-properties officeooo:rsid="006585d4" officeooo:paragraph-rsid="006585d4"/>
    </style:style>
    <style:style style:name="P176" style:family="paragraph" style:parent-style-name="Text_20_body">
      <style:text-properties officeooo:rsid="006585d4" officeooo:paragraph-rsid="006585d4"/>
    </style:style>
    <style:style style:name="P177" style:family="paragraph" style:parent-style-name="Text_20_body">
      <style:text-properties officeooo:paragraph-rsid="00579205"/>
    </style:style>
    <style:style style:name="P178" style:family="paragraph" style:parent-style-name="Text_20_body">
      <style:text-properties fo:language="ru" fo:country="RU" officeooo:paragraph-rsid="003fe079"/>
    </style:style>
    <style:style style:name="P179" style:family="paragraph" style:parent-style-name="Table_20_Contents" style:list-style-name="L27"/>
    <style:style style:name="P180" style:family="paragraph" style:parent-style-name="Table_20_Contents" style:list-style-name="L27">
      <style:text-properties fo:language="en" fo:country="US"/>
    </style:style>
    <style:style style:name="P181" style:family="paragraph" style:parent-style-name="Table_20_Contents" style:list-style-name="L28">
      <style:paragraph-properties fo:margin-left="0in" fo:margin-right="0in" fo:text-indent="-0.25in" style:auto-text-indent="false"/>
      <style:text-properties fo:language="ru" fo:country="RU"/>
    </style:style>
    <style:style style:name="P182" style:family="paragraph" style:parent-style-name="Table_20_Contents" style:list-style-name="L29">
      <style:text-properties fo:language="en" fo:country="US"/>
    </style:style>
    <style:style style:name="P183" style:family="paragraph" style:parent-style-name="Table_20_Contents" style:list-style-name="L29">
      <style:text-properties fo:language="ru" fo:country="RU"/>
    </style:style>
    <style:style style:name="P184" style:family="paragraph" style:parent-style-name="Table_20_Contents" style:list-style-name="L28">
      <style:text-properties fo:language="ru" fo:country="RU"/>
    </style:style>
    <style:style style:name="P185" style:family="paragraph" style:parent-style-name="Table_20_Contents">
      <style:text-properties fo:language="en" fo:country="US" fo:font-weight="normal" style:font-weight-asian="normal" style:font-weight-complex="normal"/>
    </style:style>
    <style:style style:name="P186" style:family="paragraph" style:parent-style-name="Text_20_body" style:list-style-name="L30"/>
    <style:style style:name="P187" style:family="paragraph" style:parent-style-name="Text_20_body" style:list-style-name="L30">
      <style:text-properties fo:language="ru" fo:country="RU"/>
    </style:style>
    <style:style style:name="P188" style:family="paragraph" style:parent-style-name="Text_20_body" style:list-style-name="L30">
      <style:text-properties fo:language="ru" fo:country="RU" fo:font-weight="normal" style:font-weight-asian="normal" style:font-weight-complex="normal"/>
    </style:style>
    <style:style style:name="P189" style:family="paragraph" style:parent-style-name="Text_20_body" style:list-style-name="L31">
      <style:text-properties fo:font-weight="normal" style:font-weight-asian="normal" style:font-weight-complex="normal"/>
    </style:style>
    <style:style style:name="P190" style:family="paragraph" style:parent-style-name="Text_20_body" style:list-style-name="L32">
      <style:text-properties fo:font-weight="normal" style:font-weight-asian="normal" style:font-weight-complex="normal"/>
    </style:style>
    <style:style style:name="P191" style:family="paragraph" style:parent-style-name="Text_20_body" style:list-style-name="L33">
      <style:text-properties fo:language="ru" fo:country="RU" fo:font-weight="normal" style:font-weight-asian="normal" style:font-weight-complex="normal"/>
    </style:style>
    <style:style style:name="P192" style:family="paragraph" style:parent-style-name="Text_20_body" style:list-style-name="L33">
      <style:text-properties officeooo:paragraph-rsid="0024490a"/>
    </style:style>
    <style:style style:name="P193" style:family="paragraph" style:parent-style-name="Text_20_body" style:list-style-name="L34"/>
    <style:style style:name="P194" style:family="paragraph" style:parent-style-name="Text_20_body" style:list-style-name="L35">
      <style:text-properties officeooo:paragraph-rsid="0024490a"/>
    </style:style>
    <style:style style:name="P195" style:family="paragraph" style:parent-style-name="Table_20_Contents">
      <style:text-properties officeooo:paragraph-rsid="0024490a"/>
    </style:style>
    <style:style style:name="P196" style:family="paragraph" style:parent-style-name="Table_20_Contents">
      <style:paragraph-properties fo:text-align="center" style:justify-single-word="false"/>
      <style:text-properties officeooo:paragraph-rsid="0024490a"/>
    </style:style>
    <style:style style:name="P197" style:family="paragraph" style:parent-style-name="Table_20_Contents">
      <style:text-properties fo:language="en" fo:country="US" officeooo:paragraph-rsid="0024490a"/>
    </style:style>
    <style:style style:name="P198" style:family="paragraph" style:parent-style-name="Text_20_body">
      <style:text-properties fo:language="ru" fo:country="RU" officeooo:paragraph-rsid="0024490a"/>
    </style:style>
    <style:style style:name="P199" style:family="paragraph" style:parent-style-name="Text_20_body">
      <style:text-properties officeooo:paragraph-rsid="0024490a"/>
    </style:style>
    <style:style style:name="P200" style:family="paragraph" style:parent-style-name="Table_20_Contents">
      <style:paragraph-properties fo:text-align="center" style:justify-single-word="false"/>
      <style:text-properties fo:language="en" fo:country="US" officeooo:paragraph-rsid="0024490a"/>
    </style:style>
    <style:style style:name="P201" style:family="paragraph" style:parent-style-name="Text_20_body">
      <style:text-properties fo:language="en" fo:country="US" officeooo:paragraph-rsid="0024490a"/>
    </style:style>
    <style:style style:name="P202" style:family="paragraph" style:parent-style-name="Table_20_Contents">
      <style:text-properties fo:language="ru" fo:country="RU" officeooo:paragraph-rsid="0024490a"/>
    </style:style>
    <style:style style:name="P203" style:family="paragraph" style:parent-style-name="Text_20_body" style:list-style-name="L36">
      <style:text-properties officeooo:paragraph-rsid="0024490a"/>
    </style:style>
    <style:style style:name="P204" style:family="paragraph" style:parent-style-name="Text_20_body" style:list-style-name="L37"/>
    <style:style style:name="P205" style:family="paragraph" style:parent-style-name="Text_20_body" style:list-style-name="L38">
      <style:text-properties fo:language="ru" fo:country="RU" fo:font-weight="normal" style:font-weight-asian="normal" style:font-weight-complex="normal"/>
    </style:style>
    <style:style style:name="P206" style:family="paragraph" style:parent-style-name="Text_20_body">
      <style:text-properties fo:font-weight="normal" style:font-weight-asian="normal" style:font-weight-complex="normal"/>
    </style:style>
    <style:style style:name="P207" style:family="paragraph" style:parent-style-name="Text_20_body" style:list-style-name="L39">
      <style:text-properties fo:font-weight="normal" style:font-weight-asian="normal" style:font-weight-complex="normal"/>
    </style:style>
    <style:style style:name="P208" style:family="paragraph" style:parent-style-name="Text_20_body" style:list-style-name="L40">
      <style:text-properties fo:font-weight="normal" style:font-weight-asian="normal" style:font-weight-complex="normal"/>
    </style:style>
    <style:style style:name="P209" style:family="paragraph" style:parent-style-name="Text_20_body" style:list-style-name="L40">
      <style:text-properties fo:language="en" fo:country="US" fo:font-weight="normal" style:font-weight-asian="normal" style:font-weight-complex="normal"/>
    </style:style>
    <style:style style:name="P210" style:family="paragraph" style:parent-style-name="Text_20_body">
      <style:text-properties fo:language="ru" fo:country="RU" fo:font-style="italic" fo:font-weight="normal" style:font-style-asian="italic" style:font-weight-asian="normal" style:font-style-complex="italic" style:font-weight-complex="normal"/>
    </style:style>
    <style:style style:name="P211" style:family="paragraph" style:parent-style-name="Text_20_body">
      <style:text-properties style:font-name="Courier New" fo:language="ru" fo:country="RU" fo:font-style="normal" fo:font-weight="normal" style:font-style-asian="normal" style:font-weight-asian="normal" style:font-style-complex="normal" style:font-weight-complex="normal"/>
    </style:style>
    <style:style style:name="P212" style:family="paragraph" style:parent-style-name="Heading_20_3">
      <style:text-properties fo:font-weight="bold" style:font-weight-asian="bold" style:font-weight-complex="bold"/>
    </style:style>
    <style:style style:name="P213" style:family="paragraph" style:parent-style-name="Text_20_body">
      <style:text-properties fo:language="en" fo:country="US" fo:font-weight="normal" style:font-weight-asian="normal" style:font-weight-complex="normal"/>
    </style:style>
    <style:style style:name="P214" style:family="paragraph" style:parent-style-name="Text_20_body">
      <style:text-properties style:font-name="Courier New" fo:font-size="10pt" fo:language="ru" fo:country="RU" fo:font-weight="normal" style:font-size-asian="10pt" style:font-weight-asian="normal" style:font-size-complex="10pt" style:font-weight-complex="normal"/>
    </style:style>
    <style:style style:name="P215" style:family="paragraph" style:parent-style-name="Text_20_body" style:list-style-name="L41">
      <style:text-properties fo:language="ru" fo:country="RU" fo:font-weight="normal" style:font-weight-asian="normal" style:font-weight-complex="normal"/>
    </style:style>
    <style:style style:name="P216" style:family="paragraph" style:parent-style-name="Heading_20_3">
      <style:text-properties fo:font-weight="bold" officeooo:paragraph-rsid="0025d63f" style:font-weight-asian="bold" style:font-weight-complex="bold"/>
    </style:style>
    <style:style style:name="P217" style:family="paragraph" style:parent-style-name="Text_20_body">
      <style:text-properties officeooo:paragraph-rsid="0014d131"/>
    </style:style>
    <style:style style:name="P218" style:family="paragraph" style:parent-style-name="Text_20_body">
      <style:text-properties fo:language="en" fo:country="US" officeooo:paragraph-rsid="0014d131"/>
    </style:style>
    <style:style style:name="P219" style:family="paragraph" style:parent-style-name="Text_20_body">
      <style:text-properties fo:language="ru" fo:country="RU" officeooo:paragraph-rsid="0014d131"/>
    </style:style>
    <style:style style:name="P220" style:family="paragraph" style:parent-style-name="Text_20_body">
      <style:text-properties fo:language="ru" fo:country="RU" fo:font-weight="normal" officeooo:rsid="0014d131" officeooo:paragraph-rsid="0014d131" style:font-weight-asian="normal" style:font-weight-complex="normal"/>
    </style:style>
    <style:style style:name="P221" style:family="paragraph" style:parent-style-name="Table_20_Contents">
      <style:text-properties officeooo:rsid="0014d131" officeooo:paragraph-rsid="0014d131"/>
    </style:style>
    <style:style style:name="P222" style:family="paragraph" style:parent-style-name="Heading_20_2">
      <style:paragraph-properties fo:break-before="page"/>
      <style:text-properties fo:language="ru" fo:country="RU"/>
    </style:style>
    <style:style style:name="P223" style:family="paragraph" style:parent-style-name="Standard">
      <style:text-properties fo:language="en" fo:country="US"/>
    </style:style>
    <style:style style:name="P224" style:family="paragraph" style:parent-style-name="Standard">
      <style:text-properties fo:language="ru" fo:country="RU" officeooo:paragraph-rsid="003fe079"/>
    </style:style>
    <style:style style:name="P225" style:family="paragraph" style:parent-style-name="Standard">
      <style:text-properties style:font-name="Courier New" fo:language="ru" fo:country="RU" fo:font-weight="bold" style:font-weight-asian="bold" style:font-weight-complex="bold"/>
    </style:style>
    <style:style style:name="P226" style:family="paragraph" style:parent-style-name="Text_20_body">
      <style:text-properties style:font-name="Courier New" fo:language="ru" fo:country="RU" fo:font-weight="bold" style:font-weight-asian="bold" style:font-weight-complex="bold"/>
    </style:style>
    <style:style style:name="P227" style:family="paragraph" style:parent-style-name="Text_20_body">
      <style:text-properties style:font-name="Times New Roman1" fo:language="ru" fo:country="RU" fo:font-weight="normal" style:font-weight-asian="normal" style:font-weight-complex="normal"/>
    </style:style>
    <style:style style:name="P228" style:family="paragraph" style:parent-style-name="Standard">
      <style:text-properties style:font-name="Courier New" fo:font-weight="bold" style:font-weight-asian="bold" style:font-weight-complex="bold"/>
    </style:style>
    <style:style style:name="P229" style:family="paragraph" style:parent-style-name="Text_20_body" style:list-style-name="L42"/>
    <style:style style:name="P230" style:family="paragraph" style:parent-style-name="Table_20_Contents">
      <style:text-properties fo:language="ru" fo:country="RU" fo:font-weight="normal" style:font-weight-asian="normal" style:font-weight-complex="normal"/>
    </style:style>
    <style:style style:name="P231" style:family="paragraph" style:parent-style-name="Text_20_body" style:list-style-name="L43"/>
    <style:style style:name="P232" style:family="paragraph" style:parent-style-name="List_20_Contents">
      <style:paragraph-properties fo:margin-left="0in" fo:margin-right="0in" fo:margin-top="0in" fo:margin-bottom="0.1965in" style:contextual-spacing="false" fo:text-indent="0in" style:auto-text-indent="false"/>
    </style:style>
    <style:style style:name="P233" style:family="paragraph" style:parent-style-name="Text_20_body" style:list-style-name="L44"/>
    <style:style style:name="P234" style:family="paragraph" style:parent-style-name="Text_20_body" style:list-style-name="L45">
      <style:text-properties fo:language="en" fo:country="US"/>
    </style:style>
    <style:style style:name="P235" style:family="paragraph" style:parent-style-name="Text_20_body" style:list-style-name="L46"/>
    <style:style style:name="P236" style:family="paragraph" style:parent-style-name="Text_20_body" style:list-style-name="L46">
      <style:text-properties fo:language="en" fo:country="US"/>
    </style:style>
    <style:style style:name="P237" style:family="paragraph" style:parent-style-name="Text_20_body" style:list-style-name="L47">
      <style:text-properties fo:language="en" fo:country="US"/>
    </style:style>
    <style:style style:name="P238" style:family="paragraph" style:parent-style-name="Text_20_body" style:list-style-name="L48"/>
    <style:style style:name="P239" style:family="paragraph" style:parent-style-name="Text_20_body" style:list-style-name="L48">
      <style:text-properties fo:language="en" fo:country="US"/>
    </style:style>
    <style:style style:name="P240" style:family="paragraph" style:parent-style-name="Text_20_body" style:list-style-name="L49">
      <style:text-properties fo:language="en" fo:country="US"/>
    </style:style>
    <style:style style:name="P241" style:family="paragraph" style:parent-style-name="Text_20_body" style:list-style-name="L49">
      <style:text-properties fo:language="ru" fo:country="RU"/>
    </style:style>
    <style:style style:name="P242" style:family="paragraph" style:parent-style-name="Table_20_Heading">
      <style:text-properties fo:font-size="10pt" style:font-size-asian="10pt" style:font-size-complex="10pt"/>
    </style:style>
    <style:style style:name="P243" style:family="paragraph" style:parent-style-name="Table_20_Contents">
      <style:text-properties fo:font-size="10pt" fo:font-weight="bold" style:font-size-asian="10pt" style:font-weight-asian="bold" style:font-size-complex="10pt" style:font-weight-complex="bold"/>
    </style:style>
    <style:style style:name="P244" style:family="paragraph" style:parent-style-name="Table_20_Contents">
      <style:paragraph-properties fo:text-align="center" style:justify-single-word="false"/>
      <style:text-properties style:font-name="Times New Roman" fo:font-size="10pt" style:font-size-asian="10pt" style:font-size-complex="10pt"/>
    </style:style>
    <style:style style:name="P245" style:family="paragraph" style:parent-style-name="Table_20_Contents">
      <style:text-properties fo:font-size="10pt" style:font-size-asian="10pt" style:font-size-complex="10pt"/>
    </style:style>
    <style:style style:name="P246" style:family="paragraph" style:parent-style-name="Table_20_Contents">
      <style:text-properties fo:font-size="10pt" fo:language="en" fo:country="US" officeooo:rsid="0034d631" officeooo:paragraph-rsid="0034d631" style:font-size-asian="10pt" style:font-size-complex="10pt"/>
    </style:style>
    <style:style style:name="P247" style:family="paragraph" style:parent-style-name="Table_20_Contents">
      <style:text-properties fo:font-size="10pt" fo:language="en" fo:country="US" style:font-size-asian="10pt" style:font-size-complex="10pt"/>
    </style:style>
    <style:style style:name="P248" style:family="paragraph" style:parent-style-name="Table_20_Contents">
      <style:text-properties fo:font-size="10pt" fo:language="ru" fo:country="RU" style:font-size-asian="10pt" style:font-size-complex="10pt"/>
    </style:style>
    <style:style style:name="P249" style:family="paragraph" style:parent-style-name="Table_20_Contents">
      <style:paragraph-properties fo:text-align="start" style:justify-single-word="false"/>
      <style:text-properties style:font-name="Times New Roman" fo:font-size="10pt" fo:font-weight="bold" style:font-size-asian="10pt" style:font-weight-asian="bold" style:font-size-complex="10pt" style:font-weight-complex="bold"/>
    </style:style>
    <style:style style:name="P250" style:family="paragraph" style:parent-style-name="Table_20_Contents">
      <style:text-properties fo:font-size="10pt" officeooo:paragraph-rsid="002a3ac5" style:font-size-asian="10pt" style:font-size-complex="10pt"/>
    </style:style>
    <style:style style:name="P251" style:family="paragraph" style:parent-style-name="Table_20_Contents">
      <style:text-properties fo:font-size="10pt" fo:language="en" fo:country="US" fo:font-weight="bold" style:font-size-asian="10pt" style:font-weight-asian="bold" style:font-size-complex="10pt" style:font-weight-complex="bold"/>
    </style:style>
    <style:style style:name="P252" style:family="paragraph" style:parent-style-name="Table_20_Contents">
      <style:text-properties fo:font-size="10pt" fo:font-weight="bold" officeooo:rsid="002149b4" officeooo:paragraph-rsid="002149b4" style:font-size-asian="10pt" style:font-weight-asian="bold" style:font-size-complex="10pt" style:font-weight-complex="bold"/>
    </style:style>
    <style:style style:name="P253" style:family="paragraph" style:parent-style-name="Table_20_Contents">
      <style:paragraph-properties fo:text-align="center" style:justify-single-word="false"/>
      <style:text-properties style:font-name="Times New Roman" fo:font-size="10pt" fo:font-weight="bold" officeooo:rsid="002149b4" officeooo:paragraph-rsid="002149b4" style:font-size-asian="10pt" style:font-weight-asian="bold" style:font-size-complex="10pt" style:font-weight-complex="bold"/>
    </style:style>
    <style:style style:name="P254" style:family="paragraph" style:parent-style-name="Table_20_Contents">
      <style:text-properties fo:font-size="10pt" officeooo:paragraph-rsid="002149b4" style:font-size-asian="10pt" style:font-size-complex="10pt"/>
    </style:style>
    <style:style style:name="P255" style:family="paragraph" style:parent-style-name="Text_20_body">
      <style:text-properties officeooo:rsid="0069f9c3" officeooo:paragraph-rsid="0069f9c3"/>
    </style:style>
    <style:style style:name="P256" style:family="paragraph" style:parent-style-name="Heading_20_2">
      <style:text-properties fo:language="ru" fo:country="RU" officeooo:rsid="0069f9c3" officeooo:paragraph-rsid="0069f9c3"/>
    </style:style>
    <style:style style:name="P257" style:family="paragraph" style:parent-style-name="Text_20_body" style:list-style-name="L50">
      <style:text-properties officeooo:rsid="0069f9c3" officeooo:paragraph-rsid="0069f9c3"/>
    </style:style>
    <style:style style:name="P258" style:family="paragraph" style:parent-style-name="Heading_20_2">
      <style:text-properties fo:language="ru" fo:country="RU" officeooo:rsid="00673888" officeooo:paragraph-rsid="00673888"/>
    </style:style>
    <style:style style:name="P259" style:family="paragraph" style:parent-style-name="Text_20_body" style:list-style-name="L51">
      <style:text-properties officeooo:paragraph-rsid="00673888"/>
    </style:style>
    <style:style style:name="P260" style:family="paragraph" style:parent-style-name="Heading_20_2">
      <style:text-properties fo:language="ru" fo:country="RU" officeooo:rsid="0065b01f" officeooo:paragraph-rsid="0065b01f"/>
    </style:style>
    <style:style style:name="P261" style:family="paragraph" style:parent-style-name="Text_20_body" style:list-style-name="L52">
      <style:text-properties fo:language="ru" fo:country="RU" officeooo:rsid="0065b01f" officeooo:paragraph-rsid="0065b01f"/>
    </style:style>
    <style:style style:name="P262" style:family="paragraph" style:parent-style-name="Heading_20_2">
      <style:text-properties fo:language="ru" fo:country="RU" officeooo:rsid="00514345" officeooo:paragraph-rsid="00514345"/>
    </style:style>
    <style:style style:name="P263" style:family="paragraph" style:parent-style-name="Text_20_body" style:list-style-name="L53">
      <style:text-properties officeooo:paragraph-rsid="00514345"/>
    </style:style>
    <style:style style:name="P264" style:family="paragraph" style:parent-style-name="Heading_20_2">
      <style:text-properties fo:language="ru" fo:country="RU" officeooo:rsid="002f8377" officeooo:paragraph-rsid="0041c32d"/>
    </style:style>
    <style:style style:name="P265" style:family="paragraph" style:parent-style-name="Text_20_body" style:list-style-name="L54">
      <style:text-properties officeooo:rsid="002f8377" officeooo:paragraph-rsid="0041c32d"/>
    </style:style>
    <style:style style:name="P266" style:family="paragraph" style:parent-style-name="Heading_20_2">
      <style:text-properties fo:language="ru" fo:country="RU" officeooo:rsid="002f8377" officeooo:paragraph-rsid="002f8377"/>
    </style:style>
    <style:style style:name="P267" style:family="paragraph" style:parent-style-name="Text_20_body" style:list-style-name="L54">
      <style:text-properties officeooo:rsid="002f8377" officeooo:paragraph-rsid="002f8377"/>
    </style:style>
    <style:style style:name="P268" style:family="paragraph" style:parent-style-name="Heading_20_2">
      <style:text-properties fo:language="ru" fo:country="RU" officeooo:rsid="0021cdfb" officeooo:paragraph-rsid="0026de59"/>
    </style:style>
    <style:style style:name="P269" style:family="paragraph" style:parent-style-name="Text_20_body" style:list-style-name="L55">
      <style:text-properties officeooo:paragraph-rsid="0026de59"/>
    </style:style>
    <style:style style:name="P270" style:family="paragraph" style:parent-style-name="Text_20_body" style:list-style-name="L55">
      <style:text-properties fo:language="ru" fo:country="RU" officeooo:paragraph-rsid="0026de59"/>
    </style:style>
    <style:style style:name="P271" style:family="paragraph" style:parent-style-name="Heading_20_2">
      <style:text-properties fo:language="ru" fo:country="RU" officeooo:rsid="0021cdfb" officeooo:paragraph-rsid="0021cdfb"/>
    </style:style>
    <style:style style:name="P272" style:family="paragraph" style:parent-style-name="Text_20_body" style:list-style-name="L56">
      <style:text-properties fo:language="ru" fo:country="RU" officeooo:rsid="0021cdfb" officeooo:paragraph-rsid="0021cdfb"/>
    </style:style>
    <style:style style:name="P273" style:family="paragraph" style:parent-style-name="Heading_20_2">
      <style:text-properties fo:language="ru" fo:country="RU" officeooo:rsid="0014d131" officeooo:paragraph-rsid="0014d131"/>
    </style:style>
    <style:style style:name="P274" style:family="paragraph" style:parent-style-name="Text_20_body" style:list-style-name="L57">
      <style:text-properties officeooo:paragraph-rsid="0014d131"/>
    </style:style>
    <style:style style:name="P275" style:family="paragraph" style:parent-style-name="Text_20_body" style:list-style-name="L57">
      <style:text-properties fo:language="ru" fo:country="RU"/>
    </style:style>
    <style:style style:name="P276" style:family="paragraph" style:parent-style-name="Text_20_body" style:list-style-name="L57"/>
    <style:style style:name="P277" style:family="paragraph" style:parent-style-name="Text_20_body" style:list-style-name="L58">
      <style:text-properties fo:language="ru" fo:country="RU"/>
    </style:style>
    <style:style style:name="P278" style:family="paragraph" style:parent-style-name="Text_20_body" style:list-style-name="L59">
      <style:text-properties fo:language="ru" fo:country="RU" fo:font-style="normal" style:font-style-asian="normal" style:font-style-complex="normal"/>
    </style:style>
    <style:style style:name="P279" style:family="paragraph" style:parent-style-name="Text_20_body" style:list-style-name="L60">
      <style:text-properties fo:language="ru" fo:country="RU"/>
    </style:style>
    <style:style style:name="P280" style:family="paragraph" style:parent-style-name="Text_20_body" style:list-style-name="L60"/>
    <style:style style:name="P281" style:family="paragraph" style:parent-style-name="Text_20_body" style:list-style-name="L61">
      <style:text-properties fo:language="ru" fo:country="RU"/>
    </style:style>
    <style:style style:name="P282" style:family="paragraph" style:parent-style-name="Text_20_body" style:list-style-name="L61"/>
    <style:style style:name="P283" style:family="paragraph" style:parent-style-name="Text_20_body" style:list-style-name="L62"/>
    <style:style style:name="P284" style:family="paragraph" style:parent-style-name="Text_20_body" style:list-style-name="L62">
      <style:text-properties fo:language="ru" fo:country="RU"/>
    </style:style>
    <style:style style:name="P285" style:family="paragraph" style:parent-style-name="Text_20_body" style:list-style-name="L63"/>
    <style:style style:name="P286" style:family="paragraph" style:parent-style-name="Text_20_body" style:list-style-name="L63">
      <style:text-properties fo:language="ru" fo:country="RU"/>
    </style:style>
    <style:style style:name="P287" style:family="paragraph" style:parent-style-name="Text_20_body" style:list-style-name="L64"/>
    <style:style style:name="P288" style:family="paragraph" style:parent-style-name="Text_20_body" style:list-style-name="L64">
      <style:text-properties fo:language="ru" fo:country="RU"/>
    </style:style>
    <style:style style:name="P289" style:family="paragraph" style:parent-style-name="Text_20_body" style:list-style-name="L65">
      <style:text-properties fo:language="ru" fo:country="RU"/>
    </style:style>
    <style:style style:name="P290" style:family="paragraph" style:parent-style-name="Text_20_body" style:list-style-name="L65"/>
    <style:style style:name="P291" style:family="paragraph" style:parent-style-name="Text_20_body" style:list-style-name="L66">
      <style:text-properties fo:language="ru" fo:country="RU"/>
    </style:style>
    <style:style style:name="P292" style:family="paragraph" style:parent-style-name="Text_20_body" style:list-style-name="L67"/>
    <style:style style:name="P293" style:family="paragraph" style:parent-style-name="Text_20_body" style:list-style-name="L67">
      <style:text-properties fo:language="ru" fo:country="RU"/>
    </style:style>
    <style:style style:name="P294" style:family="paragraph" style:parent-style-name="Text_20_body" style:list-style-name="L68">
      <style:text-properties fo:language="ru" fo:country="RU"/>
    </style:style>
    <style:style style:name="P295" style:family="paragraph" style:parent-style-name="Text_20_body" style:list-style-name="L68"/>
    <style:style style:name="P296" style:family="paragraph" style:parent-style-name="Text_20_body" style:list-style-name="L69">
      <style:text-properties fo:language="ru" fo:country="RU"/>
    </style:style>
    <style:style style:name="P297" style:family="paragraph" style:parent-style-name="Text_20_body" style:list-style-name="L69"/>
    <style:style style:name="P298" style:family="paragraph" style:parent-style-name="Text_20_body" style:list-style-name="L70"/>
    <style:style style:name="P299" style:family="paragraph" style:parent-style-name="Text_20_body" style:list-style-name="L70">
      <style:text-properties fo:language="ru" fo:country="RU"/>
    </style:style>
    <style:style style:name="P300" style:family="paragraph" style:parent-style-name="Text_20_body">
      <style:paragraph-properties fo:text-align="center" style:justify-single-word="false"/>
    </style:style>
    <style:style style:name="P301" style:family="paragraph" style:parent-style-name="Text_20_body">
      <style:paragraph-properties fo:text-align="center" style:justify-single-word="false"/>
      <style:text-properties fo:language="en" fo:country="US"/>
    </style:style>
    <style:style style:name="T1" style:family="text">
      <style:text-properties fo:language="ru" fo:country="RU"/>
    </style:style>
    <style:style style:name="T2" style:family="text">
      <style:text-properties fo:language="en" fo:country="US"/>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language="en" fo:country="US" fo:font-weight="bold" style:font-weight-asian="bold" style:font-weight-complex="bold"/>
    </style:style>
    <style:style style:name="T6" style:family="text">
      <style:text-properties style:font-name="Times New Roman" fo:language="ru" fo:country="RU"/>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language="ru" fo:country="RU" fo:font-style="normal" fo:font-weight="bold" style:font-style-asian="normal" style:font-weight-asian="bold" style:font-style-complex="normal" style:font-weight-complex="bold"/>
    </style:style>
    <style:style style:name="T9" style:family="text">
      <style:text-properties fo:language="ru" fo:country="RU" fo:font-weight="bold" style:font-weight-asian="bold" style:font-weight-complex="bold"/>
    </style:style>
    <style:style style:name="T10" style:family="text">
      <style:text-properties fo:language="ru" fo:country="RU" fo:font-weight="bold" officeooo:rsid="0052b761" style:font-weight-asian="bold" style:font-weight-complex="bold"/>
    </style:style>
    <style:style style:name="T11" style:family="text">
      <style:text-properties fo:language="ru" fo:country="RU" fo:font-weight="normal" style:font-weight-asian="normal" style:font-weight-complex="normal"/>
    </style:style>
    <style:style style:name="T12" style:family="text">
      <style:text-properties fo:font-style="normal" style:font-style-asian="normal" style:font-style-complex="normal"/>
    </style:style>
    <style:style style:name="T13" style:family="text">
      <style:text-properties fo:language="ru" fo:country="RU" fo:font-style="italic" style:font-style-asian="italic" style:font-style-complex="italic"/>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language="en" fo:country="US" fo:font-style="italic" style:font-style-asian="italic" style:font-style-complex="italic"/>
    </style:style>
    <style:style style:name="T16" style:family="text">
      <style:text-properties fo:font-weight="normal" style:font-weight-asian="normal" style:font-weight-complex="normal"/>
    </style:style>
    <style:style style:name="T17" style:family="text">
      <style:text-properties officeooo:rsid="002a0f53"/>
    </style:style>
    <style:style style:name="T18" style:family="text">
      <style:text-properties fo:language="en" fo:country="US" fo:font-weight="bold" officeooo:rsid="002a0f53" style:font-weight-asian="bold" style:font-weight-complex="bold"/>
    </style:style>
    <style:style style:name="T19" style:family="text">
      <style:text-properties fo:language="en" fo:country="US" fo:font-weight="normal" style:font-weight-asian="normal" style:font-weight-complex="normal"/>
    </style:style>
    <style:style style:name="T20" style:family="text">
      <style:text-properties fo:language="en" fo:country="US" officeooo:rsid="003208f0"/>
    </style:style>
    <style:style style:name="T21" style:family="text">
      <style:text-properties fo:language="ru" fo:country="RU" officeooo:rsid="003149d0"/>
    </style:style>
    <style:style style:name="T22" style:family="text">
      <style:text-properties fo:language="ru" fo:country="RU" officeooo:rsid="00449d41"/>
    </style:style>
    <style:style style:name="T23" style:family="text">
      <style:text-properties fo:language="en" fo:country="US" officeooo:rsid="003149d0"/>
    </style:style>
    <style:style style:name="T24" style:family="text">
      <style:text-properties fo:language="en" fo:country="US" officeooo:rsid="00449d41"/>
    </style:style>
    <style:style style:name="T25" style:family="text">
      <style:text-properties fo:language="ru" fo:country="RU" officeooo:rsid="003208f0"/>
    </style:style>
    <style:style style:name="T26" style:family="text">
      <style:text-properties style:font-name="Courier New" fo:language="ru" fo:country="RU" fo:font-weight="bold" officeooo:rsid="003208f0" style:font-weight-asian="bold" style:font-weight-complex="bold"/>
    </style:style>
    <style:style style:name="T27" style:family="text">
      <style:text-properties officeooo:rsid="004659fa"/>
    </style:style>
    <style:style style:name="T28" style:family="text">
      <style:text-properties style:text-position="sub 58%" fo:language="en" fo:country="US" officeooo:rsid="003b71ac"/>
    </style:style>
    <style:style style:name="T29" style:family="text">
      <style:text-properties style:text-position="sub 58%" fo:language="en" fo:country="US" officeooo:rsid="004659fa"/>
    </style:style>
    <style:style style:name="T30" style:family="text">
      <style:text-properties style:text-position="0% 100%" fo:language="en" fo:country="US" officeooo:rsid="004659fa"/>
    </style:style>
    <style:style style:name="T31" style:family="text">
      <style:text-properties style:text-position="0% 100%" officeooo:rsid="004659fa"/>
    </style:style>
    <style:style style:name="T32" style:family="text">
      <style:text-properties officeooo:rsid="003b71ac"/>
    </style:style>
    <style:style style:name="T33" style:family="text">
      <style:text-properties fo:font-weight="bold" officeooo:rsid="003b71ac" style:font-weight-asian="bold" style:font-weight-complex="bold"/>
    </style:style>
    <style:style style:name="T34" style:family="text">
      <style:text-properties fo:font-weight="bold" officeooo:rsid="00479066" style:font-weight-asian="bold" style:font-weight-complex="bold"/>
    </style:style>
    <style:style style:name="T35" style:family="text">
      <style:text-properties fo:language="en" fo:country="US" fo:font-weight="bold" officeooo:rsid="003b71ac" style:font-weight-asian="bold" style:font-weight-complex="bold"/>
    </style:style>
    <style:style style:name="T36" style:family="text">
      <style:text-properties fo:language="ru" fo:country="RU" officeooo:rsid="003b71ac"/>
    </style:style>
    <style:style style:name="T37" style:family="text">
      <style:text-properties fo:language="en" fo:country="US" officeooo:rsid="003b71ac"/>
    </style:style>
    <style:style style:name="T38" style:family="text">
      <style:text-properties officeooo:rsid="004b5131"/>
    </style:style>
    <style:style style:name="T39" style:family="text">
      <style:text-properties officeooo:rsid="003208f0"/>
    </style:style>
    <style:style style:name="T40" style:family="text">
      <style:text-properties officeooo:rsid="003b7db3"/>
    </style:style>
    <style:style style:name="T41" style:family="text">
      <style:text-properties fo:language="en" fo:country="US" fo:font-weight="bold" officeooo:rsid="005629d0" style:font-weight-asian="bold" style:font-weight-complex="bold"/>
    </style:style>
    <style:style style:name="T42" style:family="text">
      <style:text-properties fo:language="ru" fo:country="RU" officeooo:rsid="00181d45"/>
    </style:style>
    <style:style style:name="T43" style:family="text">
      <style:text-properties fo:language="ru" fo:country="RU" officeooo:rsid="001c8194"/>
    </style:style>
    <style:style style:name="T44" style:family="text">
      <style:text-properties fo:language="ru" fo:country="RU" officeooo:rsid="001af639"/>
    </style:style>
    <style:style style:name="T45" style:family="text">
      <style:text-properties fo:language="ru" fo:country="RU" officeooo:rsid="00189d56"/>
    </style:style>
    <style:style style:name="T46" style:family="text">
      <style:text-properties fo:language="ru" fo:country="RU" officeooo:rsid="0019e34f"/>
    </style:style>
    <style:style style:name="T47" style:family="text">
      <style:text-properties fo:language="ru" fo:country="RU" officeooo:rsid="001dd163"/>
    </style:style>
    <style:style style:name="T48" style:family="text">
      <style:text-properties fo:language="ru" fo:country="RU" officeooo:rsid="002015f6"/>
    </style:style>
    <style:style style:name="T49" style:family="text">
      <style:text-properties fo:language="ru" fo:country="RU" fo:font-weight="bold" officeooo:rsid="002015f6" style:font-weight-asian="bold" style:font-weight-complex="bold"/>
    </style:style>
    <style:style style:name="T50" style:family="text">
      <style:text-properties fo:language="ru" fo:country="RU" fo:font-weight="normal" officeooo:rsid="002015f6" style:font-weight-asian="normal" style:font-weight-complex="normal"/>
    </style:style>
    <style:style style:name="T51" style:family="text">
      <style:text-properties officeooo:rsid="006e8583"/>
    </style:style>
    <style:style style:name="T52" style:family="text">
      <style:text-properties fo:font-weight="bold" style:font-weight-asian="bold" style:font-weight-complex="bold" style:text-overline-style="solid" style:text-overline-width="bold" style:text-overline-color="font-color"/>
    </style:style>
    <style:style style:name="T53" style:family="text">
      <style:text-properties officeooo:rsid="00688607"/>
    </style:style>
    <style:style style:name="T54" style:family="text">
      <style:text-properties fo:font-weight="bold" officeooo:rsid="0066fe48" style:font-weight-asian="bold" style:font-weight-complex="bold" style:text-overline-style="solid" style:text-overline-width="bold" style:text-overline-color="font-color"/>
    </style:style>
    <style:style style:name="T55" style:family="text">
      <style:text-properties officeooo:rsid="0066fe48"/>
    </style:style>
    <style:style style:name="T56" style:family="text">
      <style:text-properties officeooo:rsid="006f228d"/>
    </style:style>
    <style:style style:name="T57" style:family="text">
      <style:text-properties officeooo:rsid="0076704f"/>
    </style:style>
    <style:style style:name="T58" style:family="text">
      <style:text-properties officeooo:rsid="00697d5c"/>
    </style:style>
    <style:style style:name="T59" style:family="text">
      <style:text-properties fo:font-style="normal" fo:font-weight="bold" style:font-style-asian="normal" style:font-weight-asian="bold" style:font-style-complex="normal" style:font-weight-complex="bold" style:text-overline-style="solid" style:text-overline-width="bold" style:text-overline-color="font-color"/>
    </style:style>
    <style:style style:name="T60" style:family="text">
      <style:text-properties fo:font-style="normal" fo:font-weight="bold" officeooo:rsid="0066fe48" style:font-style-asian="normal" style:font-weight-asian="bold" style:font-style-complex="normal" style:font-weight-complex="bold" style:text-overline-style="solid" style:text-overline-width="bold" style:text-overline-color="font-color"/>
    </style:style>
    <style:style style:name="T61" style:family="text">
      <style:text-properties style:text-overline-style="solid" style:text-overline-width="bold" style:text-overline-color="font-color"/>
    </style:style>
    <style:style style:name="T62" style:family="text">
      <style:text-properties officeooo:rsid="007075b3"/>
    </style:style>
    <style:style style:name="T63" style:family="text">
      <style:text-properties officeooo:rsid="00715807"/>
    </style:style>
    <style:style style:name="T64" style:family="text">
      <style:text-properties officeooo:rsid="0072bfe7"/>
    </style:style>
    <style:style style:name="T65" style:family="text">
      <style:text-properties fo:font-weight="bold" officeooo:rsid="0072bfe7" style:font-weight-asian="bold" style:font-weight-complex="bold" style:text-overline-style="solid" style:text-overline-width="bold" style:text-overline-color="font-color"/>
    </style:style>
    <style:style style:name="T66" style:family="text">
      <style:text-properties fo:font-style="italic" fo:font-weight="normal" officeooo:rsid="006f228d" style:font-style-asian="italic" style:font-weight-asian="normal" style:font-style-complex="italic" style:font-weight-complex="normal"/>
    </style:style>
    <style:style style:name="T67" style:family="text">
      <style:text-properties fo:font-weight="bold" officeooo:rsid="006f228d" style:font-weight-asian="bold" style:font-weight-complex="bold" style:text-overline-style="solid" style:text-overline-width="bold" style:text-overline-color="font-color"/>
    </style:style>
    <style:style style:name="T68" style:family="text">
      <style:text-properties fo:font-style="italic" officeooo:rsid="006f228d" style:font-style-asian="italic" style:font-style-complex="italic"/>
    </style:style>
    <style:style style:name="T69" style:family="text">
      <style:text-properties fo:font-style="italic" fo:font-weight="bold" officeooo:rsid="006f228d" style:font-style-asian="italic" style:font-weight-asian="bold" style:font-style-complex="italic" style:font-weight-complex="bold"/>
    </style:style>
    <style:style style:name="T70" style:family="text">
      <style:text-properties officeooo:rsid="00705edc"/>
    </style:style>
    <style:style style:name="T71" style:family="text">
      <style:text-properties officeooo:rsid="0078b6fa"/>
    </style:style>
    <style:style style:name="T72" style:family="text">
      <style:text-properties officeooo:rsid="007e6449"/>
    </style:style>
    <style:style style:name="T73" style:family="text">
      <style:text-properties officeooo:rsid="00748e28"/>
    </style:style>
    <style:style style:name="T74" style:family="text">
      <style:text-properties officeooo:rsid="007722a6"/>
    </style:style>
    <style:style style:name="T75" style:family="text">
      <style:text-properties officeooo:rsid="007ca93e"/>
    </style:style>
    <style:style style:name="T76" style:family="text">
      <style:text-properties fo:font-weight="normal" officeooo:rsid="007ca93e" style:font-weight-asian="normal" style:font-weight-complex="normal"/>
    </style:style>
    <style:style style:name="T77" style:family="text">
      <style:text-properties fo:font-weight="normal" officeooo:rsid="006f228d" style:font-weight-asian="normal" style:font-weight-complex="normal"/>
    </style:style>
    <style:style style:name="T78" style:family="text">
      <style:text-properties fo:font-weight="bold" officeooo:rsid="007ca93e" style:font-weight-asian="bold" style:font-weight-complex="bold" style:text-overline-style="solid" style:text-overline-width="bold" style:text-overline-color="font-color"/>
    </style:style>
    <style:style style:name="T79" style:family="text">
      <style:text-properties officeooo:rsid="007c84ce"/>
    </style:style>
    <style:style style:name="T80" style:family="text">
      <style:text-properties fo:font-weight="bold" officeooo:rsid="007c84ce" style:font-weight-asian="bold" style:font-weight-complex="bold"/>
    </style:style>
    <style:style style:name="T81" style:family="text">
      <style:text-properties fo:font-weight="normal" officeooo:rsid="007c84ce" style:font-weight-asian="normal" style:font-weight-complex="normal"/>
    </style:style>
    <style:style style:name="T82" style:family="text">
      <style:text-properties officeooo:rsid="00714b46"/>
    </style:style>
    <style:style style:name="T83" style:family="text">
      <style:text-properties fo:font-weight="bold" officeooo:rsid="00714b46" style:font-weight-asian="bold" style:font-weight-complex="bold"/>
    </style:style>
    <style:style style:name="T84" style:family="text">
      <style:text-properties fo:font-weight="bold" officeooo:rsid="00714b46" style:font-weight-asian="bold" style:font-weight-complex="bold" style:text-overline-style="solid" style:text-overline-width="auto" style:text-overline-color="font-color"/>
    </style:style>
    <style:style style:name="T85" style:family="text">
      <style:text-properties officeooo:rsid="0071a9e8"/>
    </style:style>
    <style:style style:name="T86" style:family="text">
      <style:text-properties fo:font-weight="normal" officeooo:rsid="0071a9e8" style:font-weight-asian="normal" style:font-weight-complex="normal"/>
    </style:style>
    <style:style style:name="T87" style:family="text">
      <style:text-properties fo:font-weight="bold" officeooo:rsid="0071a9e8" style:font-weight-asian="bold" style:font-weight-complex="bold" style:text-overline-style="solid" style:text-overline-width="bold" style:text-overline-color="font-color"/>
    </style:style>
    <style:style style:name="T88" style:family="text">
      <style:text-properties fo:font-weight="normal" officeooo:rsid="0074662d" style:font-weight-asian="normal" style:font-weight-complex="normal"/>
    </style:style>
    <style:style style:name="T89" style:family="text">
      <style:text-properties fo:language="ru" fo:country="RU" fo:font-weight="normal" officeooo:rsid="0078647c" style:font-weight-asian="normal" style:font-weight-complex="normal"/>
    </style:style>
    <style:style style:name="T90" style:family="text">
      <style:text-properties fo:language="ru" fo:country="RU" fo:font-weight="normal" officeooo:rsid="006d46c4" style:font-weight-asian="normal" style:font-weight-complex="normal"/>
    </style:style>
    <style:style style:name="T91" style:family="text">
      <style:text-properties fo:language="ru" fo:country="RU" fo:font-weight="normal" officeooo:rsid="0074662d" style:font-weight-asian="normal" style:font-weight-complex="normal"/>
    </style:style>
    <style:style style:name="T92" style:family="text">
      <style:text-properties fo:language="ru" fo:country="RU" fo:font-weight="normal" officeooo:rsid="0077091e" style:font-weight-asian="normal" style:font-weight-complex="normal"/>
    </style:style>
    <style:style style:name="T93" style:family="text">
      <style:text-properties officeooo:rsid="0071c82e"/>
    </style:style>
    <style:style style:name="T94" style:family="text">
      <style:text-properties officeooo:rsid="0074662d"/>
    </style:style>
    <style:style style:name="T95" style:family="text">
      <style:text-properties officeooo:rsid="0075cd59"/>
    </style:style>
    <style:style style:name="T96" style:family="text">
      <style:text-properties officeooo:rsid="0077091e"/>
    </style:style>
    <style:style style:name="T97" style:family="text">
      <style:text-properties officeooo:rsid="0078f10c"/>
    </style:style>
    <style:style style:name="T98" style:family="text">
      <style:text-properties fo:font-weight="normal" officeooo:rsid="006d46c4" style:font-weight-asian="normal" style:font-weight-complex="normal" style:text-overline-style="none" style:text-overline-color="font-color"/>
    </style:style>
    <style:style style:name="T99" style:family="text">
      <style:text-properties fo:font-weight="bold" officeooo:rsid="006d46c4" style:font-weight-asian="bold" style:font-weight-complex="bold" style:text-overline-style="solid" style:text-overline-width="auto" style:text-overline-color="font-color"/>
    </style:style>
    <style:style style:name="T100" style:family="text">
      <style:text-properties officeooo:rsid="006d46c4"/>
    </style:style>
    <style:style style:name="T101" style:family="text">
      <style:text-properties officeooo:rsid="0078647c"/>
    </style:style>
    <style:style style:name="T102" style:family="text">
      <style:text-properties officeooo:rsid="0079f00b"/>
    </style:style>
    <style:style style:name="T103" style:family="text">
      <style:text-properties style:font-name="DejaVu Sans Mono"/>
    </style:style>
    <style:style style:name="T104" style:family="text">
      <style:text-properties fo:language="en" fo:country="US" officeooo:rsid="004bab61"/>
    </style:style>
    <style:style style:name="T105" style:family="text">
      <style:text-properties officeooo:rsid="004bab61"/>
    </style:style>
    <style:style style:name="T106" style:family="text">
      <style:text-properties fo:language="en" fo:country="US" fo:font-weight="bold" officeooo:rsid="004bab61" style:font-weight-asian="bold" style:font-weight-complex="bold"/>
    </style:style>
    <style:style style:name="T107" style:family="text">
      <style:text-properties fo:language="ru" fo:country="RU" officeooo:rsid="004bab61"/>
    </style:style>
    <style:style style:name="T108" style:family="text">
      <style:text-properties officeooo:rsid="004c3c48"/>
    </style:style>
    <style:style style:name="T109" style:family="text">
      <style:text-properties officeooo:rsid="004c9255"/>
    </style:style>
    <style:style style:name="T110" style:family="text">
      <style:text-properties officeooo:rsid="004c5b47"/>
    </style:style>
    <style:style style:name="T111" style:family="text">
      <style:text-properties fo:language="en" fo:country="US" fo:font-weight="bold" officeooo:rsid="004c5b47" style:font-weight-asian="bold" style:font-weight-complex="bold"/>
    </style:style>
    <style:style style:name="T112" style:family="text">
      <style:text-properties fo:language="en" fo:country="US" officeooo:rsid="00579205"/>
    </style:style>
    <style:style style:name="T113" style:family="text">
      <style:text-properties officeooo:rsid="006b1cca"/>
    </style:style>
    <style:style style:name="T114" style:family="text">
      <style:text-properties officeooo:rsid="006dfb92"/>
    </style:style>
    <style:style style:name="T115" style:family="text">
      <style:text-properties fo:font-weight="normal" officeooo:rsid="006dfb92" style:font-weight-asian="normal" style:font-weight-complex="normal" style:text-overline-style="none" style:text-overline-color="font-color"/>
    </style:style>
    <style:style style:name="T116" style:family="text">
      <style:text-properties officeooo:rsid="006ef3be"/>
    </style:style>
    <style:style style:name="T117" style:family="text">
      <style:text-properties fo:language="en" fo:country="US" fo:font-weight="normal" officeooo:rsid="006ef3be" style:font-weight-asian="normal" style:font-weight-complex="normal"/>
    </style:style>
    <style:style style:name="T118" style:family="text">
      <style:text-properties fo:language="en" fo:country="US" fo:font-weight="bold" officeooo:rsid="0066ca9b" style:font-weight-asian="bold" style:font-weight-complex="bold"/>
    </style:style>
    <style:style style:name="T119" style:family="text">
      <style:text-properties fo:language="en" fo:country="US" fo:font-weight="normal" officeooo:rsid="0066ca9b" style:font-weight-asian="normal" style:font-weight-complex="normal"/>
    </style:style>
    <style:style style:name="T120" style:family="text">
      <style:text-properties officeooo:rsid="004e43d7"/>
    </style:style>
    <style:style style:name="T121" style:family="text">
      <style:text-properties fo:language="en" fo:country="US" officeooo:rsid="004e43d7"/>
    </style:style>
    <style:style style:name="T122" style:family="text">
      <style:text-properties officeooo:rsid="004ed514"/>
    </style:style>
    <style:style style:name="T123" style:family="text">
      <style:text-properties officeooo:rsid="0021cdfb"/>
    </style:style>
    <style:style style:name="T124" style:family="text">
      <style:text-properties fo:font-family="'Courier 10 Pitch'" style:font-pitch="fixed" fo:font-weight="bold" officeooo:rsid="0021cdfb" style:font-weight-asian="bold" style:font-weight-complex="bold"/>
    </style:style>
    <style:style style:name="T125" style:family="text">
      <style:text-properties officeooo:rsid="0053ed22"/>
    </style:style>
    <style:style style:name="T126" style:family="text">
      <style:text-properties style:font-name="Courier New" fo:font-weight="bold" style:font-weight-asian="bold" style:font-weight-complex="bold"/>
    </style:style>
    <style:style style:name="T127" style:family="text">
      <style:text-properties fo:font-weight="bold" officeooo:rsid="0054cd4a" style:font-weight-asian="bold" style:font-weight-complex="bold"/>
    </style:style>
    <style:style style:name="T128" style:family="text">
      <style:text-properties style:font-name="Times New Roman1" fo:font-weight="normal" style:font-weight-asian="normal" style:font-weight-complex="normal"/>
    </style:style>
    <style:style style:name="T129" style:family="text">
      <style:text-properties style:font-name="Times New Roman1" fo:font-style="italic" fo:font-weight="normal" style:font-style-asian="italic" style:font-weight-asian="normal" style:font-style-complex="italic" style:font-weight-complex="normal"/>
    </style:style>
    <style:style style:name="T130" style:family="text">
      <style:text-properties style:font-name="Times New Roman1" fo:font-weight="normal" style:font-weight-asian="normal" style:font-weight-complex="normal" style:text-overline-style="solid" style:text-overline-width="auto" style:text-overline-color="font-color"/>
    </style:style>
    <style:style style:name="T131" style:family="text">
      <style:text-properties style:font-name="Times New Roman1" fo:font-weight="bold" style:font-weight-asian="bold" style:font-weight-complex="bold"/>
    </style:style>
    <style:style style:name="T132" style:family="text">
      <style:text-properties style:font-name="Courier New" fo:font-style="normal" fo:font-weight="bold" style:font-style-asian="normal" style:font-weight-asian="bold" style:font-style-complex="normal" style:font-weight-complex="bold"/>
    </style:style>
    <style:style style:name="T133" style:family="text">
      <style:text-properties officeooo:rsid="005dce97"/>
    </style:style>
    <style:style style:name="T134" style:family="text">
      <style:text-properties officeooo:rsid="005d425a"/>
    </style:style>
    <style:style style:name="T135" style:family="text">
      <style:text-properties style:font-name="Courier New" fo:font-weight="bold" officeooo:rsid="005dce97" style:font-weight-asian="bold" style:font-weight-complex="bold"/>
    </style:style>
    <style:style style:name="T136" style:family="text">
      <style:text-properties officeooo:rsid="00579205"/>
    </style:style>
    <style:style style:name="T137" style:family="text">
      <style:text-properties officeooo:rsid="005f797d"/>
    </style:style>
    <style:style style:name="T138" style:family="text">
      <style:text-properties officeooo:rsid="006241d4"/>
    </style:style>
    <style:style style:name="T139" style:family="text">
      <style:text-properties officeooo:rsid="00646472"/>
    </style:style>
    <style:style style:name="T140" style:family="text">
      <style:text-properties fo:font-weight="bold" officeooo:rsid="005f797d" style:font-weight-asian="bold" style:font-weight-complex="bold"/>
    </style:style>
    <style:style style:name="T141" style:family="text">
      <style:text-properties fo:font-weight="bold" officeooo:rsid="005baf30" style:font-weight-asian="bold" style:font-weight-complex="bold"/>
    </style:style>
    <style:style style:name="T142" style:family="text">
      <style:text-properties fo:font-weight="normal" officeooo:rsid="005baf30" style:font-weight-asian="normal" style:font-weight-complex="normal"/>
    </style:style>
    <style:style style:name="T143" style:family="text">
      <style:text-properties fo:font-weight="normal" officeooo:rsid="005f797d" style:font-weight-asian="normal" style:font-weight-complex="normal"/>
    </style:style>
    <style:style style:name="T144" style:family="text">
      <style:text-properties fo:font-weight="bold" officeooo:rsid="00643dab" style:font-weight-asian="bold" style:font-weight-complex="bold"/>
    </style:style>
    <style:style style:name="T145" style:family="text">
      <style:text-properties fo:font-style="italic" fo:font-weight="normal" style:font-style-asian="italic" style:font-weight-asian="normal" style:font-style-complex="italic" style:font-weight-complex="normal"/>
    </style:style>
    <style:style style:name="T146" style:family="text">
      <style:text-properties fo:language="en" fo:country="US" fo:font-style="italic" fo:font-weight="normal" style:font-style-asian="italic" style:font-weight-asian="normal" style:font-style-complex="italic" style:font-weight-complex="normal"/>
    </style:style>
    <style:style style:name="T147" style:family="text">
      <style:text-properties fo:language="ru" fo:country="RU" fo:font-style="italic" fo:font-weight="normal" style:font-style-asian="italic" style:font-weight-asian="normal" style:font-style-complex="italic" style:font-weight-complex="normal"/>
    </style:style>
    <style:style style:name="T148" style:family="text">
      <style:text-properties fo:color="#ff0000" loext:opacity="100%" fo:language="en" fo:country="US"/>
    </style:style>
    <style:style style:name="T149" style:family="text">
      <style:text-properties fo:color="#0000ff" loext:opacity="100%" fo:language="en" fo:country="US"/>
    </style:style>
    <style:style style:name="T150" style:family="text">
      <style:text-properties fo:color="#3deb3d" loext:opacity="100%" fo:language="en" fo:country="US"/>
    </style:style>
    <style:style style:name="T151" style:family="text">
      <style:text-properties fo:color="#993366" loext:opacity="100%" fo:language="en" fo:country="US"/>
    </style:style>
    <style:style style:name="T152" style:family="text">
      <style:text-properties fo:language="en" fo:country="US" officeooo:rsid="0014d131"/>
    </style:style>
    <style:style style:name="T153" style:family="text">
      <style:text-properties fo:language="ru" fo:country="RU" officeooo:rsid="0014d131"/>
    </style:style>
    <style:style style:name="T154" style:family="text">
      <style:text-properties fo:language="en" fo:country="US" fo:font-weight="normal" officeooo:rsid="0014d131" style:font-weight-asian="normal" style:font-weight-complex="normal"/>
    </style:style>
    <style:style style:name="T155" style:family="text">
      <style:text-properties fo:font-weight="normal" officeooo:rsid="0014d131" style:font-weight-asian="normal" style:font-weight-complex="normal"/>
    </style:style>
    <style:style style:name="T156" style:family="text">
      <style:text-properties style:text-underline-style="none"/>
    </style:style>
    <style:style style:name="T157" style:family="text">
      <style:text-properties officeooo:rsid="0016b359"/>
    </style:style>
    <style:style style:name="T158" style:family="text">
      <style:text-properties style:font-name="Courier New" fo:language="en" fo:country="US"/>
    </style:style>
    <style:style style:name="T159" style:family="text">
      <style:text-properties style:font-name="Courier New" fo:language="ru" fo:country="RU"/>
    </style:style>
    <style:style style:name="T160" style:family="text">
      <style:text-properties style:font-name="Courier New" fo:language="ru" fo:country="RU" fo:font-weight="bold" style:font-weight-asian="bold" style:font-weight-complex="bold"/>
    </style:style>
    <style:style style:name="T161" style:family="text">
      <style:text-properties style:font-name="Courier New" fo:language="en" fo:country="US" fo:font-weight="normal" style:font-weight-asian="normal" style:font-weight-complex="normal"/>
    </style:style>
    <style:style style:name="T162" style:family="text">
      <style:text-properties style:font-name="Times New Roman1" fo:language="ru" fo:country="RU" fo:font-weight="bold" style:font-weight-asian="bold" style:font-weight-complex="bold"/>
    </style:style>
    <style:style style:name="T163" style:family="text">
      <style:text-properties style:font-name="Times New Roman1" fo:language="ru" fo:country="RU"/>
    </style:style>
    <style:style style:name="T164" style:family="text">
      <style:text-properties style:font-name="Times New Roman1" fo:language="en" fo:country="US" fo:font-weight="bold" style:font-weight-asian="bold" style:font-weight-complex="bold"/>
    </style:style>
    <style:style style:name="T165" style:family="text">
      <style:text-properties style:font-name="Times New Roman1" fo:language="en" fo:country="US"/>
    </style:style>
    <style:style style:name="T166" style:family="text">
      <style:text-properties style:font-name="Times New Roman1" fo:font-size="12pt" fo:language="ru" fo:country="RU" style:font-size-asian="12pt" style:font-size-complex="12pt"/>
    </style:style>
    <style:style style:name="T167" style:family="text">
      <style:text-properties style:font-name="Times New Roman1" fo:font-size="12pt" fo:language="en" fo:country="US" fo:font-weight="bold" style:font-size-asian="12pt" style:font-weight-asian="bold" style:font-size-complex="12pt" style:font-weight-complex="bold"/>
    </style:style>
    <style:style style:name="T168" style:family="text">
      <style:text-properties style:font-name="Times New Roman1" fo:font-size="12pt" fo:language="ru" fo:country="RU" fo:font-weight="bold" style:font-size-asian="12pt" style:font-weight-asian="bold" style:font-size-complex="12pt" style:font-weight-complex="bold"/>
    </style:style>
    <style:style style:name="T169" style:family="text">
      <style:text-properties style:font-name="Times New Roman1" fo:font-size="12pt" style:font-size-asian="12pt" style:font-size-complex="12pt"/>
    </style:style>
    <style:style style:name="T170" style:family="text">
      <style:text-properties style:font-name="Times New Roman1" fo:font-size="12pt" fo:font-weight="bold" style:font-size-asian="12pt" style:font-weight-asian="bold" style:font-size-complex="12pt" style:font-weight-complex="bold"/>
    </style:style>
    <style:style style:name="T171" style:family="text">
      <style:text-properties style:font-name="Times New Roman1" fo:font-size="12pt" fo:font-weight="normal" style:font-size-asian="12pt" style:font-weight-asian="normal" style:font-size-complex="12pt" style:font-weight-complex="normal"/>
    </style:style>
    <style:style style:name="T172" style:family="text">
      <style:text-properties fo:language="ru" fo:country="RU" officeooo:rsid="00668355"/>
    </style:style>
    <style:style style:name="T173" style:family="text">
      <style:text-properties fo:language="ru" fo:country="RU" fo:font-weight="bold" officeooo:rsid="00668355" style:font-weight-asian="bold" style:font-weight-complex="bold"/>
    </style:style>
    <style:style style:name="T174" style:family="text">
      <style:text-properties fo:language="en" fo:country="US" fo:font-weight="bold" officeooo:rsid="00668355" style:font-weight-asian="bold" style:font-weight-complex="bold"/>
    </style:style>
    <style:style style:name="T175" style:family="text">
      <style:text-properties fo:language="en" fo:country="US" officeooo:rsid="00668355"/>
    </style:style>
    <style:style style:name="T176" style:family="text">
      <style:text-properties fo:language="ru" fo:country="RU" officeooo:rsid="0034d631"/>
    </style:style>
    <style:style style:name="T177" style:family="text">
      <style:text-properties fo:language="ru" fo:country="RU" officeooo:rsid="00384978"/>
    </style:style>
    <style:style style:name="T178" style:family="text">
      <style:text-properties fo:language="ru" fo:country="RU" officeooo:rsid="00354bc7"/>
    </style:style>
    <style:style style:name="T179" style:family="text">
      <style:text-properties fo:language="ru" fo:country="RU" officeooo:rsid="0038f7df"/>
    </style:style>
    <style:style style:name="T180" style:family="text">
      <style:text-properties fo:language="en" fo:country="US" officeooo:rsid="00319d95"/>
    </style:style>
    <style:style style:name="T181" style:family="text">
      <style:text-properties officeooo:rsid="002a3ac5"/>
    </style:style>
    <style:style style:name="T182" style:family="text">
      <style:text-properties fo:font-weight="bold" officeooo:rsid="002a3ac5" style:font-weight-asian="bold" style:font-weight-complex="bold"/>
    </style:style>
    <style:style style:name="T183" style:family="text">
      <style:text-properties fo:language="en" fo:country="US" officeooo:rsid="00514345"/>
    </style:style>
    <style:style style:name="T184" style:family="text">
      <style:text-properties officeooo:rsid="001686ad"/>
    </style:style>
    <style:style style:name="T185" style:family="text">
      <style:text-properties officeooo:rsid="002d3618"/>
    </style:style>
    <style:style style:name="T186" style:family="text">
      <style:text-properties officeooo:rsid="00514345"/>
    </style:style>
    <style:style style:name="T187" style:family="text">
      <style:text-properties officeooo:rsid="002149b4"/>
    </style:style>
    <style:style style:name="T188" style:family="text">
      <style:text-properties officeooo:rsid="006c7b8f"/>
    </style:style>
    <style:style style:name="T189" style:family="text">
      <style:text-properties fo:language="ru" fo:country="RU" officeooo:rsid="00673888"/>
    </style:style>
    <style:style style:name="T190" style:family="text">
      <style:text-properties fo:language="en" fo:country="US" officeooo:rsid="00673888"/>
    </style:style>
    <style:style style:name="T191" style:family="text">
      <style:text-properties fo:language="ru" fo:country="RU" officeooo:rsid="00514345"/>
    </style:style>
    <style:style style:name="T192" style:family="text">
      <style:text-properties style:font-name="Arial" fo:font-size="14pt" fo:font-style="italic" fo:font-weight="bold" officeooo:rsid="0041c32d" style:font-name-asian="MS Mincho" style:font-size-asian="14pt" style:font-style-asian="italic" style:font-weight-asian="bold" style:font-name-complex="Tahoma1" style:font-size-complex="14pt" style:font-style-complex="italic" style:font-weight-complex="bold"/>
    </style:style>
    <style:style style:name="T193" style:family="text">
      <style:text-properties officeooo:rsid="0041c32d"/>
    </style:style>
    <style:style style:name="T194" style:family="text">
      <style:text-properties fo:language="ru" fo:country="RU" officeooo:rsid="0041c32d"/>
    </style:style>
    <style:style style:name="T195" style:family="text">
      <style:text-properties fo:language="en" fo:country="US" officeooo:rsid="0021cdfb"/>
    </style:style>
    <style:style style:name="T196" style:family="text">
      <style:text-properties officeooo:rsid="0014d13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Frame">
      <style:graphic-properties style:vertical-pos="from-top" style:vertical-rel="page" style:horizontal-pos="from-left" style:horizontal-rel="pag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11">
      <text:list-level-style-bullet text:level="1" text:style-name="Bullet_20_Symbols" loext:num-list-format=" %1%" style:num-prefix=" "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loext:num-list-format=" %2%" style:num-prefix=" "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loext:num-list-format=" %3%" style:num-prefix=" "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loext:num-list-format=" %4%" style:num-prefix=" "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loext:num-list-format=" %5%" style:num-prefix=" "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loext:num-list-format=" %6%" style:num-prefix=" "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loext:num-list-format=" %7%" style:num-prefix=" "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loext:num-list-format=" %8%" style:num-prefix=" "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loext:num-list-format=" %9%" style:num-prefix=" "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loext:num-list-format=" %10%" style:num-prefix=" "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
      </text:sequence-decls>
      <draw:frame draw:style-name="fr4" draw:name="Врезка1" text:anchor-type="page" text:anchor-page-number="1" svg:x="0.7992in" svg:y="10.1811in" svg:width="6.6681in" draw:z-index="0">
        <draw:text-box fo:min-height="0.7165in">
          <text:p text:style-name="P300"><text:span text:style-name="T1">(версия от </text:span><text:span text:style-name="T1"><text:date style:data-style-name="N36" text:date-value="2026-01-01T23:20:33.872622018">01.01.2026</text:date></text:span><text:span text:style-name="T1">)</text:span></text:p>
          <text:p text:style-name="P301">www.nedopc.com</text:p>
        </draw:text-box>
      </draw:frame>
      <text:p text:style-name="P1"/>
      <text:p text:style-name="P2"/>
      <text:p text:style-name="P2"><text:span text:style-name="T1">Базовая конфигурация для</text:span> <text:span text:style-name="T2">ZX Evolution</text:span><text:span text:style-name="T1">.</text:span></text:p>
      <text:p text:style-name="P3">Руководство пользователя.</text:p>
      <text:p text:style-name="P4"/>
      <text:p text:style-name="P5"/>
      <text:p text:style-name="P5"/>
      <text:p text:style-name="P5"><draw:frame draw:style-name="fr1" draw:name="Графический объект7" text:anchor-type="paragraph" svg:width="6.6925in" svg:height="5.3866in" draw:z-index="1"><draw:image xlink:href="Pictures/10000000000008A2000006F319D8BFCF.jpg" xlink:type="simple" xlink:show="embed" xlink:actuate="onLoad" draw:mime-type="image/jpeg"/></draw:frame></text:p>
      <text:p text:style-name="P5"/>
      <text:p text:style-name="P5"/>
      <text:p text:style-name="P5"/>
      <text:p text:style-name="P6"/>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7">Оглавление</text:p>
          </text:index-title>
          <text:p text:style-name="P8"><text:a xlink:type="simple" xlink:href="#__RefHeading__20445_459111283" text:style-name="Index_20_Link" text:visited-style-name="Index_20_Link"><text:s/>1 Введение<text:tab/>5</text:a></text:p>
          <text:p text:style-name="P8"><text:a xlink:type="simple" xlink:href="#__RefHeading__20447_459111283" text:style-name="Index_20_Link" text:visited-style-name="Index_20_Link"><text:s/>2 Управляющие контакты компьютера<text:tab/>6</text:a></text:p>
          <text:p text:style-name="P9"><text:a xlink:type="simple" xlink:href="#__RefHeading__20449_459111283" text:style-name="Index_20_Link" text:visited-style-name="Index_20_Link"><text:s/>2.1 Hard reset (полный сброс)<text:tab/>6</text:a></text:p>
          <text:p text:style-name="P9"><text:a xlink:type="simple" xlink:href="#__RefHeading__20451_459111283" text:style-name="Index_20_Link" text:visited-style-name="Index_20_Link"><text:s/>2.2 Soft reset (мягкий сброс)<text:tab/>6</text:a></text:p>
          <text:p text:style-name="P9"><text:a xlink:type="simple" xlink:href="#__RefHeading__20453_459111283" text:style-name="Index_20_Link" text:visited-style-name="Index_20_Link"><text:s/>2.3 NMI (подача немаскируемого прерывания на процессор Z80)<text:tab/>6</text:a></text:p>
          <text:p text:style-name="P8"><text:a xlink:type="simple" xlink:href="#__RefHeading__20455_459111283" text:style-name="Index_20_Link" text:visited-style-name="Index_20_Link"><text:s/>3 Дополнительные функции PS2 клавиатуры<text:tab/>7</text:a></text:p>
          <text:p text:style-name="P9"><text:a xlink:type="simple" xlink:href="#__RefHeading__20457_459111283" text:style-name="Index_20_Link" text:visited-style-name="Index_20_Link"><text:s/>3.1 Мягкий сброс компьютера (soft reset)<text:tab/>7</text:a></text:p>
          <text:p text:style-name="P9"><text:a xlink:type="simple" xlink:href="#__RefHeading__20459_459111283" text:style-name="Index_20_Link" text:visited-style-name="Index_20_Link"><text:s/>3.2 Полный сброс компьютера (hard reset)<text:tab/>7</text:a></text:p>
          <text:p text:style-name="P9"><text:a xlink:type="simple" xlink:href="#__RefHeading__20461_459111283" text:style-name="Index_20_Link" text:visited-style-name="Index_20_Link"><text:s/>3.3 Переключение режима видеовыхода (TV/VGA)<text:tab/>7</text:a></text:p>
          <text:p text:style-name="P9"><text:a xlink:type="simple" xlink:href="#__RefHeading__20463_459111283" text:style-name="Index_20_Link" text:visited-style-name="Index_20_Link"><text:s/>3.4 Переключение режима аудиовыхода (beeper/tapeout)<text:tab/>8</text:a></text:p>
          <text:p text:style-name="P9"><text:a xlink:type="simple" xlink:href="#__RefHeading__4640_325448479" text:style-name="Index_20_Link" text:visited-style-name="Index_20_Link"><text:s/>3.5 Подача NMI (немаскируемого прерывания) на процессор Z80<text:tab/>8</text:a></text:p>
          <text:p text:style-name="P9"><text:a xlink:type="simple" xlink:href="#__RefHeading__20465_459111283" text:style-name="Index_20_Link" text:visited-style-name="Index_20_Link"><text:s/>3.6 Регулировка разрешения PS/2 мыши<text:tab/>8</text:a></text:p>
          <text:p text:style-name="P8"><text:a xlink:type="simple" xlink:href="#__RefHeading__20467_459111283" text:style-name="Index_20_Link" text:visited-style-name="Index_20_Link"><text:s/>4 Архитектура: общие положения<text:tab/>10</text:a></text:p>
          <text:p text:style-name="P8"><text:a xlink:type="simple" xlink:href="#__RefHeading__11062_959909826" text:style-name="Index_20_Link" text:visited-style-name="Index_20_Link"><text:s/>5 Архитектура: управление памятью<text:tab/>11</text:a></text:p>
          <text:p text:style-name="P8"><text:a xlink:type="simple" xlink:href="#__RefHeading__11020_959909826" text:style-name="Index_20_Link" text:visited-style-name="Index_20_Link"><text:s/>6 Архитектура: управление скоростью процессора<text:tab/>15</text:a></text:p>
          <text:p text:style-name="P8"><text:a xlink:type="simple" xlink:href="#__RefHeading__20469_459111283" text:style-name="Index_20_Link" text:visited-style-name="Index_20_Link"><text:s/>7 Архитектура: видеорежимы<text:tab/>15</text:a></text:p>
          <text:p text:style-name="P9"><text:a xlink:type="simple" xlink:href="#__RefHeading__11018_959909826" text:style-name="Index_20_Link" text:visited-style-name="Index_20_Link"><text:s/>7.1 Выбор видеорежимов<text:tab/>15</text:a></text:p>
          <text:p text:style-name="P9"><text:a xlink:type="simple" xlink:href="#__RefHeading__11064_959909826" text:style-name="Index_20_Link" text:visited-style-name="Index_20_Link"><text:s/>7.2 Палитра<text:tab/>16</text:a></text:p>
          <text:p text:style-name="P10"><text:a xlink:type="simple" xlink:href="#__RefHeading___Toc8132_3082233168" text:style-name="Index_20_Link" text:visited-style-name="Index_20_Link"><text:s/>7.2.1 Расширенный цветовой диапазон<text:tab/>17</text:a></text:p>
          <text:p text:style-name="P9"><text:a xlink:type="simple" xlink:href="#__RefHeading__11777_959909826" text:style-name="Index_20_Link" text:visited-style-name="Index_20_Link"><text:s/>7.3 Бордюр<text:tab/>17</text:a></text:p>
          <text:p text:style-name="P9"><text:a xlink:type="simple" xlink:href="#__RefHeading__11166_959909826" text:style-name="Index_20_Link" text:visited-style-name="Index_20_Link"><text:s/>7.4 Адресация видеорежимов<text:tab/>18</text:a></text:p>
          <text:p text:style-name="P10"><text:a xlink:type="simple" xlink:href="#__RefHeading__20471_459111283" text:style-name="Index_20_Link" text:visited-style-name="Index_20_Link"><text:s/>7.4.1 Стандартный ZX-режим<text:tab/>18</text:a></text:p>
          <text:p text:style-name="P10"><text:a xlink:type="simple" xlink:href="#__RefHeading__20473_459111283" text:style-name="Index_20_Link" text:visited-style-name="Index_20_Link"><text:s/>7.4.2 ZX hardware multicolor<text:tab/>18</text:a></text:p>
          <text:p text:style-name="P10"><text:a xlink:type="simple" xlink:href="#__RefHeading__20475_459111283" text:style-name="Index_20_Link" text:visited-style-name="Index_20_Link"><text:s/>7.4.3 ZX 256x192 16 цветов<text:tab/>18</text:a></text:p>
          <text:p text:style-name="P10"><text:a xlink:type="simple" xlink:href="#__RefHeading__20477_459111283" text:style-name="Index_20_Link" text:visited-style-name="Index_20_Link"><text:s/>7.4.4 ATM 640x200 hardware multicolor<text:tab/>19</text:a></text:p>
          <text:p text:style-name="P10"><text:a xlink:type="simple" xlink:href="#__RefHeading__20479_459111283" text:style-name="Index_20_Link" text:visited-style-name="Index_20_Link"><text:s/>7.4.5 ATM 320x200 16 цветов<text:tab/>19</text:a></text:p>
          <text:p text:style-name="P10"><text:a xlink:type="simple" xlink:href="#__RefHeading__20481_459111283" text:style-name="Index_20_Link" text:visited-style-name="Index_20_Link"><text:s/>7.4.6 ATM текстовый режим 80x25<text:tab/>19</text:a></text:p>
          <text:p text:style-name="P10"><text:a xlink:type="simple" xlink:href="#__RefHeading__20483_459111283" text:style-name="Index_20_Link" text:visited-style-name="Index_20_Link"><text:s/>7.4.7 ATM-подобный текстовый режим 80x25 в одной странице<text:tab/>20</text:a></text:p>
          <text:p text:style-name="P10"><text:a xlink:type="simple" xlink:href="#__RefHeading__20485_459111283" text:style-name="Index_20_Link" text:visited-style-name="Index_20_Link"><text:s/>7.4.8 Загрузка шрифта для текстового режима<text:tab/>21</text:a></text:p>
          <text:p text:style-name="P10"><text:a xlink:type="simple" xlink:href="#__RefHeading__20487_459111283" text:style-name="Index_20_Link" text:visited-style-name="Index_20_Link"><text:s/>7.4.9 Считывание шрифта текстового режима<text:tab/>21</text:a></text:p>
          <text:p text:style-name="P9"><text:a xlink:type="simple" xlink:href="#__RefHeading__7144_1922218393" text:style-name="Index_20_Link" text:visited-style-name="Index_20_Link"><text:s/>7.5 ULAPLUS<text:tab/>21</text:a></text:p>
          <text:p text:style-name="P8"><text:a xlink:type="simple" xlink:href="#__RefHeading___Toc8793_178822302" text:style-name="Index_20_Link" text:visited-style-name="Index_20_Link"><text:s/>8 Архитектура: маскируемые прерывания<text:tab/>23</text:a></text:p>
          <text:p text:style-name="P9"><text:a xlink:type="simple" xlink:href="#__RefHeading___Toc8795_178822302" text:style-name="Index_20_Link" text:visited-style-name="Index_20_Link"><text:s/>8.1 Традиционный подход к прерываниям<text:tab/>23</text:a></text:p>
          <text:p text:style-name="P9"><text:a xlink:type="simple" xlink:href="#__RefHeading___Toc8797_178822302" text:style-name="Index_20_Link" text:visited-style-name="Index_20_Link"><text:s/>8.2 Как улучшить прерывания<text:tab/>23</text:a></text:p>
          <text:p text:style-name="P9"><text:a xlink:type="simple" xlink:href="#__RefHeading___Toc8397_1603396926" text:style-name="Index_20_Link" text:visited-style-name="Index_20_Link"><text:s/>8.3 «Традиционные» прерывания<text:tab/>24</text:a></text:p>
          <text:p text:style-name="P9"><text:a xlink:type="simple" xlink:href="#__RefHeading___Toc8399_1603396926" text:style-name="Index_20_Link" text:visited-style-name="Index_20_Link"><text:s/>8.4 «Улучшенные» прерывания<text:tab/>25</text:a></text:p>
          <text:p text:style-name="P8"><text:a xlink:type="simple" xlink:href="#__RefHeading__20489_459111283" text:style-name="Index_20_Link" text:visited-style-name="Index_20_Link"><text:s/>9 Архитектура: порты чтения конфигурации и NMI<text:tab/>26</text:a></text:p>
          <text:p text:style-name="P9"><text:a xlink:type="simple" xlink:href="#__RefHeading__20491_459111283" text:style-name="Index_20_Link" text:visited-style-name="Index_20_Link"><text:s/>9.1 Порт #BF (чтение)<text:tab/>26</text:a></text:p>
          <text:p text:style-name="P9"><text:a xlink:type="simple" xlink:href="#__RefHeading___Toc9330_2489220154" text:style-name="Index_20_Link" text:visited-style-name="Index_20_Link"><text:s/>9.2 Порт #BE (запись)<text:tab/>26</text:a></text:p>
          <text:p text:style-name="P9"><text:a xlink:type="simple" xlink:href="#__RefHeading__11538_959909826" text:style-name="Index_20_Link" text:visited-style-name="Index_20_Link"><text:s/>9.3 Порт #xxBD (чтение и запись)<text:tab/>26</text:a></text:p>
          <text:p text:style-name="P9"><text:a xlink:type="simple" xlink:href="#__RefHeading__6894_101198354" text:style-name="Index_20_Link" text:visited-style-name="Index_20_Link"><text:s/>9.4 Аппаратная ловушка (порты #10BD, #11BD)<text:tab/>28</text:a></text:p>
          <text:p text:style-name="P9"><text:a xlink:type="simple" xlink:href="#__RefHeading__20493_459111283" text:style-name="Index_20_Link" text:visited-style-name="Index_20_Link"><text:s/>9.5 Вход в NMI<text:tab/>29</text:a></text:p>
          <text:p text:style-name="P9"><text:a xlink:type="simple" xlink:href="#__RefHeading__20495_459111283" text:style-name="Index_20_Link" text:visited-style-name="Index_20_Link"><text:s/>9.6 Выход из NMI<text:tab/>29</text:a></text:p>
          <text:p text:style-name="P9"><text:a xlink:type="simple" xlink:href="#__RefHeading___Toc7986_4047076958" text:style-name="Index_20_Link" text:visited-style-name="Index_20_Link"><text:s/>9.7 Режим «trdos emulation»<text:tab/>30</text:a></text:p>
          <text:p text:style-name="P10"><text:a xlink:type="simple" xlink:href="#__RefHeading___Toc7988_4047076958" text:style-name="Index_20_Link" text:visited-style-name="Index_20_Link"><text:s/>9.7.1 Вход в «trdos emulation»<text:tab/>30</text:a></text:p>
          <text:p text:style-name="P10"><text:a xlink:type="simple" xlink:href="#__RefHeading___Toc7990_4047076958" text:style-name="Index_20_Link" text:visited-style-name="Index_20_Link"><text:s/>9.7.2 Выход из «trdos emulation»<text:tab/>31</text:a></text:p>
          <text:p text:style-name="P10"><text:a xlink:type="simple" xlink:href="#__RefHeading___Toc7992_4047076958" text:style-name="Index_20_Link" text:visited-style-name="Index_20_Link"><text:s/>9.7.3 Комбинация режимов «NMI» и «trdos emulation»<text:tab/>31</text:a></text:p>
          <text:p text:style-name="P8"><text:a xlink:type="simple" xlink:href="#__RefHeading__20497_459111283" text:style-name="Index_20_Link" text:visited-style-name="Index_20_Link"><text:soft-page-break/><text:s/>10 Архитектура: порты ввода-вывода<text:tab/>31</text:a></text:p>
          <text:p text:style-name="P9"><text:a xlink:type="simple" xlink:href="#__RefHeading__11697_959909826" text:style-name="Index_20_Link" text:visited-style-name="Index_20_Link"><text:s/>10.1 Порт #FE<text:tab/>31</text:a></text:p>
          <text:p text:style-name="P9"><text:a xlink:type="simple" xlink:href="#__RefHeading__11864_959909826" text:style-name="Index_20_Link" text:visited-style-name="Index_20_Link"><text:s/>10.2 Порт COVOX (#xxFB, WO always)<text:tab/>31</text:a></text:p>
          <text:p text:style-name="P9"><text:a xlink:type="simple" xlink:href="#__RefHeading__20499_459111283" text:style-name="Index_20_Link" text:visited-style-name="Index_20_Link"><text:s/>10.3 Порты AY/YM<text:tab/>31</text:a></text:p>
          <text:p text:style-name="P9"><text:a xlink:type="simple" xlink:href="#__RefHeading__11955_959909826" text:style-name="Index_20_Link" text:visited-style-name="Index_20_Link"><text:s/>10.4 Порт Kempston Joystick<text:tab/>32</text:a></text:p>
          <text:p text:style-name="P9"><text:a xlink:type="simple" xlink:href="#__RefHeading__12138_959909826" text:style-name="Index_20_Link" text:visited-style-name="Index_20_Link"><text:s/>10.5 Порты Kempston Mouse<text:tab/>32</text:a></text:p>
          <text:p text:style-name="P9"><text:a xlink:type="simple" xlink:href="#__RefHeading__1028_817451688" text:style-name="Index_20_Link" text:visited-style-name="Index_20_Link"><text:s/>10.6 Порты управления часами и NVRAM<text:tab/>33</text:a></text:p>
          <text:p text:style-name="P10"><text:a xlink:type="simple" xlink:href="#__RefHeading__20501_459111283" text:style-name="Index_20_Link" text:visited-style-name="Index_20_Link"><text:s/>10.6.1 Чтение версии базовой конфигурации/бутлоадера.<text:tab/>36</text:a></text:p>
          <text:p text:style-name="P10"><text:a xlink:type="simple" xlink:href="#__RefHeading__4894_476572230" text:style-name="Index_20_Link" text:visited-style-name="Index_20_Link"><text:s/>10.6.2 Доступ к PS/2 клавиатуре.<text:tab/>37</text:a></text:p>
          <text:p text:style-name="P10"><text:a xlink:type="simple" xlink:href="#__RefHeading__6908_304593484" text:style-name="Index_20_Link" text:visited-style-name="Index_20_Link"><text:s/>10.6.3 Доступ к EEPROM (энергонезависимой памяти) ATMEGA128.<text:tab/>37</text:a></text:p>
          <text:p text:style-name="P10"><text:a xlink:type="simple" xlink:href="#__RefHeading__7146_1922218393" text:style-name="Index_20_Link" text:visited-style-name="Index_20_Link"><text:s/>10.6.4 Доступ к флагам состояния конфигурации компьютера.<text:tab/>38</text:a></text:p>
          <text:p text:style-name="P9"><text:a xlink:type="simple" xlink:href="#__RefHeading__12239_959909826" text:style-name="Index_20_Link" text:visited-style-name="Index_20_Link"><text:s/>10.7 Доступ к SD-карте.<text:tab/>39</text:a></text:p>
          <text:p text:style-name="P9"><text:a xlink:type="simple" xlink:href="#__RefHeading__12342_959909826" text:style-name="Index_20_Link" text:visited-style-name="Index_20_Link"><text:s/>10.8 Доступ к IDE-устройствам.<text:tab/>40</text:a></text:p>
          <text:p text:style-name="P9"><text:a xlink:type="simple" xlink:href="#__RefHeading__12344_959909826" text:style-name="Index_20_Link" text:visited-style-name="Index_20_Link"><text:s/>10.9 Порты контроллера дисковода<text:tab/>42</text:a></text:p>
          <text:p text:style-name="P9"><text:a xlink:type="simple" xlink:href="#__RefHeading__12451_959909826" text:style-name="Index_20_Link" text:visited-style-name="Index_20_Link"><text:s/>10.10 Порт RS232 (коммуникационный интерфейс)<text:tab/>43</text:a></text:p>
          <text:p text:style-name="P10"><text:a xlink:type="simple" xlink:href="#__RefHeading__20503_459111283" text:style-name="Index_20_Link" text:visited-style-name="Index_20_Link"><text:s/>10.10.1 Регистр данных (DAT)<text:tab/>44</text:a></text:p>
          <text:p text:style-name="P10"><text:a xlink:type="simple" xlink:href="#__RefHeading__20505_459111283" text:style-name="Index_20_Link" text:visited-style-name="Index_20_Link"><text:s/>10.10.2 Регистры делителя (DLL,DLM)<text:tab/>44</text:a></text:p>
          <text:p text:style-name="P10"><text:a xlink:type="simple" xlink:href="#__RefHeading__20507_459111283" text:style-name="Index_20_Link" text:visited-style-name="Index_20_Link"><text:s/>10.10.3 Регистр управления FIFO (FCR)<text:tab/>45</text:a></text:p>
          <text:p text:style-name="P10"><text:a xlink:type="simple" xlink:href="#__RefHeading__20509_459111283" text:style-name="Index_20_Link" text:visited-style-name="Index_20_Link"><text:s/>10.10.4 Регистр управления линией (LCR)<text:tab/>45</text:a></text:p>
          <text:p text:style-name="P10"><text:a xlink:type="simple" xlink:href="#__RefHeading__20511_459111283" text:style-name="Index_20_Link" text:visited-style-name="Index_20_Link"><text:s/>10.10.5 Регистр управления модемом (MCR)<text:tab/>45</text:a></text:p>
          <text:p text:style-name="P10"><text:a xlink:type="simple" xlink:href="#__RefHeading__20513_459111283" text:style-name="Index_20_Link" text:visited-style-name="Index_20_Link"><text:s/>10.10.6 Регистр статуса линии (LSR)<text:tab/>46</text:a></text:p>
          <text:p text:style-name="P10"><text:a xlink:type="simple" xlink:href="#__RefHeading__20515_459111283" text:style-name="Index_20_Link" text:visited-style-name="Index_20_Link"><text:s/>10.10.7 Регистр статуса модема (MSR)<text:tab/>46</text:a></text:p>
          <text:p text:style-name="P10"><text:a xlink:type="simple" xlink:href="#__RefHeading__20517_459111283" text:style-name="Index_20_Link" text:visited-style-name="Index_20_Link"><text:s/>10.10.8 Пользовательский регистр (SPR)<text:tab/>46</text:a></text:p>
          <text:p text:style-name="P8"><text:a xlink:type="simple" xlink:href="#__RefHeading__10979_959909826" text:style-name="Index_20_Link" text:visited-style-name="Index_20_Link"><text:s/>11 Сводная таблица портов<text:tab/>47</text:a></text:p>
          <text:p text:style-name="P8"><text:a xlink:type="simple" xlink:href="#__RefHeading__20519_459111283" text:style-name="Index_20_Link" text:visited-style-name="Index_20_Link"><text:s/>12 История версий документа<text:tab/>51</text:a></text:p>
          <text:p text:style-name="P9"><text:a xlink:type="simple" xlink:href="#__RefHeading___Toc25473_993949196" text:style-name="Index_20_Link" text:visited-style-name="Index_20_Link"><text:s/>12.1 Версия 23.07.2024<text:tab/>51</text:a></text:p>
          <text:p text:style-name="P9"><text:a xlink:type="simple" xlink:href="#__RefHeading___Toc7994_4047076958" text:style-name="Index_20_Link" text:visited-style-name="Index_20_Link"><text:s/>12.2 Версия 08.10.2023<text:tab/>51</text:a></text:p>
          <text:p text:style-name="P9"><text:a xlink:type="simple" xlink:href="#__RefHeading___Toc7996_4047076958" text:style-name="Index_20_Link" text:visited-style-name="Index_20_Link"><text:s/>12.3 Версия 04.12.2022<text:tab/>51</text:a></text:p>
          <text:p text:style-name="P9"><text:a xlink:type="simple" xlink:href="#__RefHeading___Toc7862_3140968079" text:style-name="Index_20_Link" text:visited-style-name="Index_20_Link"><text:s/>12.4 Версия 25.12.2021<text:tab/>51</text:a></text:p>
          <text:p text:style-name="P9"><text:a xlink:type="simple" xlink:href="#__RefHeading__8044_20958821051" text:style-name="Index_20_Link" text:visited-style-name="Index_20_Link"><text:s/>12.5 Версия <text:span text:style-name="T3">22</text:span>.11.2021<text:tab/>51</text:a></text:p>
          <text:p text:style-name="P9"><text:a xlink:type="simple" xlink:href="#__RefHeading__8044_2095882105" text:style-name="Index_20_Link" text:visited-style-name="Index_20_Link"><text:s/>12.6 Версия 27.10.2014<text:tab/>51</text:a></text:p>
          <text:p text:style-name="P9"><text:a xlink:type="simple" xlink:href="#__RefHeading__28853_121678263" text:style-name="Index_20_Link" text:visited-style-name="Index_20_Link"><text:s/>12.7 Версия 01.10.2014<text:tab/>51</text:a></text:p>
          <text:p text:style-name="P9"><text:a xlink:type="simple" xlink:href="#__RefHeading__7148_1922218393" text:style-name="Index_20_Link" text:visited-style-name="Index_20_Link"><text:s/>12.8 Версия 29.09.2014<text:tab/>51</text:a></text:p>
          <text:p text:style-name="P9"><text:a xlink:type="simple" xlink:href="#__RefHeading__7150_1922218393" text:style-name="Index_20_Link" text:visited-style-name="Index_20_Link"><text:s/>12.9 Версия 18.05.2014<text:tab/>51</text:a></text:p>
          <text:p text:style-name="P9"><text:a xlink:type="simple" xlink:href="#__RefHeading__7050_304593484" text:style-name="Index_20_Link" text:visited-style-name="Index_20_Link"><text:s/>12.10 Версия 15.05.2014<text:tab/>52</text:a></text:p>
          <text:p text:style-name="P9"><text:a xlink:type="simple" xlink:href="#__RefHeading__6605_1274384796" text:style-name="Index_20_Link" text:visited-style-name="Index_20_Link"><text:s/>12.11 Версия 13.04.2014<text:tab/>52</text:a></text:p>
          <text:p text:style-name="P9"><text:a xlink:type="simple" xlink:href="#__RefHeading__6896_101198354" text:style-name="Index_20_Link" text:visited-style-name="Index_20_Link"><text:s/>12.12 Версия 08.11.2013<text:tab/>52</text:a></text:p>
          <text:p text:style-name="P9"><text:a xlink:type="simple" xlink:href="#__RefHeading__6898_101198354" text:style-name="Index_20_Link" text:visited-style-name="Index_20_Link"><text:s/>12.13 Версия 29.11.2012<text:tab/>52</text:a></text:p>
          <text:p text:style-name="P9"><text:a xlink:type="simple" xlink:href="#__RefHeading__20521_459111283" text:style-name="Index_20_Link" text:visited-style-name="Index_20_Link"><text:s/>12.14 Версия 13.02.2012<text:tab/>52</text:a></text:p>
          <text:p text:style-name="P9"><text:a xlink:type="simple" xlink:href="#__RefHeading__20523_459111283" text:style-name="Index_20_Link" text:visited-style-name="Index_20_Link"><text:s/>12.15 Версия 29.09.2011<text:tab/>52</text:a></text:p>
          <text:p text:style-name="P9"><text:a xlink:type="simple" xlink:href="#__RefHeading__20525_459111283" text:style-name="Index_20_Link" text:visited-style-name="Index_20_Link"><text:s/>12.16 Версия 11.06.2011<text:tab/>52</text:a></text:p>
          <text:p text:style-name="P9"><text:a xlink:type="simple" xlink:href="#__RefHeading__20527_459111283" text:style-name="Index_20_Link" text:visited-style-name="Index_20_Link"><text:s/>12.17 Версия 11.05.2011<text:tab/>53</text:a></text:p>
          <text:p text:style-name="P9"><text:a xlink:type="simple" xlink:href="#__RefHeading__20529_459111283" text:style-name="Index_20_Link" text:visited-style-name="Index_20_Link"><text:s/>12.18 Версия 26.04.2011<text:tab/>53</text:a></text:p>
          <text:p text:style-name="P9"><text:a xlink:type="simple" xlink:href="#__RefHeading__20531_459111283" text:style-name="Index_20_Link" text:visited-style-name="Index_20_Link"><text:s/>12.19 Версия 30.03.2011<text:tab/>53</text:a></text:p>
          <text:p text:style-name="P9"><text:a xlink:type="simple" xlink:href="#__RefHeading__20533_459111283" text:style-name="Index_20_Link" text:visited-style-name="Index_20_Link"><text:s/>12.20 Версия 07.12.2010<text:tab/>53</text:a></text:p>
          <text:p text:style-name="P9"><text:a xlink:type="simple" xlink:href="#__RefHeading__20535_459111283" text:style-name="Index_20_Link" text:visited-style-name="Index_20_Link"><text:s/>12.21 Версия 29.11.2010<text:tab/>53</text:a></text:p>
          <text:p text:style-name="P9"><text:a xlink:type="simple" xlink:href="#__RefHeading__20537_459111283" text:style-name="Index_20_Link" text:visited-style-name="Index_20_Link"><text:s/>12.22 Версия 17.10.2010<text:tab/>53</text:a></text:p>
          <text:p text:style-name="P9"><text:a xlink:type="simple" xlink:href="#__RefHeading__20539_459111283" text:style-name="Index_20_Link" text:visited-style-name="Index_20_Link"><text:s/>12.23 Версия 30.03.2010<text:tab/>54</text:a></text:p>
          <text:p text:style-name="P9"><text:a xlink:type="simple" xlink:href="#__RefHeading__20541_459111283" text:style-name="Index_20_Link" text:visited-style-name="Index_20_Link"><text:soft-page-break/><text:s/>12.24 Версия 28.03.2010<text:tab/>54</text:a></text:p>
          <text:p text:style-name="P9"><text:a xlink:type="simple" xlink:href="#__RefHeading__20543_459111283" text:style-name="Index_20_Link" text:visited-style-name="Index_20_Link"><text:s/>12.25 Версия 24.03.2010<text:tab/>54</text:a></text:p>
          <text:p text:style-name="P9"><text:a xlink:type="simple" xlink:href="#__RefHeading__20545_459111283" text:style-name="Index_20_Link" text:visited-style-name="Index_20_Link"><text:s/>12.26 Версия 10.03.2010<text:tab/>54</text:a></text:p>
          <text:p text:style-name="P9"><text:a xlink:type="simple" xlink:href="#__RefHeading__20547_459111283" text:style-name="Index_20_Link" text:visited-style-name="Index_20_Link"><text:s/>12.27 Версия 04.02.2010<text:tab/>54</text:a></text:p>
        </text:index-body>
      </text:table-of-content>
      <text:p text:style-name="Text_20_body"/>
      <text:h text:style-name="P11" text:outline-level="1"><text:bookmark-start text:name="__RefHeading__20445_459111283"/>Введение<text:bookmark-end text:name="__RefHeading__20445_459111283"/></text:h>
      <text:p text:style-name="P6">Под базовой конфигурацией компьютера <text:span text:style-name="T2">ZX Evolution </text:span>подразумевается конфигурация, которая поставляется и поддерживается производителем. Производитель осуществляет поддержку и развитие этой конфигурации и исправление найденных в ней ошибок. Группа <text:span text:style-name="T2">NedoPC </text:span>не поддерживает конфигурации сторонних разработчиков, в случае проблем с такими конфигурациями, обращайтесь непосредственно к их разработчикам.</text:p>
      <text:p text:style-name="P6">Базовая конфигурация состоит из следующих компонент:</text:p>
      <text:list text:style-name="L1">
        <text:list-item>
          <text:p text:style-name="P12"><text:span text:style-name="T1">Конфигурация для </text:span><text:span text:style-name="T2">FPGA EP1K50QC208;</text:span></text:p>
        </text:list-item>
        <text:list-item>
          <text:p text:style-name="P13">Программа для микроконтроллера <text:span text:style-name="T2">ATMEGA128.</text:span></text:p>
        </text:list-item>
      </text:list>
      <text:p text:style-name="P6">Конфигурация поставляется в виде бинарного файла (<text:span text:style-name="T2">zxevo_fw.bin</text:span>), который можно загрузить в микроконтроллер <text:span text:style-name="T2">ATMEGA128 </text:span>с помощью <text:span text:style-name="T2">BOOTLOADER</text:span><text:span text:style-name="T2"><text:note text:id="ftn1" text:note-class="footnote"><text:note-citation>1</text:note-citation><text:note-body><text:p text:style-name="P14">BOOTLOADER —<text:span text:style-name="T1"> базовый загрузчик. Неизменяемая часть памяти микроконтроллера </text:span>ATMEGA128, <text:span text:style-name="T1">которая предназначена для загрузки или обновления памяти программ </text:span>ATMEGA128.</text:p></text:note-body></text:note></text:span><text:span text:style-name="T2">. </text:span>Обновление конфигураций, также производится с помощью <text:span text:style-name="T2">BOOTLOADER.</text:span></text:p>
      <text:p text:style-name="P6">Конфигурация <text:span text:style-name="T2">FPGA </text:span>интегрирована в программу микроконтроллера<text:span text:style-name="T2">. </text:span>Конфигурирование <text:span text:style-name="T2">FPGA </text:span>производится при включении или железном сбросе компьютера.</text:p>
      <text:p text:style-name="P6">Изменение версии <text:s/>базовой конфигурации подразумевает изменение любой из или <text:s/>обеих компонент.</text:p>
      <text:p text:style-name="P6"/>
      <text:h text:style-name="P15" text:outline-level="1"><text:bookmark-start text:name="__RefHeading__20447_459111283"/>Управляющие контакты компьютера<text:bookmark-end text:name="__RefHeading__20447_459111283"/></text:h>
      <text:p text:style-name="P6">Управляющие группы контактов компьютера, предназначены для управления работой компьютера с помощью подсоединенных к ним элементов управления (например кнопок на корпусе компьютера).</text:p>
      <text:h text:style-name="P16" text:outline-level="2"><text:bookmark-start text:name="__RefHeading__20449_459111283"/>Hard reset <text:span text:style-name="T1">(полный сброс)</text:span><text:bookmark-end text:name="__RefHeading__20449_459111283"/></text:h>
      <text:p text:style-name="P6">Группа контактов «<text:span text:style-name="T2">Hard reset</text:span>» осуществляет полный сброс компьютера (с перезапуском прошивки микроконтроллера и перепрограммированием FPGA) при замыкании контактов. Функционирование не зависит <text:s/>от используемой конфигурации компьютера.</text:p>
      <text:p text:style-name="P6">Рекомендуется при использовании стандартного <text:span text:style-name="T2">(AT </text:span>или <text:span text:style-name="T2">ATX) </text:span>корпуса подсоединить к кнопке «<text:span text:style-name="T2">Reset</text:span>» корпуса.</text:p>
      <text:p text:style-name="P6"><text:span text:style-name="T4">Внимание!</text:span> Hard <text:span text:style-name="T2">Reset</text:span> <text:span text:style-name="T3">не обеспечивает</text:span> сохранность содержимого памяти компьютера (например, RAM-дисков или страничек с исходными текстами в аласме).</text:p>
      <text:h text:style-name="P16" text:outline-level="2"><text:bookmark-start text:name="__RefHeading__20451_459111283"/>Soft reset <text:span text:style-name="T1">(мягкий сброс)</text:span><text:bookmark-end text:name="__RefHeading__20451_459111283"/></text:h>
      <text:p text:style-name="P6">Функции группа контактов «<text:span text:style-name="T2">Soft reset</text:span>» зависят от конфигурации. </text:p>
      <text:p text:style-name="P6">В базовой конфигурации на эту группу контактов возложены две функции:</text:p>
      <text:list text:style-name="L2">
        <text:list-item>
          <text:p text:style-name="P17"><text:span text:style-name="T1">мягкий сброс компьютера (сброс процессора и внутренних регистров </text:span><text:span text:style-name="T2">fpga);</text:span></text:p>
        </text:list-item>
        <text:list-item>
          <text:p text:style-name="P18">включение/выключение <text:span text:style-name="T2">ATX </text:span>блока питания.</text:p>
        </text:list-item>
      </text:list>
      <text:p text:style-name="P6">Рекомендуется при использовании стандартного <text:span text:style-name="T2">ATX </text:span>корпуса подсоединить к кнопке <text:span text:style-name="T2">«Power» </text:span>корпуса. В этом случае включение компьютера осуществляется однократным нажатием кнопки. Отключение компьютера осуществляется долговременным нажатием в течении 5 секунд.</text:p>
      <text:p text:style-name="Text_20_body"><text:span text:style-name="T1">Кратковременное замыкание контактов будет осуществлять мягкий сброс компьютера и установку нулевой страницы </text:span><text:span text:style-name="T2">ROM.</text:span></text:p>
      <text:p text:style-name="P6">Мягкий сброс обеспечивает сохранность содержимого памяти компьютера.</text:p>
      <text:h text:style-name="P16" text:outline-level="2"><text:bookmark-start text:name="__RefHeading__20453_459111283"/>NMI (<text:span text:style-name="T1">подача немаскируемого прерывания на процессор </text:span>Z80<text:span text:style-name="T1">)</text:span><text:bookmark-end text:name="__RefHeading__20453_459111283"/></text:h>
      <text:p text:style-name="P6">Функции группы контактов <text:span text:style-name="T2">«NMI» </text:span>зависят от конфигурации.</text:p>
      <text:p text:style-name="P6">В базовой конфигурации на эту группу контактов возложены функции подачи немаскируемого прерывания процессор на процессор <text:span text:style-name="T2">Z</text:span>80 (аналогично описанному в <text:bookmark-ref text:reference-format="chapter" text:ref-name="__RefHeading__4640_325448479">3.5</text:bookmark-ref><text:span text:style-name="T2">).</text:span></text:p>
      <text:p text:style-name="P6"><text:span text:style-name="T5">Внимание!</text:span><text:span text:style-name="T2"> </text:span>Для <text:span text:style-name="T2">revision A </text:span>и <text:span text:style-name="T2">B </text:span>плат эта группа контактов называется «<text:span text:style-name="T2">Turbo</text:span>», но используется как контакты для управления <text:span text:style-name="T2">NMI.</text:span></text:p>
      <text:h text:style-name="P15" text:outline-level="1"><text:bookmark-start text:name="__RefHeading__20455_459111283"/><text:span text:style-name="T1">Дополнительные функции </text:span><text:span text:style-name="T2">PS2 </text:span><text:span text:style-name="T1">клавиатуры</text:span><text:bookmark-end text:name="__RefHeading__20455_459111283"/></text:h>
      <text:p text:style-name="P6">При использовании <text:span text:style-name="T2">PS2 </text:span>клавиатуры с компьютером <text:span text:style-name="T2">ZX Evolution </text:span>можно использовать дополнительные возможности по управлению компьютером<text:span text:style-name="T2">:</text:span></text:p>
      <text:list text:style-name="L3">
        <text:list-item>
          <text:p text:style-name="P19"><text:span text:style-name="T1">мягкий сброс компьютера</text:span><text:span text:style-name="T2">;</text:span></text:p>
        </text:list-item>
        <text:list-item>
          <text:p text:style-name="P20">полный сброс компьютера;</text:p>
        </text:list-item>
        <text:list-item>
          <text:p text:style-name="P21">переключение режима видеовыхода (<text:span text:style-name="T2">TV/VGA</text:span>)<text:span text:style-name="T2">;</text:span></text:p>
        </text:list-item>
        <text:list-item>
          <text:p text:style-name="P22"><text:span text:style-name="T1">переключение режима аудиовыхода (</text:span><text:span text:style-name="T2">beeper/tapeout</text:span><text:span text:style-name="T1">)</text:span><text:span text:style-name="T2">;</text:span></text:p>
        </text:list-item>
        <text:list-item>
          <text:p text:style-name="P21">подача <text:span text:style-name="T2">NMI </text:span>на процессор <text:span text:style-name="T2">Z80.</text:span></text:p>
        </text:list-item>
      </text:list>
      <text:h text:style-name="P23" text:outline-level="2"><text:bookmark-start text:name="__RefHeading__20457_459111283"/>Мягкий сброс компьютера (<text:span text:style-name="T2">soft reset</text:span>)<text:bookmark-end text:name="__RefHeading__20457_459111283"/></text:h>
      <text:p text:style-name="P24"><text:span text:style-name="T1">Мягкий сброс компьютера осуществляется с помощью кратковременного (менее </text:span><text:span text:style-name="T2">5</text:span><text:span text:style-name="T1">секунд</text:span><text:span text:style-name="T2">)</text:span><text:span text:style-name="T1"> нажатия клавиши <text:s/>«</text:span><text:span text:style-name="T2">F12</text:span><text:span text:style-name="T1">»</text:span><text:span text:style-name="T2">.</text:span></text:p>
      <text:h text:style-name="P25" text:outline-level="2"><text:bookmark-start text:name="__RefHeading__20459_459111283"/>Полный сброс компьютера <text:span text:style-name="T2">(hard reset)</text:span><text:bookmark-end text:name="__RefHeading__20459_459111283"/></text:h>
      <text:p text:style-name="P6">Полный сброс компьютера с клавиатуры можно осуществить двумя способами:</text:p>
      <text:list text:style-name="L4">
        <text:list-item>
          <text:p text:style-name="P26"><text:span text:style-name="T1">Длительным нажатием клавиши «</text:span><text:span text:style-name="T2">F12</text:span><text:span text:style-name="T1">»</text:span><text:span text:style-name="T2"> (</text:span><text:span text:style-name="T1">длительностью 5сек), отключение питания в этом случае не производится;</text:span></text:p>
        </text:list-item>
        <text:list-item>
          <text:p text:style-name="P26"><text:span text:style-name="T1">Нажатием комбинации «</text:span><text:span text:style-name="T2">Ctrl-Alt-Del</text:span><text:span text:style-name="T1">»</text:span><text:span text:style-name="T2">, </text:span><text:span text:style-name="T1">отключение питания в этом случае не производится.</text:span></text:p>
        </text:list-item>
      </text:list>
      <text:h text:style-name="P25" text:outline-level="2"><text:bookmark-start text:name="__RefHeading__20461_459111283"/>Переключение режима видеовыхода (<text:span text:style-name="T2">TV/VGA</text:span>)<text:bookmark-end text:name="__RefHeading__20461_459111283"/></text:h>
      <text:p text:style-name="P6">Так как используется объединенный видеовыход (в связи с ограничением количества ног микросхемы <text:span text:style-name="T2">EP1K50QC208), </text:span>то необходимо установить режим видеовыхода:</text:p>
      <text:list text:style-name="L5">
        <text:list-item>
          <text:p text:style-name="P27">TV – <text:span text:style-name="T1">скандаблер отключен, видеовыход работает с телевизионной разверткой;</text:span></text:p>
        </text:list-item>
        <text:list-item>
          <text:p text:style-name="P27">VGA – <text:span text:style-name="T1">включен скандаблер, видеовыход работает с </text:span>VGA <text:span text:style-name="T1">разверткой.</text:span></text:p>
        </text:list-item>
      </text:list>
      <text:p text:style-name="Text_20_body"><text:span text:style-name="T1">Переключение режима <text:s/>видеовыхода (</text:span><text:span text:style-name="T2">TV/VGA</text:span><text:span text:style-name="T1">)</text:span><text:span text:style-name="T2"> </text:span><text:span text:style-name="T1">осуществляется с помощью клавиши «</text:span><text:span text:style-name="T2">Scroll Lock</text:span><text:span text:style-name="T1">». Индикация режима осуществляется с помощью светодиода «</text:span><text:span text:style-name="T2">Scroll Lock</text:span><text:span text:style-name="T1">» клавиатуры. Светящееся состояние светодиода соответствует </text:span><text:span text:style-name="T2">VGA </text:span><text:span text:style-name="T1">режиму</text:span><text:span text:style-name="T2"> </text:span><text:span text:style-name="T1">компьютера, отсутствие свечения </text:span><text:span text:style-name="T2">–</text:span><text:span text:style-name="T1"> </text:span><text:span text:style-name="T2">TV </text:span><text:span text:style-name="T1">режиму.</text:span></text:p>
      <text:p text:style-name="P5">Временны<text:span text:style-name="T6">́</text:span>е <text:span text:style-name="T1">параметры сигнала </text:span>VGA <text:span text:style-name="T1">формируемые скандаблером отличаются от стандартных, что может быть причиной отсутствия изображения на Вашем </text:span>VGA <text:span text:style-name="T1">мониторе. Специально для таких случаев введён режим с изменённой развёрткой («60Гц»). Используйте комбинацию клавиш «</text:span>Shift+ScrollLock<text:span text:style-name="T1">» для переключения режимов видеовыхода </text:span>TV60/VGA60.</text:p>
      <text:p text:style-name="P28">Режим «60Гц» является нестандартным для <text:span text:style-name="T2">ZX Spectrum </text:span>совместимого программного обеспечения и может быть причиной его некорректной работы (ускорение, замедление, зависание). <text:span text:style-name="T2">NedoPC </text:span>не рекомендует постоянно пользоваться режимом «60Гц», тем более разрабатывать специально для него программное обеспечение.</text:p>
      <text:p text:style-name="P6"><text:soft-page-break/><text:span text:style-name="T7">Внимание!</text:span> Чтобы состояние режима сохранялось при выключении компьютера, необходимо установить батарейку.</text:p>
      <text:h text:style-name="P25" text:outline-level="2"><text:bookmark-start text:name="__RefHeading__20463_459111283"/>Переключение режима аудиовыхода (<text:span text:style-name="T2">beeper/tapeout</text:span>)<text:bookmark-end text:name="__RefHeading__20463_459111283"/></text:h>
      <text:p text:style-name="P6">Так как используется объединенный аудиовыход (в связи с ограничением количества ног микросхемы <text:span text:style-name="T2">EP1K50QC208), </text:span>то необходимо установить режим аудиовыхода:</text:p>
      <text:list text:style-name="L6">
        <text:list-item>
          <text:p text:style-name="P29">beeper – <text:span text:style-name="T1">на аудиовыход подается сигнал соответствующий выходу </text:span>beeper;</text:p>
        </text:list-item>
        <text:list-item>
          <text:p text:style-name="P29">tapeout – <text:span text:style-name="T1">на аудиовыход подается сигнал соответствующий выходу </text:span>tapeout.</text:p>
        </text:list-item>
      </text:list>
      <text:p text:style-name="Text_20_body"><text:span text:style-name="T1">Переключение режима аудиовыхода (</text:span><text:span text:style-name="T2">beeper/tapeout</text:span><text:span text:style-name="T1">)</text:span><text:span text:style-name="T2"> </text:span><text:span text:style-name="T1">осуществляется с помощью клавиши «</text:span><text:span text:style-name="T2">Num Lock</text:span><text:span text:style-name="T1">». Индикация режима осуществляется с помощью светодиода «</text:span><text:span text:style-name="T2">Num Lock</text:span><text:span text:style-name="T1">» клавиатуры. Светящееся состояние светодиода соответствует t</text:span><text:span text:style-name="T2">apeout </text:span><text:span text:style-name="T1">режиму</text:span><text:span text:style-name="T2"> </text:span><text:span text:style-name="T1">аудиовыхода, отсутствие свечения — </text:span><text:span text:style-name="T2">beeper </text:span><text:span text:style-name="T1">режиму.</text:span></text:p>
      <text:p text:style-name="P5"><text:span text:style-name="T8">Внимание!</text:span><text:span text:style-name="T1"> Чтобы состояние режима сохранялось при выключении компьютера, необходимо установить батарейку.</text:span></text:p>
      <text:h text:style-name="P30" text:outline-level="2"><text:bookmark text:name="nmi_gen"/><text:bookmark-start text:name="__RefHeading__4640_325448479"/>Подача <text:span text:style-name="T2">NMI </text:span><text:span text:style-name="T1">(немаскируемого прерывания) на процессор </text:span><text:span text:style-name="T2">Z80</text:span><text:bookmark-end text:name="__RefHeading__4640_325448479"/></text:h>
      <text:p text:style-name="P6">П<text:span text:style-name="T2">одача NMI </text:span>на<text:span text:style-name="T2"> </text:span>процессор<text:span text:style-name="T2"> Z80 </text:span>осуществляется двумя способами:</text:p>
      <text:list text:style-name="L7">
        <text:list-item>
          <text:p text:style-name="P31"><text:span text:style-name="T1">с помощью клавиши «</text:span><text:span text:style-name="T2">Print Screen</text:span><text:span text:style-name="T1">» PS/2 клавиатуры</text:span></text:p>
        </text:list-item>
        <text:list-item>
          <text:p text:style-name="P31"><text:span text:style-name="T1">Переводом бита 3 порта </text:span><text:span text:style-name="T9">#xxBF</text:span><text:span text:style-name="T1"> из 1 в 0 (см. стр. </text:span><text:span text:style-name="T1"><text:bookmark-ref text:reference-format="page" text:ref-name="__RefNumPara__6276_1334049885">48</text:bookmark-ref></text:span><text:span text:style-name="T1">)</text:span></text:p>
        </text:list-item>
        <text:list-item>
          <text:p text:style-name="P31"><text:span text:style-name="T1">Установкой адреса ловушки в портах </text:span><text:span text:style-name="T9">#</text:span><text:span text:style-name="T10">1</text:span><text:span text:style-name="T9">0BD</text:span><text:span text:style-name="T1">/</text:span><text:span text:style-name="T9">#</text:span><text:span text:style-name="T10">1</text:span><text:span text:style-name="T9">1BD</text:span><text:span text:style-name="T1"> (см. стр. </text:span><text:span text:style-name="T1"><text:bookmark-ref text:reference-format="page" text:ref-name="__RefNumPara__6533_1618013060">30</text:bookmark-ref></text:span><text:span text:style-name="T1">) и разрешения ловушки битом 4 порта </text:span><text:span text:style-name="T9">#xxBF</text:span><text:span text:style-name="T11"> (см. стр. </text:span><text:span text:style-name="T11"><text:bookmark-ref text:reference-format="page" text:ref-name="__RefNumPara__6276_1334049885">48</text:bookmark-ref></text:span><text:span text:style-name="T11">)</text:span></text:p>
        </text:list-item>
      </text:list>
      <text:h text:style-name="Heading_20_2" text:outline-level="2"><text:bookmark-start text:name="__RefHeading__20465_459111283"/><text:span text:style-name="T1">Регулировка разрешения </text:span><text:span text:style-name="T2">PS/2 </text:span><text:span text:style-name="T1">мыши</text:span><text:bookmark-end text:name="__RefHeading__20465_459111283"/></text:h>
      <text:p text:style-name="Text_20_body"><text:span text:style-name="T1">Регулировка разрешения </text:span><text:span text:style-name="T2">PS/2 </text:span><text:span text:style-name="T1">мыши возможна только для мышей, которые поддерживают эту функцию. Как правило это оптические мыши.</text:span></text:p>
      <text:p text:style-name="Text_20_body"><text:span text:style-name="T1">Диапазон поддерживаемых разрешений </text:span><text:span text:style-name="T2">PS/2 </text:span><text:span text:style-name="T1">мыши:</text:span></text:p>
      <table:table table:name="Таблица10" table:style-name="Таблица10">
        <table:table-column table:style-name="Таблица10.A"/>
        <table:table-column table:style-name="Таблица10.B"/>
        <table:table-row>
          <table:table-cell table:style-name="Таблица10.A1" office:value-type="string">
            <text:p text:style-name="P32">Значение</text:p>
          </table:table-cell>
          <table:table-cell table:style-name="Таблица10.B1" office:value-type="string">
            <text:p text:style-name="P32">Разрешение</text:p>
          </table:table-cell>
        </table:table-row>
        <table:table-row>
          <table:table-cell table:style-name="Таблица10.A2" office:value-type="float" office:value="0">
            <text:p text:style-name="P33">0</text:p>
          </table:table-cell>
          <table:table-cell table:style-name="Таблица10.B2" office:value-type="string">
            <text:p text:style-name="Table_20_Contents">1 отсчет на мм</text:p>
          </table:table-cell>
        </table:table-row>
        <table:table-row>
          <table:table-cell table:style-name="Таблица10.A2" office:value-type="float" office:value="1">
            <text:p text:style-name="P33">1</text:p>
          </table:table-cell>
          <table:table-cell table:style-name="Таблица10.B2" office:value-type="string">
            <text:p text:style-name="Table_20_Contents">2 отсчета на мм</text:p>
          </table:table-cell>
        </table:table-row>
        <table:table-row>
          <table:table-cell table:style-name="Таблица10.A2" office:value-type="float" office:value="2">
            <text:p text:style-name="P33">2</text:p>
          </table:table-cell>
          <table:table-cell table:style-name="Таблица10.B2" office:value-type="string">
            <text:p text:style-name="Table_20_Contents">4 отсчета на мм</text:p>
          </table:table-cell>
        </table:table-row>
        <table:table-row>
          <table:table-cell table:style-name="Таблица10.A2" office:value-type="float" office:value="3">
            <text:p text:style-name="P33">3</text:p>
          </table:table-cell>
          <table:table-cell table:style-name="Таблица10.B2" office:value-type="string">
            <text:p text:style-name="Table_20_Contents">8 отсчетов на мм</text:p>
          </table:table-cell>
        </table:table-row>
      </table:table>
      <text:p text:style-name="P5"/>
      <text:p text:style-name="Text_20_body"><text:span text:style-name="T1">Регулировка происходит одновременным нажатием двух клавиш </text:span><text:span text:style-name="T2">PS/2 </text:span><text:span text:style-name="T1">мыши </text:span><text:span text:style-name="T2">(</text:span><text:span text:style-name="T1">левой и правой) и управляющей клавиши на </text:span><text:span text:style-name="T2">PS</text:span><text:span text:style-name="T1">/2 клавиатуре:</text:span></text:p>
      <text:list text:style-name="L8">
        <text:list-item>
          <text:p text:style-name="P34">keypad '*' <text:span text:style-name="T1">- сброс значения разрешения в 0 (по умолчанию);</text:span></text:p>
        </text:list-item>
        <text:list-item>
          <text:p text:style-name="P35"><text:span text:style-name="T2">keypad</text:span> '+' - увеличение значения разрешения на 1;</text:p>
        </text:list-item>
        <text:list-item>
          <text:p text:style-name="P35"><text:span text:style-name="T2">keypad</text:span> '-' - уменьшение значения разрешения на 1.</text:p>
        </text:list-item>
      </text:list>
      <text:p text:style-name="P5"><text:soft-page-break/><text:span text:style-name="T8">Внимание!</text:span><text:span text:style-name="T1"> Чтобы значение разрешения сохранялось при выключении компьютера, необходимо установить батарейку.</text:span></text:p>
      <text:h text:style-name="P11" text:outline-level="1"><text:bookmark-start text:name="__RefHeading__20467_459111283"/>Архитектура: общие положения<text:bookmark-end text:name="__RefHeading__20467_459111283"/></text:h>
      <text:p text:style-name="P6">ZX <text:span text:style-name="T2">Evolution</text:span> имеет на борту 4 мегабайта ОЗУ и 512 килобайт ПЗУ, которые доступны через следующие модели управления памятью: ZX Spectrum 48k, ZX Spectrum 128k (порт <text:span text:style-name="T4">#7FFD</text:span>), <text:span text:style-name="T2">pentagon</text:span> 1024k (адресация через порт <text:span text:style-name="T4">#7FFD</text:span>), ATM2 (адресация мегабайта ОЗУ), а также дополнительный режим адресации всех 4 мегабайт ОЗУ. Все 512 килобайт ПЗУ адресуются по модели ATM2, при этом дополнительно существует возможность записи в ПЗУ, которое реализовано на микросхеме flash-памяти.</text:p>
      <text:p text:style-name="P36">В архитектуре контроллеров дисковода <text:span text:style-name="T2">beta-disk</text:span> появляется понятие теневых портов, доступных только при определённых условиях. В компьютере ATM2 появляются дополнительный набор теневых портов (используемых, в частности, для управления памятью) и дополнительные способы включения таких портов (в частности, режим удержания теневого режима при выполнении из ОЗУ). Однако, в АТМ2 остаётся однозначная связь между теневым режимом и включением ПЗУ TR-DOS. В архитектуре ZX <text:span text:style-name="T2">Evolution</text:span> при полной поддержке режимов АТМ2 появляется возможность удержания теневого режима портов <text:span text:style-name="T3">без</text:span><text:span text:style-name="T12"> включения ПЗУ TR-DOS.</text:span></text:p>
      <text:p text:style-name="Text_20_body"><text:span text:style-name="T1">Концепция портов ввода-вывода для ZX </text:span><text:span text:style-name="T2">Evolution</text:span><text:span text:style-name="T1"> существенно отличается от оной в других спектрум-совместимых компьютеров. Прежде всего, дешифрация всегда происходит как минимум по 8 младшим битам. Качественно отличается логика блокирования портов картами ZX-Bus: если в других спектрум-совместимых компьютерах карты блокируют порты материнской платы (и друг друга, при наличии нескольких слотов), то в ZX </text:span><text:span text:style-name="T2">Evolution</text:span><text:span text:style-name="T1">, наоборот, все порты, присутствующие на материнской плате, не 'доходят' до карт ZX-Bus. Механизм IORQGE используется картами лишь для блокирования друг друга (в порядке расположения в слотах). Отсюда следует важный вывод — любые карты, дублирующие какую-либо функциональность материнской платы (имеющие порты, совпадающие с существующими в ZX </text:span><text:span text:style-name="T2">Evolution</text:span><text:span text:style-name="T1">), такие как контроллеры клавиатуры, мышки, IDE, SD-карт и т. д., работать </text:span><text:span text:style-name="T13">не будут</text:span><text:span text:style-name="T1">.</text:span></text:p>
      <text:p text:style-name="P36"><text:span text:style-name="T12">В дальнейшем для каждого порта указываются режим его видимости (теневой доступен всегда: «</text:span><text:span text:style-name="T7">shadow</text:span><text:span text:style-name="T14">»</text:span><text:span text:style-name="T12">, «</text:span><text:span text:style-name="T7">noshad</text:span><text:span text:style-name="T12">», «</text:span><text:span text:style-name="T4">always</text:span><text:span text:style-name="T12">»), доступность его для чтения или записи (только чтение, только запись, чтение и запись: «</text:span><text:span text:style-name="T7">RO</text:span><text:span text:style-name="T12">», «</text:span><text:span text:style-name="T7">WO</text:span><text:span text:style-name="T12">», «</text:span><text:span text:style-name="T7">RW</text:span><text:span text:style-name="T12">»). Также указывается адрес порта либо в виде «</text:span><text:span text:style-name="T7">#xxFE</text:span><text:span text:style-name="T12">» (дешифрация только по младшим 8 битам), либо в виде «</text:span><text:span text:style-name="T7">#7FFD</text:span><text:span text:style-name="T12">» (дешифрация не только по младшим 8 битам). Первый вариант указания адреса порта применяется также и в случае, если какие-либо адресные линии A8..A15 используются как информационные входы (например, набор портов для переключения страниц в 16k окнах процессора: </text:span><text:span text:style-name="T7">#3FF7</text:span><text:span text:style-name="T12">, </text:span><text:span text:style-name="T7">#7FF7</text:span><text:span text:style-name="T12">, </text:span><text:span text:style-name="T7">#BFF7</text:span><text:span text:style-name="T12">, </text:span><text:span text:style-name="T7">#FFF7</text:span><text:span text:style-name="T12">), при этом в описании порта указываются конкретные значения старшего байта адреса, которые только и следует использовать. В случае указания 16-битного адреса порта, конкретные биты старшего адресного байта, используемые при дешифрации, </text:span><text:span text:style-name="T3">намеренно не указываются</text:span><text:span text:style-name="T12"> и могут изменяться от прошивки к прошивке.</text:span></text:p>
      <text:h text:style-name="P11" text:outline-level="1"><text:bookmark-start text:name="__RefNumPara__14417_2869355866"/><text:bookmark-start text:name="__RefHeading__11062_959909826"/>Архитектура: управление памятью<text:bookmark-end text:name="__RefNumPara__14417_2869355866"/><text:bookmark-end text:name="__RefHeading__11062_959909826"/></text:h>
      <text:p text:style-name="P6">Управление памятью в ZX <text:span text:style-name="T2">Evolution</text:span> во многом схоже с управлением памятью в ATM2. Принципиальные изменения касаются возможности адресации мегабайта ОЗУ через порт #7FFD (модель <text:span text:style-name="T2">pentagon</text:span> 1024k) и адресации 4 мегабайт ОЗУ.</text:p>
      <text:p text:style-name="P6">В каждое 16k окно процессора можно произвольно включать любую из 16k страниц ОЗУ или ПЗУ. Существует 2 независимых карты памяти, которые переключаются битом 4 в порте #7FFD. В режиме совместимости с ZX Spectrum 128k или <text:span text:style-name="T2">pentagon</text:span> 1024k эти две карты памяти программируются идентично за исключением номера включенной страницы ПЗУ в нулевом окне процессора, чтобы данный бит работал, как в ZX <text:span text:style-name="T2">Spectrum</text:span> 128k. Отображение страниц памяти в каждом окне процессора программируется независимо через специальные теневые порты. Кроме того, для каждого такого окна существует опция подмены младших 3 или 6 бит номера включённой страницы ОЗУ данными из соответствующих бит порта #7FFD: таким образом обеспечивается совместимость с режимами ZX Spectrum 128k и <text:span text:style-name="T2">pentagon</text:span> 1024k. При отображении же страницы ПЗУ существует опция подмены младшего бита номера страницы на сигнал DOSEN (сигнал включения TRDOS). Включение данного сигнала («переход в TR-DOS») происходит при исполнении кода из ПЗУ в каком-либо окне процессора по смещению #3Dxx в этом окне при установленном бите D4 в порте #7FFD. Выключение происходит при выполнении кода из ОЗУ («выход из TR-DOS»). Кроме того, при помощи соответствующего теневого порта можно запретить выключение сигнала DOS, таким образом оставляя теневые порты доступными при исполнении из ОЗУ. Вдобавок, существует возможность включения теневых портов безотносительно сигнала DOS.</text:p>
      <text:p text:style-name="Text_20_body"/>
      <table:table table:name="Table2" table:style-name="Table2">
        <table:table-column table:style-name="Table2.A"/>
        <table:table-column table:style-name="Table2.B"/>
        <table:table-row>
          <table:table-cell table:style-name="Table2.A1" office:value-type="string">
            <text:p text:style-name="P37">Порт</text:p>
          </table:table-cell>
          <table:table-cell table:style-name="Table2.B1" office:value-type="string">
            <text:p text:style-name="P38">Описание</text:p>
          </table:table-cell>
        </table:table-row>
        <table:table-row>
          <table:table-cell table:style-name="Table2.A2" office:value-type="string">
            <text:p text:style-name="P39">#xxBF RW</text:p>
            <text:p text:style-name="P39">always</text:p>
          </table:table-cell>
          <table:table-cell table:style-name="Table2.B2" office:value-type="string">
            <text:p text:style-name="Table_20_Contents">Включение теневого режима портов; разрешение записи в ПЗУ.</text:p>
            <table:table table:name="Table4" table:style-name="Table4">
              <table:table-column table:style-name="Table4.A"/>
              <table:table-row>
                <table:table-cell table:style-name="Table4.A1" office:value-type="string">
                  <text:p text:style-name="P40">1: <text:span text:style-name="T1">если</text:span> 1, <text:span text:style-name="T1">то</text:span> запись <text:span text:style-name="T1">в</text:span> ПЗУ <text:span text:style-name="T1">разрешена.</text:span> 0 <text:span text:style-name="T1">после</text:span> <text:span text:style-name="T1">сброса.</text:span></text:p>
                </table:table-cell>
              </table:table-row>
              <table:table-row>
                <table:table-cell table:style-name="Table4.A2" office:value-type="string">
                  <text:p text:style-name="P40">0: <text:span text:style-name="T1">если</text:span> 1, <text:span text:style-name="T1">то</text:span> включены <text:span text:style-name="T1">теневые</text:span> <text:span text:style-name="T1">порты.</text:span> 0 <text:span text:style-name="T1">после</text:span> <text:span text:style-name="T1">сброса.</text:span></text:p>
                </table:table-cell>
              </table:table-row>
            </table:table>
            <text:p text:style-name="Table_20_Contents"><text:span text:style-name="T2">Бит 0 </text:span><text:span text:style-name="T1">этого</text:span><text:span text:style-name="T2"> порта имеет приоритет </text:span><text:span text:style-name="T1">над</text:span><text:span text:style-name="T2"> другими способами включения теневых </text:span><text:span text:style-name="T1">портов</text:span><text:span text:style-name="T2">: </text:span><text:span text:style-name="T1">теневой</text:span><text:span text:style-name="T2"> </text:span><text:span text:style-name="T1">режим</text:span><text:span text:style-name="T2"> </text:span><text:span text:style-name="T1">включается</text:span><text:span text:style-name="T2"> безусловно при </text:span><text:span text:style-name="T1">записи</text:span><text:span text:style-name="T2"> 1 </text:span><text:span text:style-name="T1">в</text:span><text:span text:style-name="T2"> </text:span><text:span text:style-name="T1">этот</text:span><text:span text:style-name="T2"> </text:span><text:span text:style-name="T1">бит.</text:span><text:span text:style-name="T2"> </text:span><text:span text:style-name="T1">При записи</text:span><text:span text:style-name="T2"> 0 </text:span><text:span text:style-name="T1">включение</text:span><text:span text:style-name="T2"> теневого </text:span><text:span text:style-name="T1">режима</text:span><text:span text:style-name="T2"> </text:span><text:span text:style-name="T1">управляется</text:span><text:span text:style-name="T2"> </text:span><text:span text:style-name="T1">другими</text:span><text:span text:style-name="T2"> способами, например портом </text:span><text:span text:style-name="T5">#xx77</text:span><text:span text:style-name="T2"> </text:span><text:span text:style-name="T1">или</text:span><text:span text:style-name="T2"> </text:span><text:span text:style-name="T1">переходом</text:span><text:span text:style-name="T2"> </text:span><text:span text:style-name="T1">в</text:span><text:span text:style-name="T2"> TR-DOS. Данный </text:span><text:span text:style-name="T1">бит</text:span><text:span text:style-name="T2"> </text:span><text:span text:style-name="T13">не</text:span><text:span text:style-name="T15"> </text:span><text:span text:style-name="T13">включает</text:span><text:span text:style-name="T2"> TR-DOS.</text:span></text:p>
            <text:p text:style-name="P41">Данный порт <text:span text:style-name="T3">отсутствует</text:span> в ATM2.</text:p>
            <text:p text:style-name="P41">При чтении: биты 1:0 — последнее записанное значение.</text:p>
            <text:p text:style-name="P41"><text:bookmark text:name="port_BF"/>Остальные биты – см. стр. <text:bookmark-ref text:reference-format="page" text:ref-name="__RefHeading__10979_959909826">48</text:bookmark-ref>.</text:p>
          </table:table-cell>
        </table:table-row>
      </table:table>
      <text:p text:style-name="P36"/>
      <table:table table:name="Table6" table:style-name="Table6">
        <table:table-column table:style-name="Table6.A"/>
        <table:table-column table:style-name="Table6.B"/>
        <text:soft-page-break/>
        <table:table-row>
          <table:table-cell table:style-name="Table6.A1" office:value-type="string">
            <text:p text:style-name="P37">Порт</text:p>
          </table:table-cell>
          <table:table-cell table:style-name="Table6.B1" office:value-type="string">
            <text:p text:style-name="P38">Описание</text:p>
          </table:table-cell>
        </table:table-row>
        <table:table-row>
          <table:table-cell table:style-name="Table6.A2" office:value-type="string">
            <text:p text:style-name="P39">#xx77 WO</text:p>
            <text:p text:style-name="P39">shadow</text:p>
          </table:table-cell>
          <table:table-cell table:style-name="Table6.B2" office:value-type="string">
            <text:p text:style-name="Table_20_Contents">Включение теневого режима портов; разрешение работы диспетчера памяти.</text:p>
            <table:table table:name="Table7" table:style-name="Table7">
              <table:table-column table:style-name="Table7.A"/>
              <table:table-column table:style-name="Table7.B"/>
              <table:table-row>
                <table:table-cell table:style-name="Table7.A1" office:value-type="string">
                  <text:p text:style-name="Table_20_Contents">A8: если <text:span text:style-name="T2">0</text:span>, то выключение диспетчера памяти. В каждое окно процессора устанавливается последняя страница ПЗУ. <text:span text:style-name="T2">0</text:span> после сброса.</text:p>
                </table:table-cell>
                <table:table-cell table:style-name="Table7.B1" office:value-type="string">
                  <text:p text:style-name="P41">A9: если 0, то “насильно” включение TR-DOS и теневых портов. 0 после сброса.</text:p>
                </table:table-cell>
              </table:table-row>
            </table:table>
            <text:p text:style-name="Table_20_Contents"><text:span text:style-name="T13">Внимание!</text:span><text:span text:style-name="T1"> Остальные биты (как биты данных, так и биты старшего байта адреса) этого </text:span><text:span text:style-name="T2">write-only</text:span><text:span text:style-name="T1"> порта используются для других целей. См. стр. </text:span><text:span text:style-name="T1"><text:bookmark-ref text:reference-format="page" text:ref-name="__RefHeading__10979_959909826">48</text:bookmark-ref></text:span><text:span text:style-name="T1">.</text:span></text:p>
            <text:p text:style-name="Table_20_Contents"><text:span text:style-name="T1">Включение TR-DOS и теневых портов битом A9 имеет приоритет над включением TR-DOS и теневых портов исполнением со смещения #3Dxx страницы ПЗУ при установленном бите D4 порта </text:span><text:span text:style-name="T9">#7FFD </text:span><text:span text:style-name="T11">(«переход в TR-DOS»). Когда A9=0, то теневые порты и TR-DOS включены независимо от места исполнения процессора (в т.ч. и из ОЗУ).</text:span></text:p>
          </table:table-cell>
        </table:table-row>
      </table:table>
      <text:p text:style-name="P42"/>
      <text:p text:style-name="P36"/>
      <table:table table:name="Table8" table:style-name="Table8">
        <table:table-column table:style-name="Table8.A"/>
        <table:table-column table:style-name="Table8.B"/>
        <table:table-row>
          <table:table-cell table:style-name="Table8.A1" office:value-type="string">
            <text:p text:style-name="P37">Порт</text:p>
          </table:table-cell>
          <table:table-cell table:style-name="Table8.B1" office:value-type="string">
            <text:p text:style-name="P38">Описание</text:p>
          </table:table-cell>
        </table:table-row>
        <table:table-row>
          <table:table-cell table:style-name="Table8.A2" office:value-type="string">
            <text:p text:style-name="P39">#xFF7 WO</text:p>
            <text:p text:style-name="P39">shadow</text:p>
          </table:table-cell>
          <table:table-cell table:style-name="Table8.B2" office:value-type="string">
            <text:p text:style-name="P41"><text:bookmark text:name="port_xFF7"/>Управление диспетчером страниц.</text:p>
            <table:table table:name="Table9" table:style-name="Table9">
              <table:table-column table:style-name="Table9.A"/>
              <table:table-row>
                <table:table-cell table:style-name="Table9.A1" office:value-type="string">
                  <text:p text:style-name="Table_20_Contents">5..0: <text:span text:style-name="T3">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9.A2" office:value-type="string">
                  <text:p text:style-name="Table_20_Contents">6: <text:s/>бит «ramnrom»: если 0, то в данном окне процессора включается ПЗУ, если 1 — ОЗУ.</text:p>
                </table:table-cell>
              </table:table-row>
              <table:table-row>
                <table:table-cell table:style-name="Table9.A2" office:value-type="string">
                  <text:p text:style-name="Table_20_Contents">7: бит «dos7ffd»: если 1, то:</text:p>
                  <text:p text:style-name="Table_20_Contents">для ОЗУ — в данном окне происходит подмена младших 3 или 6 бит (в зависимости от режима ZX Spectrum 128k или <text:span text:style-name="T2">pentagon</text:span> 1024k) номера страницы <text:span text:style-name="T3">неинверсными</text:span> битами из порта #7FFD.</text:p>
                  <text:p text:style-name="Table_20_Contents">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40"><text:span text:style-name="T1">Биты A14, A15 определяют</text:span> <text:span text:style-name="T1">окно</text:span> <text:span text:style-name="T1">процессора</text:span>, <text:span text:style-name="T1">для</text:span> <text:span text:style-name="T1">которого</text:span> <text:span text:style-name="T1">происходит</text:span> <text:span text:style-name="T1">включение</text:span> <text:span text:style-name="T1">требуемой</text:span> <text:span text:style-name="T1">страницы.</text:span> Следует <text:span text:style-name="T1">использовать</text:span> <text:span text:style-name="T1">следующие</text:span> <text:span text:style-name="T1">адреса</text:span> <text:span text:style-name="T1">этого</text:span> <text:span text:style-name="T1">порта</text:span>:</text:p>
            <text:p text:style-name="Table_20_Contents"><text:span text:style-name="T5">#3FF7</text:span><text:span text:style-name="T2"> – </text:span><text:span text:style-name="T1">для</text:span><text:span text:style-name="T2"> </text:span><text:span text:style-name="T1">окна</text:span><text:span text:style-name="T2"> #0000..#3FFF,</text:span></text:p>
            <text:p text:style-name="Table_20_Contents"><text:span text:style-name="T5">#7FF7</text:span><text:span text:style-name="T2"> – </text:span><text:span text:style-name="T1">для</text:span><text:span text:style-name="T2"> </text:span><text:span text:style-name="T1">окна</text:span><text:span text:style-name="T2"> #4000..#7FFF,</text:span></text:p>
            <text:p text:style-name="Table_20_Contents"><text:span text:style-name="T5">#BFF7</text:span><text:span text:style-name="T2"> – </text:span><text:span text:style-name="T1">для</text:span><text:span text:style-name="T2"> </text:span><text:span text:style-name="T1">окна</text:span><text:span text:style-name="T2"> #8000..#BFFF,</text:span></text:p>
            <text:p text:style-name="Table_20_Contents"><text:span text:style-name="T5">#FFF7</text:span><text:span text:style-name="T2"> – </text:span><text:span text:style-name="T1">для</text:span><text:span text:style-name="T2"> </text:span><text:span text:style-name="T1">окна</text:span><text:span text:style-name="T2"> #C000..#FFFF.</text:span></text:p>
            <text:p text:style-name="P41">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4">#7FFD</text:span>.</text:p>
          </table:table-cell>
        </table:table-row>
      </table:table>
      <text:p text:style-name="P42"/>
      <text:p text:style-name="P42"/>
      <table:table table:name="Table10" table:style-name="Table10">
        <table:table-column table:style-name="Table10.A"/>
        <table:table-column table:style-name="Table10.B"/>
        <text:soft-page-break/>
        <table:table-row>
          <table:table-cell table:style-name="Table10.A1" office:value-type="string">
            <text:p text:style-name="P37">Порт</text:p>
          </table:table-cell>
          <table:table-cell table:style-name="Table10.B1" office:value-type="string">
            <text:p text:style-name="P38">Описание</text:p>
          </table:table-cell>
        </table:table-row>
        <table:table-row>
          <table:table-cell table:style-name="Table10.A2" office:value-type="string">
            <text:p text:style-name="P39">#x7F7 WO</text:p>
            <text:p text:style-name="P39">shadow</text:p>
          </table:table-cell>
          <table:table-cell table:style-name="Table10.B2" office:value-type="string">
            <text:p text:style-name="P41">Управление диспетчером страниц.</text:p>
            <table:table table:name="Table11" table:style-name="Table11">
              <table:table-column table:style-name="Table11.A"/>
              <table:table-row>
                <table:table-cell table:style-name="Table11.A1" office:value-type="string">
                  <text:p text:style-name="P41">7..0: <text:span text:style-name="T3">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41">Биты A14, A15 определяют окно процессора, для которого происходит включение требуемой страницы. Следует использовать следующие адреса этого порта:</text:p>
            <text:p text:style-name="P41"><text:span text:style-name="T4">#37F7</text:span> – для окна #0000..#3FFF,</text:p>
            <text:p text:style-name="P41"><text:span text:style-name="T4">#77F7</text:span> – для окна #4000..#7FFF,</text:p>
            <text:p text:style-name="P41"><text:span text:style-name="T4">#B7F7</text:span> – для окна #8000..#BFFF,</text:p>
            <text:p text:style-name="P41"><text:span text:style-name="T4">#F7F7</text:span> – для окна #C000..#FFFF.</text:p>
            <text:p text:style-name="P41">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4">#7FFD</text:span>.</text:p>
            <text:p text:style-name="P41"><text:span text:style-name="T3">Внимание!</text:span><text:span text:style-name="T12"> </text:span>При записи в этот порт остаётся неизменным режим подмены младших бит номера страницы ОЗУ (бит «dos7ffd» порта <text:span text:style-name="T4">#xFF7</text:span><text:span text:style-name="T16">).</text:span> Однако, запись в <text:span text:style-name="T4">#x7F7</text:span> безусловно включает ОЗУ в окне (очищает бит «ramnrom» порта <text:span text:style-name="T4">#xFF7</text:span>).</text:p>
            <text:p text:style-name="Table_20_Contents"><text:span text:style-name="T2">Данный </text:span><text:span text:style-name="T1">порт</text:span><text:span text:style-name="T2"> </text:span><text:span text:style-name="T13">отсутствует</text:span><text:span text:style-name="T2"> </text:span><text:span text:style-name="T1">в</text:span><text:span text:style-name="T2"> ATM2.</text:span></text:p>
          </table:table-cell>
        </table:table-row>
      </table:table>
      <text:p text:style-name="P43"/>
      <table:table table:name="Table36" table:style-name="Table36">
        <table:table-column table:style-name="Table36.A"/>
        <table:table-column table:style-name="Table36.B"/>
        <table:table-row>
          <table:table-cell table:style-name="Table36.A1" office:value-type="string">
            <text:p text:style-name="P44">Порт</text:p>
          </table:table-cell>
          <table:table-cell table:style-name="Table36.B1" office:value-type="string">
            <text:p text:style-name="P45">Описание</text:p>
          </table:table-cell>
        </table:table-row>
        <table:table-row>
          <table:table-cell table:style-name="Table36.A2" office:value-type="string">
            <text:p text:style-name="P46">#x<text:span text:style-name="T17">B</text:span>F7 WO</text:p>
            <text:p text:style-name="P46">shadow</text:p>
          </table:table-cell>
          <table:table-cell table:style-name="Table36.B2" office:value-type="string">
            <text:p text:style-name="P47"><text:bookmark text:name="port_xBF7"/>Управление диспетчером страниц.</text:p>
            <table:table table:name="Table37" table:style-name="Table37">
              <table:table-column table:style-name="Table37.A"/>
              <table:table-row table:style-name="Table37.1">
                <table:table-cell table:style-name="Table37.A1" office:value-type="string">
                  <text:p text:style-name="P48">0: <text:span text:style-name="T17">Режим read-only для соотв. окна. 1 – режим read-only включён. 0 после сброса компьютера. Действует в т.ч. и на ROM-страницы, предлагая дополнительный уровень защиты от записи в ROM.</text:span></text:p>
                </table:table-cell>
              </table:table-row>
            </table:table>
            <text:p text:style-name="P49"><text:span text:style-name="T3">Внимание:</text:span> при включении в окно #0000..#3FFF страницы RAM при помощи порта #EFF7 или при входе в NMI защита от записи не действует.</text:p>
            <text:p text:style-name="P50"><text:span text:style-name="T1">Биты A14, A15 определяют</text:span> <text:span text:style-name="T1">окно</text:span> <text:span text:style-name="T1">процессора</text:span>, <text:span text:style-name="T1">для</text:span> <text:span text:style-name="T1">которого</text:span> <text:span text:style-name="T1">происходит</text:span> <text:span text:style-name="T1">включение</text:span> <text:span text:style-name="T1">требуемой</text:span> <text:span text:style-name="T1">страницы.</text:span> Следует <text:span text:style-name="T1">использовать</text:span> <text:span text:style-name="T1">следующие</text:span> <text:span text:style-name="T1">адреса</text:span> <text:span text:style-name="T1">этого</text:span> <text:span text:style-name="T1">порта</text:span>:</text:p>
            <text:p text:style-name="P48"><text:span text:style-name="T5">#3</text:span><text:span text:style-name="T18">B</text:span><text:span text:style-name="T5">F7</text:span><text:span text:style-name="T2"> – </text:span><text:span text:style-name="T1">для</text:span><text:span text:style-name="T2"> </text:span><text:span text:style-name="T1">окна</text:span><text:span text:style-name="T2"> #0000..#3FFF,</text:span></text:p>
            <text:p text:style-name="P48"><text:span text:style-name="T5">#7</text:span><text:span text:style-name="T18">B</text:span><text:span text:style-name="T5">F7</text:span><text:span text:style-name="T2"> – </text:span><text:span text:style-name="T1">для</text:span><text:span text:style-name="T2"> </text:span><text:span text:style-name="T1">окна</text:span><text:span text:style-name="T2"> #4000..#7FFF,</text:span></text:p>
            <text:p text:style-name="P48"><text:span text:style-name="T5">#B</text:span><text:span text:style-name="T18">B</text:span><text:span text:style-name="T5">F7</text:span><text:span text:style-name="T2"> – </text:span><text:span text:style-name="T1">для</text:span><text:span text:style-name="T2"> </text:span><text:span text:style-name="T1">окна</text:span><text:span text:style-name="T2"> #8000..#BFFF,</text:span></text:p>
            <text:p text:style-name="P48"><text:span text:style-name="T5">#F</text:span><text:span text:style-name="T18">B</text:span><text:span text:style-name="T5">F7</text:span><text:span text:style-name="T2"> – </text:span><text:span text:style-name="T1">для</text:span><text:span text:style-name="T2"> </text:span><text:span text:style-name="T1">окна</text:span><text:span text:style-name="T2"> #C000..#FFFF.</text:span></text:p>
            <text:p text:style-name="P47">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4">#7FFD</text:span>.</text:p>
          </table:table-cell>
        </table:table-row>
      </table:table>
      <table:table table:name="Table12" table:style-name="Table12">
        <table:table-column table:style-name="Table12.A"/>
        <table:table-column table:style-name="Table12.B"/>
        <text:soft-page-break/>
        <table:table-row>
          <table:table-cell table:style-name="Table12.A1" office:value-type="string">
            <text:p text:style-name="P37">Порт</text:p>
          </table:table-cell>
          <table:table-cell table:style-name="Table12.B1" office:value-type="string">
            <text:p text:style-name="P38">Описание</text:p>
          </table:table-cell>
        </table:table-row>
        <table:table-row table:style-name="Table12.2">
          <table:table-cell table:style-name="Table12.A2" office:value-type="string">
            <text:p text:style-name="P39">#7FFD</text:p>
            <text:p text:style-name="P39">WO</text:p>
            <text:p text:style-name="P39">always</text:p>
          </table:table-cell>
          <table:table-cell table:style-name="Table12.B2" office:value-type="string">
            <text:p text:style-name="Table_20_Contents">В режиме ZX <text:span text:style-name="T2">Spectrum</text:span> 128k:</text:p>
            <table:table table:name="Table13" table:style-name="Table13">
              <table:table-column table:style-name="Table13.A" table:number-columns-repeated="5"/>
              <table:table-row>
                <table:table-cell table:style-name="Table13.A1" office:value-type="string">
                  <text:p text:style-name="Table_20_Contents">6..7: не исп.</text:p>
                </table:table-cell>
                <table:table-cell table:style-name="Table13.A1" office:value-type="string">
                  <text:p text:style-name="Table_20_Contents">5: при записи 1 <text:s/>блокируется дальнейшая запись в порт <text:span text:style-name="T4">#7FFD</text:span>, до перехода в режим <text:span text:style-name="T2">pentagon</text:span> 1024k или до сброса. 0 после сброса.</text:p>
                </table:table-cell>
                <table:table-cell table:style-name="Table13.A1" office:value-type="string">
                  <text:p text:style-name="Table_20_Contents">4: выбор карты памяти (см. описание портов <text:span text:style-name="T4">#xxF7</text:span>). 0 после сброса.</text:p>
                </table:table-cell>
                <table:table-cell table:style-name="Table13.A1" office:value-type="string">
                  <text:p text:style-name="Table_20_Contents">3: выбор экрана. 0 после сброса.</text:p>
                </table:table-cell>
                <table:table-cell table:style-name="Table13.E1" office:value-type="string">
                  <text:p text:style-name="Table_20_Contents">2..0: замещают младшие 3 бита номера страницы, если такое замещение разрешено для какого-либо окна (см. описание портов <text:span text:style-name="T4">#xxF7</text:span>). 0 после сброса.</text:p>
                </table:table-cell>
              </table:table-row>
            </table:table>
            <text:p text:style-name="Table_20_Contents">В режиме <text:span text:style-name="T2">pentagon</text:span> 1024k:</text:p>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7..5, 2..0: замещают при необходимости младшие 6 бит номера страницы.</text:p>
                </table:table-cell>
                <table:table-cell table:style-name="Table14.A1" office:value-type="string">
                  <text:p text:style-name="Table_20_Contents">4: выбор карты памяти.</text:p>
                </table:table-cell>
                <table:table-cell table:style-name="Table14.C1" office:value-type="string">
                  <text:p text:style-name="Table_20_Contents">3: выбор экрана.</text:p>
                </table:table-cell>
              </table:table-row>
            </table:table>
            <text:p text:style-name="Table_20_Contents"/>
            <text:p text:style-name="Table_20_Contents"/>
          </table:table-cell>
        </table:table-row>
      </table:table>
      <text:p text:style-name="P51"><text:span text:style-name="T1">Программой начальной загрузки, хранящейся в ПЗУ ZX </text:span><text:span text:style-name="T2">Evolution</text:span><text:span text:style-name="T1"> (</text:span><text:span text:style-name="T2">reset</text:span><text:span text:style-name="T1"> </text:span><text:span text:style-name="T2">service</text:span><text:span text:style-name="T1">) производится настройка карт памяти таким образом, что бит 4 порта </text:span><text:span text:style-name="T9">#7FFD</text:span><text:span text:style-name="T11"> работает как выбор страницы ПЗУ в окне #0000..#3FFF (basic128/basic48), биты 2..0 (режим ZX </text:span><text:span text:style-name="T19">Spectrum</text:span><text:span text:style-name="T11"> 128k) или 7..5,2..0 (режим </text:span><text:span text:style-name="T19">pentagon</text:span><text:span text:style-name="T11"> 1024k) — замещают соответствующие биты номера страницы в окне #C000..#FFFF (более старшие биты номера страницы при этом — 0), в остальных двух окнах выставлены страницы, соответствующие конфигурации памяти ZX </text:span><text:span text:style-name="T19">Spectrum</text:span><text:span text:style-name="T11"> 128k.</text:span></text:p>
      <text:p text:style-name="P36"/>
      <table:table table:name="Table15" table:style-name="Table15">
        <table:table-column table:style-name="Table15.A"/>
        <table:table-column table:style-name="Table15.B"/>
        <table:table-row>
          <table:table-cell table:style-name="Table15.A1" office:value-type="string">
            <text:p text:style-name="P37">Порт</text:p>
          </table:table-cell>
          <table:table-cell table:style-name="Table15.B1" office:value-type="string">
            <text:p text:style-name="P38">Описание</text:p>
          </table:table-cell>
        </table:table-row>
        <table:table-row>
          <table:table-cell table:style-name="Table15.A2" office:value-type="string">
            <text:p text:style-name="P39">#EFF7</text:p>
            <text:p text:style-name="P39">WO</text:p>
            <text:p text:style-name="P39">noshad<text:bookmark text:name="__DdeLink__2100_853631111"/></text:p>
          </table:table-cell>
          <table:table-cell table:style-name="Table15.B2" office:value-type="string">
            <table:table table:name="Table16" table:style-name="Table16">
              <table:table-column table:style-name="Table16.A"/>
              <table:table-column table:style-name="Table16.B"/>
              <table:table-row>
                <table:table-cell table:style-name="Table16.A1" office:value-type="string">
                  <text:p text:style-name="Table_20_Contents">2: при выставлении в 1 — режим ZX <text:span text:style-name="T2">Spectrum</text:span> 128k, иначе — режим <text:span text:style-name="T2">pentagon</text:span> 1024k.</text:p>
                  <text:p text:style-name="Table_20_Contents">Значение после сброса — 0.</text:p>
                </table:table-cell>
                <table:table-cell table:style-name="Table16.B1" office:value-type="string">
                  <text:p text:style-name="Table_20_Contents">3: При выставлении в 1 в окно <text:span text:style-name="T16">#0000..#3FFF</text:span> принудительно включается нулевая страница ОЗУ. Этот бит <text:span text:style-name="T3">имеет приоритет</text:span> над всеми другими способами переключать страницы памяти в данном окне.</text:p>
                  <text:p text:style-name="Table_20_Contents">Значение после сброса — 0.</text:p>
                </table:table-cell>
              </table:table-row>
            </table:table>
            <text:p text:style-name="P52"/>
            <text:p text:style-name="Table_20_Contents"><text:span text:style-name="T13">Внимание!</text:span><text:span text:style-name="T1"> Остальные биты этого </text:span><text:span text:style-name="T2">write-only</text:span><text:span text:style-name="T1"> порта используются для других целей. См. стр. </text:span><text:span text:style-name="T1"><text:bookmark-ref text:reference-format="page" text:ref-name="__RefHeading__10979_959909826">48</text:bookmark-ref></text:span><text:span text:style-name="T1">.</text:span></text:p>
          </table:table-cell>
        </table:table-row>
      </table:table>
      <text:p text:style-name="P53"/>
      <text:h text:style-name="P11" text:outline-level="1"><text:bookmark-start text:name="__RefHeading__11020_959909826"/>Архитектура: управление скоростью процессора<text:bookmark-end text:name="__RefHeading__11020_959909826"/></text:h>
      <text:p text:style-name="P6">Реализованы следующие скорости процессора:</text:p>
      <text:list text:style-name="L9">
        <text:list-item>
          <text:p text:style-name="P54">3.5 МГц (nowait)</text:p>
        </text:list-item>
        <text:list-item>
          <text:p text:style-name="P54">7.0 МГц (nowait)</text:p>
        </text:list-item>
        <text:list-item>
          <text:p text:style-name="P54">14.0 МГц (with wait)</text:p>
        </text:list-item>
      </text:list>
      <text:p text:style-name="P6">В режиме 14 МГц эффективная скорость процессора в 1.66 раз больше, чем в режиме 7.0 МГц (по замерам программы turbotest v1.0).</text:p>
      <text:p text:style-name="P6">Для переключения скорости процессора используются биты в портах:</text:p>
      <table:table table:name="Table22" table:style-name="Table22">
        <table:table-column table:style-name="Table22.A"/>
        <table:table-column table:style-name="Table22.B"/>
        <table:table-column table:style-name="Table22.C"/>
        <table:table-row>
          <table:table-cell table:style-name="Table22.A1" office:value-type="string">
            <text:p text:style-name="Table_20_Contents">Порт #<text:span text:style-name="T4">xx77</text:span>, бит 3</text:p>
          </table:table-cell>
          <table:table-cell table:style-name="Table22.A1" office:value-type="string">
            <text:p text:style-name="Table_20_Contents">Порт #<text:span text:style-name="T4">EFF7</text:span>, бит 4</text:p>
          </table:table-cell>
          <table:table-cell table:style-name="Table22.C1" office:value-type="string">
            <text:p text:style-name="Table_20_Contents">Частота процессора, МГц</text:p>
          </table:table-cell>
        </table:table-row>
        <table:table-row>
          <table:table-cell table:style-name="Table22.A2" office:value-type="string">
            <text:p text:style-name="Table_20_Contents">0</text:p>
          </table:table-cell>
          <table:table-cell table:style-name="Table22.A2" office:value-type="string">
            <text:p text:style-name="Table_20_Contents">1</text:p>
          </table:table-cell>
          <table:table-cell table:style-name="Table22.C2" office:value-type="string">
            <text:p text:style-name="Table_20_Contents">3.5</text:p>
          </table:table-cell>
        </table:table-row>
        <table:table-row>
          <table:table-cell table:style-name="Table22.A2" office:value-type="string">
            <text:p text:style-name="Table_20_Contents">0</text:p>
          </table:table-cell>
          <table:table-cell table:style-name="Table22.A2" office:value-type="string">
            <text:p text:style-name="Table_20_Contents">0</text:p>
          </table:table-cell>
          <table:table-cell table:style-name="Table22.C2" office:value-type="string">
            <text:p text:style-name="Table_20_Contents">7.0</text:p>
          </table:table-cell>
        </table:table-row>
        <table:table-row>
          <table:table-cell table:style-name="Table22.A2" office:value-type="string">
            <text:p text:style-name="Table_20_Contents">1</text:p>
          </table:table-cell>
          <table:table-cell table:style-name="Table22.A2" office:value-type="string">
            <text:p text:style-name="Table_20_Contents">x</text:p>
          </table:table-cell>
          <table:table-cell table:style-name="Table22.C2" office:value-type="string">
            <text:p text:style-name="Table_20_Contents">14.0</text:p>
          </table:table-cell>
        </table:table-row>
      </table:table>
      <text:p text:style-name="P6">После сброса процессор работает на частоте 7.0 МГц.</text:p>
      <text:h text:style-name="P55" text:outline-level="1"><text:bookmark-start text:name="__RefHeading__20469_459111283"/>Архитектура: видеорежимы<text:bookmark-end text:name="__RefHeading__20469_459111283"/></text:h>
      <text:p text:style-name="P6">ZX <text:span text:style-name="T2">Evolution</text:span> поддерживает следующие видеорежимы:</text:p>
      <text:list text:style-name="L10">
        <text:list-item>
          <text:p text:style-name="P56">Стандартный ZX-режим 6912 байт</text:p>
        </text:list-item>
        <text:list-item>
          <text:p text:style-name="P57"><text:span text:style-name="T1">ZX hardware </text:span><text:span text:style-name="T2">multicolor</text:span><text:span text:style-name="T1">, отличающийся от стандартного ZX-режима наличием отдельного байта атрибута на каждый байт пикселей</text:span></text:p>
        </text:list-item>
        <text:list-item>
          <text:p text:style-name="P56">256x192 16 цветов по стандарту <text:span text:style-name="T2">Alone</text:span> Coder'а</text:p>
        </text:list-item>
        <text:list-item>
          <text:p text:style-name="P56">320x200 16 цветов по стандарту ATM</text:p>
        </text:list-item>
        <text:list-item>
          <text:p text:style-name="P56">640x200 hardware <text:span text:style-name="T2">multicolor</text:span> по стандарту ATM</text:p>
        </text:list-item>
        <text:list-item>
          <text:p text:style-name="P56">Текстовый режим 80x25 по стандарту ATM</text:p>
        </text:list-item>
      </text:list>
      <text:p text:style-name="P6">Кроме того, поддерживается палитра по стандарту ATM.</text:p>
      <text:h text:style-name="P25" text:outline-level="2"><text:bookmark-start text:name="__RefHeading__11018_959909826"/>Выбор видеорежимов<text:bookmark-end text:name="__RefHeading__11018_959909826"/></text:h>
      <text:p text:style-name="Text_20_body"><text:span text:style-name="T1">Выбор видеорежима осуществляется комбинацией бит в портах </text:span><text:span text:style-name="T9">#EFF7 (noshad, WO)</text:span><text:span text:style-name="T1"> и </text:span><text:span text:style-name="T9">#xx77 (</text:span><text:span text:style-name="T5">shadow</text:span><text:span text:style-name="T9">, WO)</text:span><text:span text:style-name="T11"> в соответствии с таблицей:</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Contents">Порт <text:span text:style-name="T4">#EFF7</text:span>, бит 0</text:p>
          </table:table-cell>
          <table:table-cell table:style-name="Table18.A1" office:value-type="string">
            <text:p text:style-name="Table_20_Contents">Порт <text:span text:style-name="T4">#EFF7</text:span>, бит 5</text:p>
          </table:table-cell>
          <table:table-cell table:style-name="Table18.A1" office:value-type="string">
            <text:p text:style-name="Table_20_Contents">Порт <text:span text:style-name="T4">#xx77</text:span>, биты 2..0</text:p>
          </table:table-cell>
          <table:table-cell table:style-name="Table18.D1" office:value-type="string">
            <text:p text:style-name="Table_20_Contents">Видеорежим</text:p>
          </table:table-cell>
        </table:table-row>
        <table:table-row>
          <table:table-cell table:style-name="Table18.A2" office:value-type="float" office:value="0">
            <text:p text:style-name="P33">0</text:p>
          </table:table-cell>
          <table:table-cell table:style-name="Table18.A2" office:value-type="float" office:value="0">
            <text:p text:style-name="P33">0</text:p>
          </table:table-cell>
          <table:table-cell table:style-name="Table18.C2" office:value-type="string">
            <text:p text:style-name="P33">011</text:p>
          </table:table-cell>
          <table:table-cell table:style-name="Table18.D2" office:value-type="string">
            <text:p text:style-name="Table_20_Contents">Стандартный ZX-режим</text:p>
          </table:table-cell>
        </table:table-row>
        <table:table-row>
          <table:table-cell table:style-name="Table18.A3" office:value-type="string">
            <text:p text:style-name="P33">0</text:p>
          </table:table-cell>
          <table:table-cell table:style-name="Table18.B3" office:value-type="string">
            <text:p text:style-name="P33">1</text:p>
          </table:table-cell>
          <table:table-cell table:style-name="Table18.C2" office:value-type="string">
            <text:p text:style-name="P33">011</text:p>
          </table:table-cell>
          <table:table-cell table:style-name="Table18.D2" office:value-type="string">
            <text:p text:style-name="Table_20_Contents">ZX hardware <text:span text:style-name="T2">multicolor</text:span></text:p>
          </table:table-cell>
        </table:table-row>
        <table:table-row>
          <table:table-cell table:style-name="Table18.A3" office:value-type="string">
            <text:p text:style-name="P33">1</text:p>
          </table:table-cell>
          <table:table-cell table:style-name="Table18.B3" office:value-type="string">
            <text:p text:style-name="P33">0</text:p>
          </table:table-cell>
          <table:table-cell table:style-name="Table18.C2" office:value-type="string">
            <text:p text:style-name="P33">011</text:p>
          </table:table-cell>
          <table:table-cell table:style-name="Table18.D2" office:value-type="string">
            <text:p text:style-name="Table_20_Contents">ZX 256x192 16 цветов</text:p>
          </table:table-cell>
        </table:table-row>
        <table:table-row>
          <table:table-cell table:style-name="Table18.A3" office:value-type="string">
            <text:p text:style-name="P33">0</text:p>
          </table:table-cell>
          <table:table-cell table:style-name="Table18.B3" office:value-type="string">
            <text:p text:style-name="P33">0</text:p>
          </table:table-cell>
          <table:table-cell table:style-name="Table18.C2" office:value-type="string">
            <text:p text:style-name="P33">010</text:p>
          </table:table-cell>
          <table:table-cell table:style-name="Table18.D2" office:value-type="string">
            <text:p text:style-name="Table_20_Contents">ATM 640x200 hardware <text:span text:style-name="T2">multicolor</text:span></text:p>
          </table:table-cell>
        </table:table-row>
        <text:soft-page-break/>
        <table:table-row>
          <table:table-cell table:style-name="Table18.A3" office:value-type="string">
            <text:p text:style-name="P33">0</text:p>
          </table:table-cell>
          <table:table-cell table:style-name="Table18.B3" office:value-type="string">
            <text:p text:style-name="P33">0</text:p>
          </table:table-cell>
          <table:table-cell table:style-name="Table18.C2" office:value-type="string">
            <text:p text:style-name="P33">000</text:p>
          </table:table-cell>
          <table:table-cell table:style-name="Table18.D2" office:value-type="string">
            <text:p text:style-name="Table_20_Contents">ATM 320x200 16 цветов</text:p>
          </table:table-cell>
        </table:table-row>
        <table:table-row>
          <table:table-cell table:style-name="Table18.A3" office:value-type="string">
            <text:p text:style-name="P33">0</text:p>
          </table:table-cell>
          <table:table-cell table:style-name="Table18.B3" office:value-type="string">
            <text:p text:style-name="P33">0</text:p>
          </table:table-cell>
          <table:table-cell table:style-name="Table18.C2" office:value-type="string">
            <text:p text:style-name="P33">110</text:p>
          </table:table-cell>
          <table:table-cell table:style-name="Table18.D2" office:value-type="string">
            <text:p text:style-name="Table_20_Contents">ATM Текстовый режим 80x25</text:p>
          </table:table-cell>
        </table:table-row>
        <table:table-row>
          <table:table-cell table:style-name="Table18.A3" office:value-type="string">
            <text:p text:style-name="P33">0</text:p>
          </table:table-cell>
          <table:table-cell table:style-name="Table18.B3" office:value-type="string">
            <text:p text:style-name="P33">0</text:p>
          </table:table-cell>
          <table:table-cell table:style-name="Table18.C2" office:value-type="string">
            <text:p text:style-name="P33">111</text:p>
          </table:table-cell>
          <table:table-cell table:style-name="Table18.D2" office:value-type="string">
            <text:p text:style-name="Table_20_Contents">ATM-подобный текстовый режим 80x25 в одной странице</text:p>
          </table:table-cell>
        </table:table-row>
      </table:table>
      <text:p text:style-name="P58"/>
      <text:p text:style-name="P58">Все другие комбинации указанных бит являются невалидными, поведение компьютера при установке таких комбинаций не определено и может измениться в последующих версиях прошивки FPGA.</text:p>
      <text:h text:style-name="P25" text:outline-level="2"><text:bookmark-start text:name="__RefNumPara__7843_195782161"/><text:bookmark-start text:name="__RefHeading__11064_959909826"/>Палитра<text:bookmark-end text:name="__RefNumPara__7843_195782161"/><text:bookmark-end text:name="__RefHeading__11064_959909826"/></text:h>
      <text:p text:style-name="P6">Палитра задаёт отображение 16 доступных для каждого видеорежима и бордюра цветов в 64 аппаратных цвета (каждая из компонент R,G и B имеет 2-битные градации яркости, от чёрного до максимально насыщенного). При сбросе компьютера ПО в ПЗУ устанавливает палитру в режим совместимости с ZX-Spectum, т. е. цвета, отображаемые в стандартном ZX-режиме, соответствуют цветам ZX-Spectrum.</text:p>
      <text:p text:style-name="Text_20_body"><text:span text:style-name="T1">Программное изменение палитры осуществляется следующим образом. Текущий отображаемый цвет определяет элемент палитры, который будет изменён. Для разрешения изменения палитры необходимо произвести запись в порт </text:span><text:span text:style-name="T9">#xx77 (WO, </text:span><text:span text:style-name="T5">shadow</text:span><text:span text:style-name="T9">)</text:span><text:span text:style-name="T1"> с очищенным битом адреса A14 (</text:span><text:span text:style-name="T13">Внимание</text:span><text:span text:style-name="T1"> — остальные биты (как биты данных, так и биты старшего байта адреса) этого порта используются для других целей – см. стр. </text:span><text:span text:style-name="T1"><text:bookmark-ref text:reference-format="page" text:ref-name="__RefNumPara__6276_1334049885">48</text:bookmark-ref></text:span><text:span text:style-name="T1">). Новое значение элемента палитры устанавливается записью в порт </text:span><text:span text:style-name="T9">#FF (WO, </text:span><text:span text:style-name="T5">shadow</text:span><text:span text:style-name="T9">)</text:span><text:span text:style-name="T1">, который при очищенном бите A14 порта </text:span><text:span text:style-name="T9">#xx77</text:span><text:span text:style-name="T1"> начинает </text:span><text:span text:style-name="T13">одновременно</text:span><text:span text:style-name="T1"> выполнять функции порта контроллера дисковода и порта установки палитры.</text:span></text:p>
      <text:p text:style-name="Text_20_body"><text:bookmark text:name="palette_write_FF"/><text:span text:style-name="T1">Интерпретация записываемого в порт </text:span><text:span text:style-name="T9">#FF</text:span><text:span text:style-name="T1"> значения:</text:span></text:p>
      <table:table table:name="Table19" table:style-name="Table19">
        <table:table-column table:style-name="Table19.A"/>
        <table:table-column table:style-name="Table19.B"/>
        <table:table-row>
          <table:table-cell table:style-name="Table19.A1" office:value-type="string">
            <text:p text:style-name="Table_20_Contents">Бит записываемого байта</text:p>
          </table:table-cell>
          <table:table-cell table:style-name="Table19.B1" office:value-type="string">
            <text:p text:style-name="Table_20_Contents">Значение</text:p>
          </table:table-cell>
        </table:table-row>
        <table:table-row>
          <table:table-cell table:style-name="Table19.A2" office:value-type="string">
            <text:p text:style-name="Table_20_Contents">7</text:p>
          </table:table-cell>
          <table:table-cell table:style-name="Table19.B2" office:value-type="string">
            <text:p text:style-name="Table_20_Contents"><text:span text:style-name="T20">~</text:span>g</text:p>
          </table:table-cell>
        </table:table-row>
        <table:table-row>
          <table:table-cell table:style-name="Table19.A2" office:value-type="string">
            <text:p text:style-name="Table_20_Contents">6</text:p>
          </table:table-cell>
          <table:table-cell table:style-name="Table19.B2" office:value-type="string">
            <text:p text:style-name="Table_20_Contents"><text:span text:style-name="T20">~</text:span>r</text:p>
          </table:table-cell>
        </table:table-row>
        <table:table-row>
          <table:table-cell table:style-name="Table19.A2" office:value-type="string">
            <text:p text:style-name="Table_20_Contents">5</text:p>
          </table:table-cell>
          <table:table-cell table:style-name="Table19.B2" office:value-type="string">
            <text:p text:style-name="Table_20_Contents"><text:span text:style-name="T20">~</text:span>b</text:p>
          </table:table-cell>
        </table:table-row>
        <table:table-row>
          <table:table-cell table:style-name="Table19.A2" office:value-type="string">
            <text:p text:style-name="Table_20_Contents">4</text:p>
          </table:table-cell>
          <table:table-cell table:style-name="Table19.B2" office:value-type="string">
            <text:p text:style-name="Table_20_Contents"><text:span text:style-name="T20">~</text:span>G</text:p>
          </table:table-cell>
        </table:table-row>
        <table:table-row>
          <table:table-cell table:style-name="Table19.A2" office:value-type="string">
            <text:p text:style-name="Table_20_Contents">3</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2</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1</text:p>
          </table:table-cell>
          <table:table-cell table:style-name="Table19.B2" office:value-type="string">
            <text:p text:style-name="Table_20_Contents"><text:span text:style-name="T20">~</text:span>R</text:p>
          </table:table-cell>
        </table:table-row>
        <table:table-row>
          <table:table-cell table:style-name="Table19.A2" office:value-type="string">
            <text:p text:style-name="Table_20_Contents">0</text:p>
          </table:table-cell>
          <table:table-cell table:style-name="Table19.B2" office:value-type="string">
            <text:p text:style-name="Table_20_Contents"><text:span text:style-name="T20">~</text:span>B</text:p>
          </table:table-cell>
        </table:table-row>
      </table:table>
      <text:p text:style-name="P59"><text:span text:style-name="T21">Для </text:span><text:span text:style-name="T22">двухбитовых </text:span><text:span text:style-name="T21">компонентов цвета, </text:span><text:span text:style-name="T22">обозначенных как</text:span><text:span text:style-name="T21"> </text:span><text:span text:style-name="T22">{</text:span><text:span text:style-name="T23">Rr</text:span><text:span text:style-name="T24">}</text:span><text:span text:style-name="T23">, </text:span><text:span text:style-name="T24">{</text:span><text:span text:style-name="T23">Gg</text:span><text:span text:style-name="T24">}</text:span><text:span text:style-name="T23"> </text:span><text:span text:style-name="T21">и </text:span><text:span text:style-name="T22">{</text:span><text:span text:style-name="T23">B</text:span><text:span text:style-name="T24">b}</text:span><text:span text:style-name="T23">, </text:span><text:span text:style-name="T21">записываемый байт будет </text:span><text:span text:style-name="T23">~{grbG00RB}, </text:span><text:span text:style-name="T25">где </text:span><text:span text:style-name="T20">'~' </text:span><text:span text:style-name="T25">обозначает побитовую инверсию.</text:span></text:p>
      <text:p text:style-name="P59"><text:span text:style-name="T25">Примечание: удобно изменять палитру в момент отображения бордюра: в этом случае текущий отображаемый цвет является цветом бордюра. Для того, чтобы процесс изменения палитры не был виден на экране, его следует проводить в процедуре обработки кадрового прерывания (вариант — после команды </text:span><text:span text:style-name="T26">HALT</text:span><text:span text:style-name="T25">).</text:span></text:p>
      <text:h text:style-name="Heading_20_3" text:outline-level="3"><text:bookmark-start text:name="__RefNumPara__7617_195782161"/><text:bookmark-start text:name="__RefHeading___Toc8132_3082233168"/><text:soft-page-break/>Расширенный цветовой диапазон<text:bookmark-end text:name="__RefNumPara__7617_195782161"/><text:bookmark-end text:name="__RefHeading___Toc8132_3082233168"/></text:h>
      <text:p text:style-name="P60">Расширенный цветовой диапазон включается записью 1 в бит 5 порта <text:bookmark-ref text:reference-format="text" text:ref-name="Порт BF">#xxBF</text:bookmark-ref><text:span text:style-name="T2">.</text:span></text:p>
      <text:p text:style-name="P61">Данный режим поддерживается в конфигурациях не старее 6 ноября 2021 года релиза.</text:p>
      <text:p text:style-name="P62">В этом случае кажд<text:span text:style-name="T27">ый</text:span> компонент цветов<text:span text:style-name="T2"> R, G</text:span> и<text:span text:style-name="T2"> B</text:span> имеет 4-битную градацию яркости: <text:span text:style-name="T27">{R</text:span><text:span text:style-name="T28">3</text:span><text:span text:style-name="T27">R</text:span><text:span text:style-name="T29">2</text:span><text:span text:style-name="T27">R</text:span><text:span text:style-name="T29">1</text:span><text:span text:style-name="T27">R</text:span><text:span text:style-name="T29">0</text:span><text:span text:style-name="T30">}, </text:span><text:span text:style-name="T31">{G</text:span><text:span text:style-name="T28">3</text:span><text:span text:style-name="T30">G</text:span><text:span text:style-name="T29">2</text:span><text:span text:style-name="T30">G</text:span><text:span text:style-name="T29">1</text:span><text:span text:style-name="T30">G</text:span><text:span text:style-name="T29">0</text:span><text:span text:style-name="T30">}, </text:span><text:span text:style-name="T31">{B</text:span><text:span text:style-name="T28">3</text:span><text:span text:style-name="T30">B</text:span><text:span text:style-name="T29">2</text:span><text:span text:style-name="T30">B</text:span><text:span text:style-name="T29">1</text:span><text:span text:style-name="T30">B</text:span><text:span text:style-name="T29">0</text:span><text:span text:style-name="T30">}.</text:span></text:p>
      <text:p text:style-name="P63">Программное изменение палитры аналогично режиму 2 бита на цвет (см. раздел <text:bookmark-ref text:reference-format="chapter" text:ref-name="__RefNumPara__7843_195782161">7.2</text:bookmark-ref>), <text:span text:style-name="T32">за исключением интерпретации записываемого в порт </text:span><text:span text:style-name="T33">#</text:span><text:span text:style-name="T34">xx</text:span><text:span text:style-name="T33">FF</text:span><text:span text:style-name="T32"> значения. </text:span></text:p>
      <text:p text:style-name="P64"><text:bookmark text:name="palette_write_FF1"/><text:span text:style-name="T1">Интерпретация записываемого в порт </text:span><text:span text:style-name="T9">#</text:span><text:span text:style-name="T35">xx</text:span><text:span text:style-name="T9">FF</text:span><text:span text:style-name="T1"> значения, </text:span><text:span text:style-name="T36">при включенном расширенном цветовом диапазоне</text:span><text:span text:style-name="T1">:</text:span></text:p>
      <table:table table:name="Таблица15" table:style-name="Таблица15">
        <table:table-column table:style-name="Таблица15.A"/>
        <table:table-column table:style-name="Таблица15.B"/>
        <table:table-row>
          <table:table-cell table:style-name="Таблица15.A1" office:value-type="string">
            <text:p text:style-name="P65">Бит записываемого байта <text:span text:style-name="T32">данных</text:span></text:p>
          </table:table-cell>
          <table:table-cell table:style-name="Таблица15.B1" office:value-type="string">
            <text:p text:style-name="P65">Значение</text:p>
          </table:table-cell>
        </table:table-row>
        <table:table-row>
          <table:table-cell table:style-name="Таблица15.A2" office:value-type="string">
            <text:p text:style-name="P65">7</text:p>
          </table:table-cell>
          <table:table-cell table:style-name="Таблица15.B2" office:value-type="string">
            <text:p text:style-name="P65"><text:span text:style-name="T20">~</text:span><text:span text:style-name="T37">G</text:span><text:span text:style-name="T28">2</text:span></text:p>
          </table:table-cell>
        </table:table-row>
        <table:table-row>
          <table:table-cell table:style-name="Таблица15.A2" office:value-type="string">
            <text:p text:style-name="P65">6</text:p>
          </table:table-cell>
          <table:table-cell table:style-name="Таблица15.B2" office:value-type="string">
            <text:p text:style-name="P65"><text:span text:style-name="T20">~</text:span><text:span text:style-name="T37">R</text:span><text:span text:style-name="T28">2</text:span></text:p>
          </table:table-cell>
        </table:table-row>
        <table:table-row>
          <table:table-cell table:style-name="Таблица15.A2" office:value-type="string">
            <text:p text:style-name="P65">5</text:p>
          </table:table-cell>
          <table:table-cell table:style-name="Таблица15.B2" office:value-type="string">
            <text:p text:style-name="P65"><text:span text:style-name="T20">~</text:span><text:span text:style-name="T37">B</text:span><text:span text:style-name="T28">2</text:span></text:p>
          </table:table-cell>
        </table:table-row>
        <table:table-row>
          <table:table-cell table:style-name="Таблица15.A2" office:value-type="string">
            <text:p text:style-name="P65">4</text:p>
          </table:table-cell>
          <table:table-cell table:style-name="Таблица15.B2" office:value-type="string">
            <text:p text:style-name="P65"><text:span text:style-name="T20">~</text:span>G<text:span text:style-name="T28">3</text:span></text:p>
          </table:table-cell>
        </table:table-row>
        <table:table-row>
          <table:table-cell table:style-name="Таблица15.A2" office:value-type="string">
            <text:p text:style-name="P65">3</text:p>
          </table:table-cell>
          <table:table-cell table:style-name="Таблица15.B2" office:value-type="string">
            <text:p text:style-name="P65">Устанавливать в 1 для корректной работы контроллера дисководов</text:p>
          </table:table-cell>
        </table:table-row>
        <table:table-row>
          <table:table-cell table:style-name="Таблица15.A2" office:value-type="string">
            <text:p text:style-name="P65">2</text:p>
          </table:table-cell>
          <table:table-cell table:style-name="Таблица15.B2" office:value-type="string">
            <text:p text:style-name="P65">Устанавливать в 1 для корректной работы контроллера дисководов</text:p>
          </table:table-cell>
        </table:table-row>
        <table:table-row>
          <table:table-cell table:style-name="Таблица15.A2" office:value-type="string">
            <text:p text:style-name="P65">1</text:p>
          </table:table-cell>
          <table:table-cell table:style-name="Таблица15.B2" office:value-type="string">
            <text:p text:style-name="P65"><text:span text:style-name="T20">~</text:span>R<text:span text:style-name="T28">3</text:span></text:p>
          </table:table-cell>
        </table:table-row>
        <table:table-row>
          <table:table-cell table:style-name="Таблица15.A2" office:value-type="string">
            <text:p text:style-name="P65">0</text:p>
          </table:table-cell>
          <table:table-cell table:style-name="Таблица15.B2" office:value-type="string">
            <text:p text:style-name="P65"><text:span text:style-name="T20">~</text:span>B<text:span text:style-name="T28">3</text:span></text:p>
          </table:table-cell>
        </table:table-row>
      </table:table>
      <table:table table:name="Таблица16" table:style-name="Таблица16">
        <table:table-column table:style-name="Таблица16.A"/>
        <table:table-column table:style-name="Таблица16.B"/>
        <table:table-row>
          <table:table-cell table:style-name="Таблица16.A1" office:value-type="string">
            <text:p text:style-name="P65">Бит <text:span text:style-name="T32">адреса порта </text:span><text:span text:style-name="T35">#xxFF</text:span></text:p>
          </table:table-cell>
          <table:table-cell table:style-name="Таблица16.B1" office:value-type="string">
            <text:p text:style-name="P65">Значение</text:p>
          </table:table-cell>
        </table:table-row>
        <table:table-row>
          <table:table-cell table:style-name="Таблица16.A2" office:value-type="string">
            <text:p text:style-name="P66">15</text:p>
          </table:table-cell>
          <table:table-cell table:style-name="Таблица16.B2" office:value-type="string">
            <text:p text:style-name="P65"><text:span text:style-name="T20">~</text:span><text:span text:style-name="T37">G</text:span><text:span text:style-name="T28">0</text:span></text:p>
          </table:table-cell>
        </table:table-row>
        <table:table-row>
          <table:table-cell table:style-name="Таблица16.A2" office:value-type="string">
            <text:p text:style-name="P66">14</text:p>
          </table:table-cell>
          <table:table-cell table:style-name="Таблица16.B2" office:value-type="string">
            <text:p text:style-name="P65"><text:span text:style-name="T20">~</text:span><text:span text:style-name="T37">R</text:span><text:span text:style-name="T28">0</text:span></text:p>
          </table:table-cell>
        </table:table-row>
        <table:table-row>
          <table:table-cell table:style-name="Таблица16.A2" office:value-type="string">
            <text:p text:style-name="P66">13</text:p>
          </table:table-cell>
          <table:table-cell table:style-name="Таблица16.B2" office:value-type="string">
            <text:p text:style-name="P65"><text:span text:style-name="T20">~</text:span><text:span text:style-name="T37">B</text:span><text:span text:style-name="T28">0</text:span></text:p>
          </table:table-cell>
        </table:table-row>
        <table:table-row>
          <table:table-cell table:style-name="Таблица16.A2" office:value-type="string">
            <text:p text:style-name="P66">12</text:p>
          </table:table-cell>
          <table:table-cell table:style-name="Таблица16.B2" office:value-type="string">
            <text:p text:style-name="P65"><text:span text:style-name="T20">~</text:span>G<text:span text:style-name="T28">1</text:span></text:p>
          </table:table-cell>
        </table:table-row>
        <table:table-row>
          <table:table-cell table:style-name="Таблица16.A2" office:value-type="string">
            <text:p text:style-name="P67">11</text:p>
          </table:table-cell>
          <table:table-cell table:style-name="Таблица16.B2" office:value-type="string">
            <text:p text:style-name="P68">Устанавливать в 1 для <text:span text:style-name="T38">обратной совместимости</text:span></text:p>
          </table:table-cell>
        </table:table-row>
        <table:table-row>
          <table:table-cell table:style-name="Таблица16.A2" office:value-type="string">
            <text:p text:style-name="P67">10</text:p>
          </table:table-cell>
          <table:table-cell table:style-name="Таблица16.B2" office:value-type="string">
            <text:p text:style-name="P68">Устанавливать в 1 для <text:span text:style-name="T38">обратной совместимости</text:span></text:p>
          </table:table-cell>
        </table:table-row>
        <table:table-row>
          <table:table-cell table:style-name="Таблица16.A2" office:value-type="string">
            <text:p text:style-name="P66">9</text:p>
          </table:table-cell>
          <table:table-cell table:style-name="Таблица16.B2" office:value-type="string">
            <text:p text:style-name="P65"><text:span text:style-name="T20">~</text:span>R<text:span text:style-name="T28">1</text:span></text:p>
          </table:table-cell>
        </table:table-row>
        <table:table-row>
          <table:table-cell table:style-name="Таблица16.A2" office:value-type="string">
            <text:p text:style-name="P66">8</text:p>
          </table:table-cell>
          <table:table-cell table:style-name="Таблица16.B2" office:value-type="string">
            <text:p text:style-name="P65"><text:span text:style-name="T20">~</text:span>B<text:span text:style-name="T28">1</text:span></text:p>
          </table:table-cell>
        </table:table-row>
      </table:table>
      <text:p text:style-name="P63"><text:span text:style-name="T39">где </text:span><text:span text:style-name="T20">'~' </text:span><text:span text:style-name="T39">обозначает побитовую инверсию, </text:span><text:span text:style-name="T40">а подстрочные номера соответствуют номерам бита градации яркости.</text:span></text:p>
      <text:h text:style-name="P25" text:outline-level="2"><text:bookmark-start text:name="__RefHeading__11777_959909826"/>Бордюр<text:bookmark-end text:name="__RefHeading__11777_959909826"/></text:h>
      <text:p text:style-name="Text_20_body"><text:span text:style-name="T1">Бордюр — видимая область экрана, находящаяся за пределами пикселей, определяемых каким-либо видеорежимом. Цвет бордюра задаётся битами 2..0 записываемых значений в порты </text:span><text:span text:style-name="T9">#FE (RW, always)</text:span><text:span text:style-name="T1"> или </text:span><text:span text:style-name="T9">#F6 (RW, </text:span><text:span text:style-name="T5">always</text:span><text:span text:style-name="T9">)</text:span><text:span text:style-name="T1">: при записи в порт </text:span><text:span text:style-name="T9">#FE</text:span><text:span text:style-name="T1"> возможно установить цвета 0..7, при записи в </text:span><text:span text:style-name="T9">#F6</text:span><text:span text:style-name="T1"> — 8..15. См. стр. </text:span><text:span text:style-name="T1"><text:bookmark-ref text:reference-format="page" text:ref-name="__RefHeading__10979_959909826">48</text:bookmark-ref></text:span><text:span text:style-name="T1">.</text:span><text:bookmark-start text:name="__DdeLink__6760_422571322"/></text:p>
      <text:h text:style-name="P25" text:outline-level="2"><text:bookmark-start text:name="__RefHeading__11166_959909826"/><text:soft-page-break/>Адресация видеорежимов<text:bookmark-end text:name="__RefHeading__11166_959909826"/><text:bookmark-end text:name="__DdeLink__6760_422571322"/></text:h>
      <text:p text:style-name="Text_20_body"><text:span text:style-name="T1">Для каждого видеорежима существует по два набора страниц, из которых осуществляется выборка видеоданных. Выбор набора страниц определяет бит 3 порта </text:span><text:span text:style-name="T9">#7FFD (WO, </text:span><text:span text:style-name="T5">always</text:span><text:span text:style-name="T9">)</text:span><text:span text:style-name="T1">. Страницы, соответствующие единичному состоянию этого бита, приведёны в описаниях режимов в скобках.</text:span></text:p>
      <text:h text:style-name="P69" text:outline-level="3"><text:bookmark-start text:name="__RefHeading__20471_459111283"/>Стандартный ZX-режим<text:bookmark-end text:name="__RefHeading__20471_459111283"/></text:h>
      <text:p text:style-name="P6">Выборка из страницы 5(7). Пиксели каждой строки состоят из бит непрерывной байтовой строки (порядок выдачи бит из отдельного байта — от старшего бита к младшему). Начальные смещения байтовых строк вычисляются из номера Y строки (Y=0..191, Y=0 для верхней строки) следующим образом: pixoffset = { Y[7:6], Y[2:0], Y[5:3] } &lt;&lt; 5, где Y[m:n] — выборка соответствующей битовой последовательности из величины Y, {} - конкатенация битовых последовательностей в число, &lt;&lt; - сдвиг влево на указанное число бит с заполнением младших бит нулями.</text:p>
      <text:p text:style-name="P6">Битовая карта режима делится на квадраты 8x8 пикселей, каждый такой квадрат имеет свой байтовый атрибут, расположенный по смещению attroffset = #1800 + Y*32 + X, где X,Y — координаты квадрата 8x8 пикселей (0,0 — верхний левый квадрат, 1,0 — его сосед справа и т.д.).</text:p>
      <text:p text:style-name="P6">Цвет пикселя, соответствующего единичному биту, определяется байтом атрибута attr как {attr[6]. attr[2:0]}. Цвет пикселя, соответствующего нулевому биту — как {attr[6], attr[5:3]}. Установленный бит attr[7] приводит к аппаратной периодической (с периодом ~1 Гц) инверсии всех считанных из памяти бит пикселей в пределах квадрата 8x8 пикселей соответствующего атрибута.</text:p>
      <text:h text:style-name="P69" text:outline-level="3"><text:bookmark-start text:name="__RefHeading__20473_459111283"/>ZX hardware <text:span text:style-name="T2">multicolor</text:span><text:bookmark-end text:name="__RefHeading__20473_459111283"/></text:h>
      <text:p text:style-name="P6">Данный режим совпадает со стандартным ZX-режимом в части выборки байтов пикселей. Атрибут, в отличие от стандартного ZX-режима, индивидуальный у каждого байта пикселей. Смещение атрибута attroffset = pixoffset + #2000, где pixoffset — смещение соответствующего байта пикселей. Интерпретация байта атрибута такая же, как в стандартном ZX-режиме.</text:p>
      <text:h text:style-name="P69" text:outline-level="3"><text:bookmark-start text:name="__RefHeading__20475_459111283"/>ZX 256x192 16 цветов<text:bookmark-end text:name="__RefHeading__20475_459111283"/></text:h>
      <text:p text:style-name="P6">В данном режиме для каждого блока пикселей шириной 8 и высотой 1 пиксель приведём в соответствие байт пикселей стандартного ZX-режима, который имеет смещение zxoffset. Для отображения блока пикселей считываются 4 байта:</text:p>
      <text:list text:style-name="L11">
        <text:list-item>
          <text:p text:style-name="P70">byte0 — страница 4(6), смещение zxoffset + #0000</text:p>
        </text:list-item>
        <text:list-item>
          <text:p text:style-name="P70">byte1 — страница 5(7), смещение zxoffset + #0000 </text:p>
        </text:list-item>
        <text:list-item>
          <text:p text:style-name="P70">byte2 — страница 4(6), смещение zxoffset + #2000</text:p>
        </text:list-item>
        <text:list-item>
          <text:p text:style-name="P70">byte3 — страница 5(7), смещение zxoffset + #2000</text:p>
        </text:list-item>
      </text:list>
      <text:p text:style-name="P6">Каждый пиксель блока пикселей (слева направо) имеет цвета: {byte0[6], byte0[2:0]}, {byte0[7], byte0[5:3]}, <text:s/>{byte1[6], byte1[2:0]}, {byte1[7], byte1[5:3]}, {byte2[6], byte2[2:0]}, {byte2[7], byte2[5:3]}, {byte3[6], byte3[2:0]}, {byte3[7], byte3[5:3]}.</text:p>
      <text:h text:style-name="P69" text:outline-level="3"><text:bookmark-start text:name="__RefHeading__20477_459111283"/><text:soft-page-break/>ATM 640x200 hardware <text:span text:style-name="T2">multicolor</text:span><text:bookmark-end text:name="__RefHeading__20477_459111283"/></text:h>
      <text:p text:style-name="P6">Разделим массив пикселей 640x200 на блоки, каждый высотой 1 пиксель и шириной 16 (блоки 16x1). Введём координаты таких блоков X,Y ( верхний левый блок — 0,0; его сосед справа — 1,0; сосед снизу — 0,1 и т. д., X=0..39, Y==0..199). Введём смещение offset = X + Y*40. Для отображения блока пикселей считываются 4 байта по следующим адресам:</text:p>
      <text:list text:style-name="L12">
        <text:list-item>
          <text:p text:style-name="P71">byte0 — страница 1(3), смещение offset + #0000</text:p>
        </text:list-item>
        <text:list-item>
          <text:p text:style-name="P71">byte1 — страница 5(7), смещение <text:span text:style-name="T2">offset</text:span> + #0000</text:p>
        </text:list-item>
        <text:list-item>
          <text:p text:style-name="P71">byte2 — страница 1(3), смещение <text:span text:style-name="T2">offset</text:span> + #2000</text:p>
        </text:list-item>
        <text:list-item>
          <text:p text:style-name="P71">byte3 — страница 5(7), смещение <text:span text:style-name="T2">offset</text:span> + #2000</text:p>
        </text:list-item>
      </text:list>
      <text:p text:style-name="Text_20_body"><text:span text:style-name="T1">В пределах каждого блока есть два байта пикселей и два байта атрибутов. Для левых 8 пикселей блока байт пикселей — byte1, байт атрибутов — byte0; для правых 8 пикселей, соответственно, byte3 и </text:span><text:span text:style-name="T2">byte</text:span><text:span text:style-name="T1"> 2.</text:span></text:p>
      <text:p text:style-name="P6">Интерпретация байта атрибутов: {attr[6], attr[2:0]} — цвет, соответствующий единичному биту из байта пикселей, {attr[7], attr[5:3]} — цвет, соответствующий нулевому биту.</text:p>
      <text:h text:style-name="P69" text:outline-level="3"><text:bookmark-start text:name="__RefHeading__20479_459111283"/>ATM 320x200 16 цветов<text:bookmark-end text:name="__RefHeading__20479_459111283"/></text:h>
      <text:p text:style-name="P6">Массив пикселей 320x200 разделяем на блоки 8x1 и вводим их координаты X,Y аналогично режиму 640x200 hardware <text:span text:style-name="T2">multicolor.</text:span> Требуемые для отображения блока 4 байта считываются по тем же адресам, что и в режиме 640x200 hardware <text:span text:style-name="T2">multicolor.</text:span> Составление пикселей из этих 4 байт производится так же, как и в режиме 256x192 16 цветов.</text:p>
      <text:h text:style-name="P69" text:outline-level="3"><text:bookmark-start text:name="__RefNumPara__5751_1048627447"/><text:bookmark-start text:name="__RefHeading__20481_459111283"/>ATM текстовый режим 80x25<text:bookmark-end text:name="__RefNumPara__5751_1048627447"/><text:bookmark-end text:name="__RefHeading__20481_459111283"/></text:h>
      <text:p text:style-name="Text_20_body"><text:span text:style-name="T1">Вводим разбиение массива </text:span><text:span text:style-name="T13">символов</text:span><text:span text:style-name="T1"> на блоки 2х1, вводим координаты таких блоков X,Y (X=0..39, Y=0..24). В пределах блока коды левого и правого символов lsym и rsym, а также соответствующие им байты атрибутов lattr и rattr считываются по адресам:</text:span></text:p>
      <text:list xml:id="list2211681601" text:style-name="L13">
        <text:list-item>
          <text:p text:style-name="P72">lsym — страница 5(7), смещение #01C0 + Y*64 + X</text:p>
        </text:list-item>
        <text:list-item>
          <text:p text:style-name="P72">lattr — страница 1(3), смещение #21C0 + Y*64 + X</text:p>
        </text:list-item>
        <text:list-item>
          <text:p text:style-name="P72">rsym — страница 5(7), смещение #21C0 + Y*64 + X</text:p>
        </text:list-item>
        <text:list-item>
          <text:p text:style-name="P72">rattr — страница 1(3), смещение #01C1 + Y*64 + X</text:p>
        </text:list-item>
      </text:list>
      <text:p text:style-name="P6">На каждый символ байт атрибутов применяется аналогично режиму 640x200 hardware <text:span text:style-name="T2">multicolor.</text:span></text:p>
      <text:p text:style-name="P6">Стандартная прошивка ПЗУ «EVO Reset Service» может производить загрузку шрифта в fontROM при каждом сбросе. Предусмотрены 2 кодировки: CP866 и ATM-кодировка (приведена на <text:sequence-ref text:reference-format="category-and-value" text:ref-name="refРис.0">Рис. 1</text:sequence-ref>). </text:p>
      <text:p text:style-name="P6"><draw:frame draw:style-name="fr2" draw:name="Frame2" text:anchor-type="paragraph" svg:x="-0.0701in" svg:y="0in" svg:width="5.0193in" style:rel-width="75%" svg:height="5.2965in" style:rel-height="scale-min" draw:z-index="2"><draw:text-box><text:p text:style-name="Рис."><draw:frame draw:style-name="fr3" draw:name="graphics1" text:anchor-type="paragraph" svg:x="0.0016in" svg:y="0.0008in" svg:width="5.0193in" style:rel-width="100%" svg:height="5.0209in" style:rel-height="scale" draw:z-index="3"><draw:image xlink:href="Pictures/10000001000001F000000228B3D2C896.png" xlink:type="simple" xlink:show="embed" xlink:actuate="onLoad" draw:mime-type="image/png"/></draw:frame>Рис. <text:sequence text:ref-name="refРис.0" text:name="Рис." text:formula="ooow:Рис.+1" style:num-format="1">1</text:sequence>: ATM-кодировка шрифта</text:p></draw:text-box></draw:frame><text:soft-page-break/></text:p>
      <text:h text:style-name="P69" text:outline-level="3"><text:bookmark-start text:name="__RefHeading__20483_459111283"/>ATM-подобный текстовый режим 80x25 в одной странице<text:bookmark-end text:name="__RefHeading__20483_459111283"/></text:h>
      <text:p text:style-name="Text_20_body"><text:span text:style-name="T1">Функционирует аналогично режиму </text:span><text:span text:style-name="T1"><text:bookmark-ref text:reference-format="chapter" text:ref-name="__RefNumPara__5751_1048627447">7.4.6</text:bookmark-ref></text:span><text:span text:style-name="T1">, имея следующую адресацию:</text:span></text:p>
      <text:list text:continue-numbering="true" text:style-name="L13">
        <text:list-item>
          <text:p text:style-name="P72">lsym — страница 8(10), смещение #01C0 + Y*64 + X</text:p>
        </text:list-item>
        <text:list-item>
          <text:p text:style-name="P72">lattr — страница 8(10), смещение #31C0 + Y*64 + X</text:p>
        </text:list-item>
        <text:list-item>
          <text:p text:style-name="P72">rsym — страница 8(10), смещение #11C0 + Y*64 + X</text:p>
        </text:list-item>
        <text:list-item>
          <text:p text:style-name="P72">rattr — страница 8(10), смещение #21C1 + Y*64 + X</text:p>
        </text:list-item>
      </text:list>
      <text:p text:style-name="P6">Пример расчётов адресов символа и атрибута, при условии что видеостраница 8(10) в адресах 0<text:span text:style-name="T2">x4000-0x7FFF:</text:span></text:p>
      <text:p text:style-name="P5"/>
      <table:table table:name="Таблица12" table:style-name="Таблица12">
        <table:table-column table:style-name="Таблица12.A"/>
        <table:table-column table:style-name="Таблица12.B"/>
        <table:table-row>
          <table:table-cell table:style-name="Таблица12.A1" office:value-type="string">
            <text:p text:style-name="P73">xy2<text:span text:style-name="T2">txt <text:s/></text:span>;input h=x l=y</text:p>
            <text:p text:style-name="P74"><text:s text:c="8"/>;output hl=address</text:p>
            <text:p text:style-name="P73"><text:s text:c="8"/>LD <text:s text:c="2"/>A,#1C</text:p>
            <text:p text:style-name="P73"><text:s text:c="8"/>SRL <text:s/>H</text:p>
            <text:p text:style-name="P73"><text:s text:c="8"/>RRA</text:p>
            <text:p text:style-name="P73"><text:soft-page-break/><text:s text:c="8"/>RRA</text:p>
            <text:p text:style-name="P73"><text:s text:c="8"/>ADD <text:s/>A,L</text:p>
            <text:p text:style-name="P73"><text:s text:c="8"/>LD <text:s text:c="2"/>L,H</text:p>
            <text:p text:style-name="P73"><text:s text:c="8"/>LD <text:s text:c="2"/>H,A</text:p>
            <text:p text:style-name="P73"><text:s text:c="8"/>XOR <text:s/>A</text:p>
            <text:p text:style-name="P73"><text:s text:c="8"/>SRL <text:s/>H</text:p>
            <text:p text:style-name="P73"><text:s text:c="8"/>RRA</text:p>
            <text:p text:style-name="P73"><text:s text:c="8"/>SRL <text:s/>H</text:p>
            <text:p text:style-name="P73"><text:s text:c="8"/>RRA</text:p>
            <text:p text:style-name="P73"><text:s text:c="8"/>ADD <text:s/>A,L</text:p>
            <text:p text:style-name="P73"><text:s text:c="8"/>LD <text:s text:c="2"/>L,A</text:p>
            <text:p text:style-name="P73"><text:s text:c="8"/>SET <text:s/>6,H</text:p>
            <text:p text:style-name="P73"><text:s text:c="8"/>RET</text:p>
          </table:table-cell>
          <table:table-cell table:style-name="Таблица12.B1" office:value-type="string">
            <text:p text:style-name="P73"><text:span text:style-name="T2">x</text:span>y2attr ;input h=x l=y</text:p>
            <text:p text:style-name="P74"><text:s text:c="8"/>;output hl=address</text:p>
            <text:p text:style-name="P73"><text:s text:c="8"/>LD <text:s text:c="2"/>A,#C7</text:p>
            <text:p text:style-name="P73"><text:s text:c="8"/>SRL <text:s/>H</text:p>
            <text:p text:style-name="P73"><text:s text:c="8"/>JR <text:s text:c="2"/>NC,.L1</text:p>
            <text:p text:style-name="P73"><text:soft-page-break/><text:s text:c="8"/>LD <text:s text:c="2"/>A,#87</text:p>
            <text:p text:style-name="P73"><text:s text:c="8"/>INC <text:s/>H</text:p>
            <text:p text:style-name="P73">.L1 <text:s text:c="4"/>ADD <text:s/>A,L</text:p>
            <text:p text:style-name="P73"><text:s text:c="8"/>LD <text:s text:c="2"/>L,H</text:p>
            <text:p text:style-name="P73"><text:s text:c="8"/>LD <text:s text:c="2"/>H,A</text:p>
            <text:p text:style-name="P73"><text:s text:c="8"/>XOR <text:s/>A</text:p>
            <text:p text:style-name="P73"><text:s text:c="8"/>SRL <text:s/>H</text:p>
            <text:p text:style-name="P73"><text:s text:c="8"/>RRA</text:p>
            <text:p text:style-name="P73"><text:s text:c="8"/>SRL <text:s/>H</text:p>
            <text:p text:style-name="P73"><text:s text:c="8"/>RRA</text:p>
            <text:p text:style-name="P73"><text:s text:c="8"/>ADD <text:s/>A,L</text:p>
            <text:p text:style-name="P73"><text:s text:c="8"/>LD <text:s text:c="2"/>L,A</text:p>
            <text:p text:style-name="P73"><text:s text:c="8"/>SET <text:s/>6,H</text:p>
            <text:p text:style-name="P73"><text:s text:c="8"/>RET</text:p>
          </table:table-cell>
        </table:table-row>
      </table:table>
      <text:p text:style-name="P6"/>
      <text:h text:style-name="P75" text:outline-level="3"><text:bookmark-start text:name="__RefNumPara__5872_1048627447"/><text:bookmark-start text:name="__RefHeading__20485_459111283"/>Загрузка шрифта для текстового режима<text:bookmark-end text:name="__RefNumPara__5872_1048627447"/><text:bookmark-end text:name="__RefHeading__20485_459111283"/></text:h>
      <text:p text:style-name="Text_20_body"><text:span text:style-name="T2">Разрешение загрузки шрифта включается битом 2 порта #BF (см. стр. </text:span><text:span text:style-name="T2"><text:bookmark-ref text:reference-format="page" text:ref-name="__RefNumPara__6276_1334049885">48</text:bookmark-ref></text:span><text:span text:style-name="T2">). ОЗУ шрифта имеет объём 2 килобайта, каждый символ хранится по адресам n*8..n*8+7, где n – номер символа (0..255). Образ символа 8х8 пикселей хранится построчно сверху вниз, биты в байтах представляют пиксели символа слева направо.</text:span></text:p>
      <text:p text:style-name="Text_20_body"><text:span text:style-name="T2">После включения разрешения загрузки шрифта </text:span><text:span text:style-name="T15">любая</text:span><text:span text:style-name="T2"> запись процессором в адресное пространство </text:span><text:span text:style-name="T15">памяти</text:span><text:span text:style-name="T2"> по адресу A (A=0..65535) приводит к записи </text:span><text:span text:style-name="T15">также</text:span><text:span text:style-name="T2"> и в ОЗУ шрифта по адресу A &amp; 2047.</text:span></text:p>
      <text:p text:style-name="Text_20_body"><text:span text:style-name="T15">Внимание!</text:span><text:span text:style-name="T2"> В процессе загрузки ОЗУ шрифта рекомендуется выключать прерывания или производить загрузку в определённые моменты относительно сигнала int, так как вход в процедуру обработки прерывания при включенном разрешении загрузки шрифта приведёт к загрузке в ОЗУ шрифта случайных значений по случайным адресам.</text:span></text:p>
      <text:h text:style-name="P75" text:outline-level="3"><text:bookmark-start text:name="__RefHeading__20487_459111283"/>Считывание шрифта текстового режима<text:bookmark-end text:name="__RefHeading__20487_459111283"/></text:h>
      <text:p text:style-name="Text_20_body"><text:span text:style-name="T2">Считывание производится путём чтения порта </text:span><text:span text:style-name="T5">#0EB</text:span><text:span text:style-name="T41">D</text:span><text:span text:style-name="T2"> (см. стр. </text:span><text:span text:style-name="T2"><text:bookmark-ref text:reference-format="page" text:ref-name="__RefNumPara__6273_1391968459">27</text:bookmark-ref></text:span><text:span text:style-name="T2">), в котором при включённом ткестовом режиме читается текущий отображаемый на экране байт картинки символа. Из этого следует, что для корректного считывания шрифта необходимо применять специальную процедуру с точными задержками относительно начала сигнала прерывания при специально сформированном содержимом текстового экрана. Пример такой процедуры дан в файле </text:span><text:span text:style-name="T15">fontread.src</text:span></text:p>
      <text:p text:style-name="P76"/>
      <text:h text:style-name="P77" text:outline-level="2"><text:bookmark-start text:name="__RefNumPara__7901_422571322"/><text:bookmark-start text:name="__RefHeading__7144_1922218393"/>ULAPLUS<text:bookmark-end text:name="__RefNumPara__7901_422571322"/><text:bookmark-end text:name="__RefHeading__7144_1922218393"/></text:h>
      <text:p text:style-name="P78">Модификация ULAPLUS расширяет палитру стандартного ZX-режима и режима ZX hardware multicolor.</text:p>
      <text:p text:style-name="P79"><text:span text:style-name="T42">При включении данного режима используется дополнительная ULAPLUS-палитра, не связанная с основной. Интепретация байта атрибутов </text:span><text:span text:style-name="T43">attr</text:span><text:span text:style-name="T42">:</text:span></text:p>
      <text:list text:style-name="L14">
        <text:list-item>
          <text:p text:style-name="P80"><text:span text:style-name="T42">биты 7:6 – выбор одной из 4 подпалитр </text:span><text:span text:style-name="T44">палитры ULAPLUS</text:span></text:p>
        </text:list-item>
        <text:list-item>
          <text:p text:style-name="P81"><text:soft-page-break/>биты 5:3 – выбор номера цвета PAPER</text:p>
        </text:list-item>
        <text:list-item>
          <text:p text:style-name="P81">биты 2:0 – выбор номер цвета INK</text:p>
        </text:list-item>
      </text:list>
      <text:p text:style-name="P82"><text:span text:style-name="T42">Палитра ULAPLUS имеет 64 </text:span><text:span text:style-name="T45">позиции</text:span><text:span text:style-name="T42"> и задаёт цвет следующим образом:</text:span></text:p>
      <text:list text:continue-numbering="true" text:style-name="L14">
        <text:list-item>
          <text:p text:style-name="P83"><text:span text:style-name="T42">цвет PAPER – </text:span><text:span text:style-name="T45">из </text:span><text:span text:style-name="T42">элемент</text:span><text:span text:style-name="T45">а</text:span><text:span text:style-name="T42"> палитры </text:span><text:span text:style-name="T45">с номером </text:span><text:span text:style-name="T42">attr[7:6]*16 + attr[5:3] + 8</text:span></text:p>
        </text:list-item>
        <text:list-item>
          <text:p text:style-name="P83"><text:span text:style-name="T42">цвет INK – </text:span><text:span text:style-name="T45">из </text:span><text:span text:style-name="T42">элемент</text:span><text:span text:style-name="T45">а</text:span><text:span text:style-name="T42"> палитры </text:span><text:span text:style-name="T45">с номером</text:span><text:span text:style-name="T42"> attr[7:6]*16 + attr[2:0]</text:span></text:p>
        </text:list-item>
      </text:list>
      <text:p text:style-name="P84"><text:span text:style-name="T46">Каждая позиция </text:span><text:span text:style-name="T44">палитры </text:span><text:span text:style-name="T46">– байт, </text:span><text:span text:style-name="T44">который </text:span><text:span text:style-name="T46">задаёт цвет следующим образом:</text:span></text:p>
      <text:list text:style-name="L15">
        <text:list-item>
          <text:p text:style-name="P85"><text:span text:style-name="T47">Зелё</text:span><text:span text:style-name="T46">ный – биты [7:5]</text:span></text:p>
        </text:list-item>
        <text:list-item>
          <text:p text:style-name="P85"><text:span text:style-name="T47">Крас</text:span><text:span text:style-name="T46">ный – биты [4:2]</text:span></text:p>
        </text:list-item>
        <text:list-item>
          <text:p text:style-name="P86">Синий – биты [1:0]</text:p>
        </text:list-item>
      </text:list>
      <text:p text:style-name="P87"><text:span text:style-name="T48">Для установки ULAPLUS-палитры и для включения-выключения режима ULAPLUS используются порты </text:span><text:span text:style-name="T49">#FF3B</text:span><text:span text:style-name="T48"> и </text:span><text:span text:style-name="T49">#BF3B</text:span><text:span text:style-name="T50">.</text:span></text:p>
      <text:p text:style-name="P88">Включение ULAPLUS:</text:p>
      <text:p text:style-name="P89">ULAP_ON<text:tab/>LD<text:tab/>BC,#BF3B</text:p>
      <text:p text:style-name="P89"><text:tab/><text:tab/>LD<text:tab/>A,#40</text:p>
      <text:p text:style-name="P89"><text:tab/><text:tab/>OUT<text:tab/>(C),A</text:p>
      <text:p text:style-name="P89"><text:tab/><text:tab/>LD<text:tab/>B,#FF</text:p>
      <text:p text:style-name="P89"><text:tab/><text:tab/>LD<text:tab/>A,#01</text:p>
      <text:p text:style-name="P89"><text:tab/><text:tab/>OUT<text:tab/>(C),A</text:p>
      <text:p text:style-name="P89"><text:tab/><text:tab/>RET</text:p>
      <text:p text:style-name="P90">Выключение ULAPLUS:</text:p>
      <text:p text:style-name="P89">ULAP_ON<text:tab/>LD<text:tab/>BC,#BF3B</text:p>
      <text:p text:style-name="P89"><text:tab/><text:tab/>LD<text:tab/>A,#40</text:p>
      <text:p text:style-name="P89"><text:tab/><text:tab/>OUT<text:tab/>(C),A</text:p>
      <text:p text:style-name="P89"><text:tab/><text:tab/>LD<text:tab/>B,#FF</text:p>
      <text:p text:style-name="P89"><text:tab/><text:tab/>LD<text:tab/>A,#00</text:p>
      <text:p text:style-name="P89"><text:tab/><text:tab/>OUT<text:tab/>(C),A</text:p>
      <text:p text:style-name="P89"><text:tab/><text:tab/>RET</text:p>
      <text:p text:style-name="P90">Установка элемента палитры ULAPLUS:</text:p>
      <text:p text:style-name="P89">ULAP_SET<text:tab/>LD<text:tab/>BC,#BF3B</text:p>
      <text:p text:style-name="P89"><text:tab/><text:tab/>LD<text:tab/>A,&lt;palette element number&gt; ;0..63</text:p>
      <text:p text:style-name="P89"><text:tab/><text:tab/>OUT<text:tab/>(C),A</text:p>
      <text:p text:style-name="P89"><text:tab/><text:tab/>LD<text:tab/>B,#FF</text:p>
      <text:p text:style-name="P89"><text:tab/><text:tab/>LD<text:tab/>A,&lt;palette entry G3R3B2&gt; ;0..255</text:p>
      <text:p text:style-name="P89"><text:tab/><text:tab/>OUT<text:tab/>(C),A</text:p>
      <text:p text:style-name="P89"><text:tab/><text:tab/>RET</text:p>
      <text:h text:style-name="P91" text:outline-level="1"><text:bookmark-start text:name="__RefHeading___Toc8793_178822302"/><text:soft-page-break/>Архитектура: маскируемые прерывания<text:bookmark-end text:name="__RefHeading___Toc8793_178822302"/></text:h>
      <text:h text:style-name="P92" text:outline-level="2"><text:bookmark-start text:name="__RefHeading___Toc8795_178822302"/>Традиционный подход к прерываниям<text:bookmark-end text:name="__RefHeading___Toc8795_178822302"/></text:h>
      <text:p text:style-name="P93">В традиционных спектрумах существует единственное маскируемое прерывание: VBLANK. Оно имеет следующие неприятные особенности:</text:p>
      <text:list text:style-name="L16">
        <text:list-item>
          <text:p text:style-name="P94">появление сигнала невозможно замаскировать</text:p>
        </text:list-item>
        <text:list-item>
          <text:p text:style-name="P94">сигнал активен определённое время, после чего просто исчезает, независимо от того, вошёл ли процессор в обработчик или нет</text:p>
        </text:list-item>
        <text:list-item>
          <text:p text:style-name="P94">не предусмотрена выдача вектора, который благодаря подтяжкам на ШД всегда #FF</text:p>
        </text:list-item>
      </text:list>
      <text:p text:style-name="P95">Наиболее неприятным свойством является второе: из-за него невозможно иметь несколько источников прерываний без риска потерять прерывание от VBLANK: в самом деле, при запуске обработчика ещё возможно сделать поллинг других устройств <text:span text:style-name="T51">и в случае отсутствия прерываний на них констатировать, что произошло VBLANK</text:span>, <text:span text:style-name="T51">однако уже невозможно</text:span> определить факт того, что прерывания от <text:span text:style-name="T51">других </text:span>устройств <text:span text:style-name="T3">совпали</text:span> с VBLANK. Кроме того, находясь в обработчике такого прерывания от внешних устройств, можно пропустить вновь появившийся VBLANK.</text:p>
      <text:p text:style-name="P95">Без потери совместимости возможно лишь убирать сигнал прерывания VBLANK в случае входа в обработчик (по <text:span text:style-name="T52">IORQ</text:span>+<text:span text:style-name="T52">M1</text:span>), в этом случае исчезает опасность двойного входа в прерывание для крайне коротких обработчиков (типа EI:RET). Данное улучшение всегда активно в конфигурации. <text:span text:style-name="T51">Д</text:span>ругие свойства <text:span text:style-name="T51">прерывания VBLANK </text:span>нельзя менять, оставаясь в рамках совместимости с традиционными спектрумами. </text:p>
      <text:p text:style-name="P96"><text:span text:style-name="T53">Ввиду отсутствия подтяжек на ШД в ZX Evolution, приходится всегда выдавать вектор #FF по </text:span><text:span text:style-name="T54">IORQ</text:span><text:span text:style-name="T55">+</text:span><text:span text:style-name="T54">M1</text:span>. <text:span text:style-name="T56">Э</text:span>то приводи<text:span text:style-name="T56">т</text:span> к невозможности внешнему устройству <text:span text:style-name="T56">(устройству на ZXBUS)</text:span> выдать свой вектор прерывания.</text:p>
      <text:h text:style-name="P97" text:outline-level="2"><text:bookmark-start text:name="__RefHeading___Toc8797_178822302"/>Как улучшить прерывания<text:bookmark-end text:name="__RefHeading___Toc8797_178822302"/></text:h>
      <text:p text:style-name="P98">Ввиду потери совместимости при любой попытке привести систему прерываний к нормальной, предусмотрено 2 режима работы: «<text:span text:style-name="T57">улучшенный</text:span>» несовместимый и «традиционный».</text:p>
      <text:p text:style-name="P99">В «традиционном» режиме девайсы на ZXBUS не могут выдавать вектора прерываний, т. к. это приводит к конфликту на шине с выдаваемым #FF. Вдобавок в таком режиме при наличии прерываний от девайсов на ZXBUS будут пропускаться прерывания от VBLANK.</text:p>
      <text:p text:style-name="P98"><text:span text:style-name="T56">Вводится</text:span> «<text:span text:style-name="T57">улучшен</text:span>н<text:span text:style-name="T56">ый</text:span>» режим, работа <text:span text:style-name="T56">в котором </text:span>происходит только в случаях, когда это реально необходимо, например в операционных системах типа NedoOS или в программах, полностью использующих аппаратные возможности ZX Evolution. </text:p>
      <text:p text:style-name="P100">Основные идеи, лежащие в основе «<text:span text:style-name="T57">улучшен</text:span>ного» режима следующие:</text:p>
      <text:list text:style-name="L17">
        <text:list-item>
          <text:p text:style-name="P101">Наличие бита разрешения для каждого источника <text:span text:style-name="T56">внутренних </text:span>прерываний</text:p>
        </text:list-item>
        <text:list-item>
          <text:p text:style-name="P101">Наличие бита <text:span text:style-name="T51">статуса</text:span> <text:span text:style-name="T56">для каждого такого источника. Бит статуса выставляется в 1 событием, вызывающим прерывание. Если статус и бит разрешения оба в 1, прерывание выдаётся на Z80.</text:span></text:p>
        </text:list-item>
        <text:list-item>
          <text:p text:style-name="P102"><text:span text:style-name="T58">Генерация уникального вектора для каждого из прерываний, в случае если оно </text:span><text:soft-page-break/><text:span text:style-name="T58">активно </text:span><text:span text:style-name="T51">(бит статуса=1)</text:span><text:span text:style-name="T58">, разрешено и процессор сигнализирует о входе в обработчик и чтении вектора сигналами </text:span><text:span text:style-name="T54">M1</text:span>+<text:span text:style-name="T59">I</text:span><text:span text:style-name="T60">ORQ</text:span>. При этом поддерживается фиксированная упорядоченность (приоритеты) между всеми внутренними источниками прерываний.</text:p>
        </text:list-item>
        <text:list-item>
          <text:p text:style-name="P103">После выдачи вектора происходит аппаратная очистка бита статуса, соответствующего выданному вектору.</text:p>
        </text:list-item>
        <text:list-item>
          <text:p text:style-name="P102"><text:bookmark-start text:name="clever ext devs"/>«Умные» внешние устройства<text:bookmark-end text:name="clever ext devs"/> смогут выдать свой вектор, если до них дойдёт сигнал <text:span text:style-name="T52">IORQ</text:span><text:span text:style-name="T61">n</text:span>, вырабатываемый для каждого слота. Такие устройства в случае, если они хотят выдать вектор, должны блокировать дальнейшее распространение <text:span text:style-name="T52">IORQ</text:span><text:span text:style-name="T61">n</text:span> <text:span text:style-name="T62">по слотам </text:span>путём выдачи сигнала <text:span text:style-name="T4">IORQGEn</text:span><text:span text:style-name="T63">=1 </text:span>при активном <text:span text:style-name="T52">M1</text:span>. <text:span text:style-name="T64">Дополнительное требование — не выдавать</text:span> <text:span text:style-name="T4">IORQGEn</text:span>, <text:span text:style-name="T64">блокирующий IO-порты </text:span>при <text:span text:style-name="T65">M1</text:span>=0.</text:p>
        </text:list-item>
        <text:list-item>
          <text:p text:style-name="P102"><text:bookmark-start text:name="simple ext devs"/><text:span text:style-name="T56">Для «простых» внешних устройств</text:span><text:bookmark-end text:name="simple ext devs"/><text:span text:style-name="T56"> на ZXBUS, которые могут выдавать прерывания, но не могут выдавать вектор, будет сгенерирован дефолтный вектор. Такие устройства </text:span><text:span text:style-name="T66">обязаны игнорировать</text:span><text:span text:style-name="T56"> циклы подтверждения прерываний </text:span><text:span text:style-name="T67">M1</text:span><text:span text:style-name="T56">+</text:span><text:span text:style-name="T67">IORQ</text:span><text:span text:style-name="T56"> и </text:span><text:span text:style-name="T68">обязаны </text:span><text:span text:style-name="T69">не </text:span><text:span text:style-name="T68">выдавать</text:span><text:span text:style-name="T56"> </text:span><text:span text:style-name="T4">IORQGEn</text:span><text:span text:style-name="T56">, </text:span><text:span text:style-name="T64">блокирующий IO-порты </text:span><text:span text:style-name="T56">при </text:span><text:span text:style-name="T65">M1</text:span><text:span text:style-name="T56">=0.</text:span></text:p>
        </text:list-item>
        <text:list-item>
          <text:p text:style-name="P102"><text:span text:style-name="T70">Определение того, что прерывание выдаёт «простое» внешнее устройство происходит путём анализа сигналов </text:span><text:span text:style-name="T4">IORQGEn</text:span><text:span text:style-name="T70"> со всех слотов. Если </text:span><text:span text:style-name="T63">все </text:span><text:span text:style-name="T70">они неактивны (=0), то происходит выдача дефолтного вектора.</text:span></text:p>
        </text:list-item>
        <text:list-item>
          <text:p text:style-name="P102"><text:bookmark-start text:name="old ext devs"/>«<text:span text:style-name="T64">Старые» внешние устройства</text:span><text:bookmark-end text:name="old ext devs"/><text:span text:style-name="T64">, которые выдают прерывание, но не выполняют требование «не выдавать</text:span><text:span text:style-name="T56"> </text:span><text:span text:style-name="T4">IORQGEn</text:span><text:span text:style-name="T56">, </text:span><text:span text:style-name="T64">блокирующий IO-порты </text:span><text:span text:style-name="T56">при </text:span><text:span text:style-name="T65">M1</text:span><text:span text:style-name="T56">=0» </text:span><text:span text:style-name="T64">блокируют использование векторов прерываний для все</text:span><text:span text:style-name="T71">х</text:span><text:span text:style-name="T64"> </text:span><text:span text:style-name="T71">внешних устройств</text:span><text:span text:style-name="T64">. Это связано с тем, что</text:span><text:span text:style-name="T56"> </text:span><text:span text:style-name="T4">IORQGEn</text:span><text:span text:style-name="T56"> </text:span><text:span text:style-name="T71">от таких устройств </text:span><text:span text:style-name="T64">в момент чтения вектора может быть любым (как </text:span><text:span text:style-name="T72">0</text:span><text:span text:style-name="T64"> так и 1) </text:span><text:span text:style-name="T71">и</text:span><text:span text:style-name="T64"> решение о том, что устройство требует выдачи вектора со стороны FPGA — будет случайным, а следовательно — и сам вектор </text:span><text:span text:style-name="T73">(см. </text:span><text:span text:style-name="T57">предыдущий пункт). При наличии таких устройств единственный вариант работать правильно — выдавать единый дефолтный вектор для всех внешних девайсов, блокируя всем </text:span><text:span text:style-name="T71">внешним устройствам</text:span><text:span text:style-name="T57"> </text:span><text:span text:style-name="T4">IORQGEn</text:span><text:span text:style-name="T64"> </text:span><text:span text:style-name="T57">при </text:span><text:span text:style-name="T65">M1</text:span><text:span text:style-name="T57">=0.</text:span></text:p>
        </text:list-item>
      </text:list>
      <text:p text:style-name="P104"/>
      <text:p text:style-name="P104">Общекомпьютерные преимущества «<text:span text:style-name="T74">улучшен</text:span>ных» прерываний по сравнению с «традиционными»:</text:p>
      <text:list text:style-name="L18">
        <text:list-item>
          <text:p text:style-name="P105">Гарантированное отсутствие потери прерываний, в т.ч. VBLANK</text:p>
        </text:list-item>
        <text:list-item>
          <text:p text:style-name="P105">Автоматический выбор обработчика <text:span text:style-name="T70">и очистка статуса</text:span> при использовании векторов</text:p>
        </text:list-item>
        <text:list-item>
          <text:p text:style-name="P106">Возможность гибко программно определять приоритеты прерываний <text:span text:style-name="T70">в случае </text:span><text:span text:style-name="T63">программного опроса источников прерываний в обработчике, для этого</text:span><text:span text:style-name="T70"> векторизация и очистки статусов отключаются</text:span></text:p>
        </text:list-item>
        <text:list-item>
          <text:p text:style-name="P105">Возможность работать в режиме поллинга (когда прерывание запрещено, но бит <text:span text:style-name="T70">статуса</text:span> опрашивается и очищается программно)<text:bookmark text:name="__RefHeading___Toc8797_178822302 Copy 1"/></text:p>
        </text:list-item>
      </text:list>
      <text:h text:style-name="P107" text:outline-level="2"><text:bookmark-start text:name="__RefHeading___Toc8397_1603396926"/>«Традиционные» прерывания<text:bookmark-end text:name="__RefHeading___Toc8397_1603396926"/></text:h>
      <text:p text:style-name="P108"><text:span text:style-name="T75">«Традиционный» режим устанавливается по ресету</text:span> <text:span text:style-name="T75">или программно (</text:span>бит 7 порта <text:span text:style-name="T4">#14BD</text:span><text:span text:style-name="T16"> </text:span><text:span text:style-name="T76">в нуле). В этом режиме:</text:span></text:p>
      <text:list text:style-name="L19">
        <text:list-item>
          <text:p text:style-name="P109">Присутствует единственный источник внутреннего прерывания: VBLANK</text:p>
        </text:list-item>
        <text:list-item>
          <text:p text:style-name="P110"><text:span text:style-name="T16">При срабатывании сигнал прерывания, исходящий из FPGA, активен конечное время, </text:span><text:soft-page-break/><text:span text:style-name="T16">прекращаясь после таймаута или после цикла подтверждения прерывания </text:span><text:span text:style-name="T67">M1</text:span><text:span text:style-name="T77">+</text:span><text:span text:style-name="T67">IORQ</text:span><text:span text:style-name="T16">, в зависимости от того, что произойдёт раньше</text:span></text:p>
        </text:list-item>
        <text:list-item>
          <text:p text:style-name="P111"><text:span text:style-name="T76">При </text:span><text:span text:style-name="T52">M1</text:span><text:span text:style-name="T76">=0, </text:span><text:span text:style-name="T78">IORQ</text:span><text:span text:style-name="T76"> на внешние устройства всегда 1</text:span></text:p>
        </text:list-item>
        <text:list-item>
          <text:p text:style-name="P109">В цикле подтверждения прерываний FPGA выдаёт вектор 0xFF</text:p>
        </text:list-item>
      </text:list>
      <text:p text:style-name="P112"><text:span text:style-name="T16">Другие биты порта </text:span><text:span text:style-name="T4">#14BD</text:span><text:span text:style-name="T16"> игнорируются, содержимое портов </text:span><text:span text:style-name="T4">#15BD</text:span><text:span text:style-name="T16"> и </text:span><text:span text:style-name="T4">#16BD</text:span><text:span text:style-name="T16"> ни на что не влияет.</text:span></text:p>
      <text:h text:style-name="P113" text:outline-level="2"><text:bookmark-start text:name="__RefHeading___Toc8399_1603396926"/>«<text:span text:style-name="T75">Улучшенные</text:span>» <text:span text:style-name="T75">прерывания</text:span><text:bookmark-end text:name="__RefHeading___Toc8399_1603396926"/></text:h>
      <text:p text:style-name="P96">«<text:span text:style-name="T75">Улучшенный» режим устанавливается программно установкой </text:span><text:span text:style-name="T79">бит</text:span><text:span text:style-name="T75">а</text:span><text:span text:style-name="T79"> </text:span><text:span text:style-name="T75">7</text:span><text:span text:style-name="T79"> порта </text:span><text:span text:style-name="T80">#14BD</text:span><text:span text:style-name="T81"> </text:span><text:span text:style-name="T76">в 1.</text:span></text:p>
      <text:h text:style-name="P114" text:outline-level="3"><text:bookmark-start text:name="__RefHeading___Toc8399_1603396926 Copy 1"/>Внутренние прерывания<text:bookmark-end text:name="__RefHeading___Toc8399_1603396926 Copy 1"/></text:h>
      <text:p text:style-name="P115"><text:span text:style-name="T82">Внутренние прерывания устанавливают соответствующий бит в порту статуса </text:span><text:span text:style-name="T83">#16BD</text:span><text:span text:style-name="T82"> и в случае, если они разрешены, передаются на вход </text:span><text:span text:style-name="T84">INT</text:span><text:span text:style-name="T82"> процессора. </text:span><text:span text:style-name="T85">При наличии незамаскированных внутренних прерываний блокируется прохождение</text:span><text:span text:style-name="T76"> </text:span><text:span text:style-name="T78">IORQ</text:span><text:span text:style-name="T76"> </text:span><text:span text:style-name="T86">пр</text:span><text:span text:style-name="T76">и </text:span><text:span text:style-name="T87">M1</text:span><text:span text:style-name="T76">=0 </text:span><text:span text:style-name="T86">на ZXBUS.</text:span></text:p>
      <text:p text:style-name="P115"><text:span text:style-name="T86">Если разрешены внутренние вектора </text:span><text:span text:style-name="T88">(</text:span><text:span text:style-name="T89">enable </text:span><text:span text:style-name="T90">internal </text:span><text:span text:style-name="T89">vectoring</text:span><text:span text:style-name="T91">)</text:span><text:span text:style-name="T86">, они выдаются в цикле подтверждения прерывания. Оценка наличия внутренних прерываний и приоретизация для выбора вектора происходит каждый цикл M1 процессора.</text:span></text:p>
      <text:p text:style-name="P115"><text:span text:style-name="T88">Если разрешён режим автоочистки битов статуса (</text:span><text:span text:style-name="T89">enable internal interrupts autoclear</text:span><text:span text:style-name="T91">), то соответствующие биты статуса очищаются при входе в векторное прерывание (т. е. только если одновременно разрешён режим </text:span><text:span text:style-name="T89">enable </text:span><text:span text:style-name="T90">internal </text:span><text:span text:style-name="T89">vectoring</text:span><text:span text:style-name="T91">). </text:span><text:span text:style-name="T92">Не рекомендуется использовать режим автоочистки с IM 1, т. к. в этом случае будет теряться информация об источниках прерываний.</text:span></text:p>
      <text:h text:style-name="P116" text:outline-level="4"><text:bookmark-start text:name="__RefHeading___Toc8399_1603396926 Copy 1 Copy 1"/><text:span text:style-name="T85">Приоритеты,</text:span><text:span text:style-name="T93"> вектора </text:span><text:span text:style-name="T94">и биты</text:span><text:span text:style-name="T93"> </text:span><text:span text:style-name="T85">в</text:span>нутренни<text:span text:style-name="T85">х</text:span> прерывани<text:span text:style-name="T85">й</text:span><text:bookmark-end text:name="__RefHeading___Toc8399_1603396926 Copy 1 Copy 1"/></text:h>
      <table:table table:name="приоритеты_внутр_прерываний" table:style-name="приоритеты_5f_внутр_5f_прерываний">
        <table:table-column table:style-name="приоритеты_5f_внутр_5f_прерываний.A"/>
        <table:table-column table:style-name="приоритеты_5f_внутр_5f_прерываний.B" table:number-columns-repeated="4"/>
        <table:table-header-rows>
          <table:table-row>
            <table:table-cell table:style-name="приоритеты_5f_внутр_5f_прерываний.A1" office:value-type="string">
              <text:p text:style-name="P117">Прерывание</text:p>
            </table:table-cell>
            <table:table-cell table:style-name="приоритеты_5f_внутр_5f_прерываний.A1" office:value-type="string">
              <text:p text:style-name="P118">Номер бита в портах interrupts enable и interrupts status</text:p>
            </table:table-cell>
            <table:table-cell table:style-name="приоритеты_5f_внутр_5f_прерываний.A1" office:value-type="string">
              <text:p text:style-name="P117">Приоритет (больше число — выше <text:span text:style-name="T94">приоритет</text:span>)</text:p>
            </table:table-cell>
            <table:table-cell table:style-name="приоритеты_5f_внутр_5f_прерываний.A1" office:value-type="string">
              <text:p text:style-name="P119">Вектор</text:p>
            </table:table-cell>
            <table:table-cell table:style-name="приоритеты_5f_внутр_5f_прерываний.A1" office:value-type="string">
              <text:p text:style-name="P120">Примечание</text:p>
            </table:table-cell>
          </table:table-row>
        </table:table-header-rows>
        <table:table-row>
          <table:table-cell table:style-name="приоритеты_5f_внутр_5f_прерываний.A1" office:value-type="string">
            <text:p text:style-name="P33">--</text:p>
          </table:table-cell>
          <table:table-cell table:style-name="приоритеты_5f_внутр_5f_прерываний.A1" office:value-type="string">
            <text:p text:style-name="P121">6</text:p>
          </table:table-cell>
          <table:table-cell table:style-name="приоритеты_5f_внутр_5f_прерываний.A1" office:value-type="string">
            <text:p text:style-name="P122">6</text:p>
          </table:table-cell>
          <table:table-cell table:style-name="приоритеты_5f_внутр_5f_прерываний.A1" office:value-type="string">
            <text:p text:style-name="P123">0xCF</text:p>
          </table:table-cell>
          <table:table-cell table:style-name="приоритеты_5f_внутр_5f_прерываний.A1" office:value-type="string">
            <text:p text:style-name="P124">RST 0x08</text:p>
          </table:table-cell>
        </table:table-row>
        <table:table-row>
          <table:table-cell table:style-name="приоритеты_5f_внутр_5f_прерываний.A1" office:value-type="string">
            <text:p text:style-name="P33">--</text:p>
          </table:table-cell>
          <table:table-cell table:style-name="приоритеты_5f_внутр_5f_прерываний.A1" office:value-type="string">
            <text:p text:style-name="P121">5</text:p>
          </table:table-cell>
          <table:table-cell table:style-name="приоритеты_5f_внутр_5f_прерываний.A1" office:value-type="string">
            <text:p text:style-name="P122">5</text:p>
          </table:table-cell>
          <table:table-cell table:style-name="приоритеты_5f_внутр_5f_прерываний.A1" office:value-type="string">
            <text:p text:style-name="P123">0xD7</text:p>
          </table:table-cell>
          <table:table-cell table:style-name="приоритеты_5f_внутр_5f_прерываний.A1" office:value-type="string">
            <text:p text:style-name="P124">RST 0x10</text:p>
          </table:table-cell>
        </table:table-row>
        <table:table-row>
          <table:table-cell table:style-name="приоритеты_5f_внутр_5f_прерываний.A1" office:value-type="string">
            <text:p text:style-name="P33">--</text:p>
          </table:table-cell>
          <table:table-cell table:style-name="приоритеты_5f_внутр_5f_прерываний.A1" office:value-type="string">
            <text:p text:style-name="P121">4</text:p>
          </table:table-cell>
          <table:table-cell table:style-name="приоритеты_5f_внутр_5f_прерываний.A1" office:value-type="string">
            <text:p text:style-name="P122">4</text:p>
          </table:table-cell>
          <table:table-cell table:style-name="приоритеты_5f_внутр_5f_прерываний.A1" office:value-type="string">
            <text:p text:style-name="P123">0xDF</text:p>
          </table:table-cell>
          <table:table-cell table:style-name="приоритеты_5f_внутр_5f_прерываний.A1" office:value-type="string">
            <text:p text:style-name="P124">RST 0x18</text:p>
          </table:table-cell>
        </table:table-row>
        <table:table-row>
          <table:table-cell table:style-name="приоритеты_5f_внутр_5f_прерываний.A1" office:value-type="string">
            <text:p text:style-name="P33">--</text:p>
          </table:table-cell>
          <table:table-cell table:style-name="приоритеты_5f_внутр_5f_прерываний.A1" office:value-type="string">
            <text:p text:style-name="P121">3</text:p>
          </table:table-cell>
          <table:table-cell table:style-name="приоритеты_5f_внутр_5f_прерываний.A1" office:value-type="string">
            <text:p text:style-name="P122">3</text:p>
          </table:table-cell>
          <table:table-cell table:style-name="приоритеты_5f_внутр_5f_прерываний.A1" office:value-type="string">
            <text:p text:style-name="P123">0xE7</text:p>
          </table:table-cell>
          <table:table-cell table:style-name="приоритеты_5f_внутр_5f_прерываний.A1" office:value-type="string">
            <text:p text:style-name="P124">RST 0x20</text:p>
          </table:table-cell>
        </table:table-row>
        <table:table-row>
          <table:table-cell table:style-name="приоритеты_5f_внутр_5f_прерываний.A1" office:value-type="string">
            <text:p text:style-name="P33">--</text:p>
          </table:table-cell>
          <table:table-cell table:style-name="приоритеты_5f_внутр_5f_прерываний.A1" office:value-type="string">
            <text:p text:style-name="P121">2</text:p>
          </table:table-cell>
          <table:table-cell table:style-name="приоритеты_5f_внутр_5f_прерываний.A1" office:value-type="string">
            <text:p text:style-name="P122">2</text:p>
          </table:table-cell>
          <table:table-cell table:style-name="приоритеты_5f_внутр_5f_прерываний.A1" office:value-type="string">
            <text:p text:style-name="P123">0xEF</text:p>
          </table:table-cell>
          <table:table-cell table:style-name="приоритеты_5f_внутр_5f_прерываний.A1" office:value-type="string">
            <text:p text:style-name="P124">RST 0x28</text:p>
          </table:table-cell>
        </table:table-row>
        <table:table-row>
          <table:table-cell table:style-name="приоритеты_5f_внутр_5f_прерываний.A1" office:value-type="string">
            <text:p text:style-name="P33">--</text:p>
          </table:table-cell>
          <table:table-cell table:style-name="приоритеты_5f_внутр_5f_прерываний.A1" office:value-type="string">
            <text:p text:style-name="P121">1</text:p>
          </table:table-cell>
          <table:table-cell table:style-name="приоритеты_5f_внутр_5f_прерываний.A1" office:value-type="string">
            <text:p text:style-name="P122">1</text:p>
          </table:table-cell>
          <table:table-cell table:style-name="приоритеты_5f_внутр_5f_прерываний.A1" office:value-type="string">
            <text:p text:style-name="P123">0xF7</text:p>
          </table:table-cell>
          <table:table-cell table:style-name="приоритеты_5f_внутр_5f_прерываний.A1" office:value-type="string">
            <text:p text:style-name="P124">RST 0x30</text:p>
          </table:table-cell>
        </table:table-row>
        <table:table-row table:style-name="приоритеты_5f_внутр_5f_прерываний.8">
          <table:table-cell table:style-name="приоритеты_5f_внутр_5f_прерываний.A1" office:value-type="string">
            <text:p text:style-name="P122">VBLANK</text:p>
          </table:table-cell>
          <table:table-cell table:style-name="приоритеты_5f_внутр_5f_прерываний.A1" office:value-type="string">
            <text:p text:style-name="P121">0</text:p>
          </table:table-cell>
          <table:table-cell table:style-name="приоритеты_5f_внутр_5f_прерываний.A1" office:value-type="string">
            <text:p text:style-name="P122">0</text:p>
          </table:table-cell>
          <table:table-cell table:style-name="приоритеты_5f_внутр_5f_прерываний.A1" office:value-type="string">
            <text:p text:style-name="P125">0xFF</text:p>
          </table:table-cell>
          <table:table-cell table:style-name="приоритеты_5f_внутр_5f_прерываний.A1" office:value-type="string">
            <text:p text:style-name="P124">RST 0x38</text:p>
          </table:table-cell>
        </table:table-row>
      </table:table>
      <text:h text:style-name="P126" text:outline-level="4" text:is-list-header="true"/>
      <text:p text:style-name="P127"><text:span text:style-name="T94">З</text:span>начения векторов совпадают с командами рестарта Z80, благодаря чему возможно <text:span text:style-name="T95">также </text:span>использовать режим прерываний IM 0, экономя такты на вход в прерывание.</text:p>
      <text:h text:style-name="P128" text:outline-level="3"><text:bookmark-start text:name="__RefHeading___Toc8399_1603396926 Copy 1 Copy 2"/><text:soft-page-break/>В<text:span text:style-name="T96">неш</text:span>ние прерывания<text:bookmark-end text:name="__RefHeading___Toc8399_1603396926 Copy 1 Copy 2"/></text:h>
      <text:p text:style-name="P129">Не рекомендуется разрешать внешним устройствам выдавать прерывания при нахождении в «традиционном» режиме (см. стр. <text:bookmark-ref text:reference-format="page" text:ref-name="__RefHeading___Toc8397_1603396926">24</text:bookmark-ref>), т. к. в этом случае будет теряться внутреннее прерывание VBLANK (единственное активное в «традиционном» режиме).</text:p>
      <text:list text:style-name="L20">
        <text:list-item>
          <text:p text:style-name="P130">В «традиционном» режиме,</text:p>
        </text:list-item>
        <text:list-item>
          <text:p text:style-name="P130">в «улучшенном» при наличии внутренних активных прерываний,</text:p>
        </text:list-item>
        <text:list-item>
          <text:p text:style-name="P131"><text:span text:style-name="T97">а также в «улучшенном» при выключенном режиме </text:span>enable external vectoring --</text:p>
          <text:p text:style-name="P131"/>
        </text:list-item>
      </text:list>
      <text:p text:style-name="P132"><text:span text:style-name="T98"><text:s/></text:span><text:span text:style-name="T99">IORQ</text:span><text:span text:style-name="T100"> </text:span><text:span text:style-name="T97">на внешние устройства </text:span><text:span text:style-name="T100">при </text:span><text:span text:style-name="T99">M1</text:span><text:span text:style-name="T100">=0 </text:span><text:span text:style-name="T97">не пропускается (остаётся в 1)</text:span><text:span text:style-name="T100">.</text:span></text:p>
      <text:p text:style-name="P132"/>
      <text:p text:style-name="P133">Разрешается включать режим <text:span text:style-name="T101">enable external vectoring </text:span>только если все устройства на внешней шине являются «умными» или «простыми». В противном случае режим <text:span text:style-name="T101">enable external vectoring </text:span>должен быть выключен во избежании <text:span text:style-name="T102">восприятия случайных шумов, наводок и предыдущих состояний ШД как вектора.</text:span></text:p>
      <text:h text:style-name="P134" text:outline-level="4"><text:bookmark-start text:name="__RefHeading___Toc8399_1603396926 Copy 1 Copy 2 Copy 1"/>Дефолтный вектор внешних прерываний<text:bookmark-end text:name="__RefHeading___Toc8399_1603396926 Copy 1 Copy 2 Copy 1"/></text:h>
      <text:p text:style-name="P135">Дефолтный вектор для внешних «простых» устройств, а также дефолтный вектор при выключенном режиме <text:span text:style-name="T101">enable external vectoring — </text:span><text:span text:style-name="T4">0xC7</text:span> (соответствует опкоду <text:span text:style-name="T103">RST 0x00</text:span>).</text:p>
      <text:h text:style-name="P11" text:outline-level="1"><text:bookmark-start text:name="__RefHeading__20489_459111283"/>Архитектура: порты чтения конфигурации и NMI<text:bookmark-end text:name="__RefHeading__20489_459111283"/></text:h>
      <text:p text:style-name="P6">Данный раздел описывает средства, позволяющие программно считать конфигурацию памяти и палитру компьютера. Данные средства предназначены в основном для использования в процедуре обработки NMI.</text:p>
      <text:h text:style-name="P25" text:outline-level="2"><text:bookmark-start text:name="__RefHeading__20491_459111283"/>Порт #BF (чтение)<text:bookmark-end text:name="__RefHeading__20491_459111283"/></text:h>
      <text:p text:style-name="Text_20_body"><text:span text:style-name="T1">Порт </text:span><text:span text:style-name="T9">#BF</text:span><text:span text:style-name="T11"> позволяет читать своё содержимое (см. стр. </text:span><text:span text:style-name="T11"><text:bookmark-ref text:reference-format="page" text:ref-name="__RefNumPara__6276_1334049885">48</text:bookmark-ref></text:span><text:span text:style-name="T11">).</text:span></text:p>
      <text:h text:style-name="P136" text:outline-level="2"><text:bookmark-start text:name="__RefHeading___Toc9330_2489220154"/>Порт #BE (запись)<text:bookmark-end text:name="__RefHeading___Toc9330_2489220154"/></text:h>
      <text:p text:style-name="P137"><text:span text:style-name="T11">Запись в порт #BE происходит при выходе из обработчика NMI. Подробнее см. стр. </text:span><text:span text:style-name="T11"><text:bookmark-ref text:reference-format="page" text:ref-name="nmi_exit">31</text:bookmark-ref></text:span><text:span text:style-name="T11">.</text:span></text:p>
      <text:h text:style-name="P25" text:outline-level="2"><text:bookmark-start text:name="__RefNumPara__6273_1391968459"/><text:bookmark-start text:name="__RefHeading__11538_959909826"/>Порт #xxB<text:span text:style-name="T104">D</text:span> <text:span text:style-name="T104">(</text:span>чтение <text:span text:style-name="T105">и запись</text:span>)<text:bookmark-end text:name="__RefNumPara__6273_1391968459"/><text:bookmark-end text:name="__RefHeading__11538_959909826"/></text:h>
      <text:p text:style-name="P138"><text:span text:style-name="T1">Порт </text:span><text:span text:style-name="T9">#xxB</text:span><text:span text:style-name="T106">D</text:span><text:span text:style-name="T1"> предназначен для чтения конфигурации памяти и палитры компьютера, </text:span><text:span text:style-name="T107">а также для настройки поведения отдельных аспектов конфигурации.</text:span></text:p>
      <table:table table:name="Table21" table:style-name="Table21">
        <table:table-column table:style-name="Table21.A"/>
        <table:table-column table:style-name="Table21.B"/>
        <table:table-row>
          <table:table-cell table:style-name="Table21.A1" office:value-type="string">
            <text:p text:style-name="P139">Порт</text:p>
          </table:table-cell>
          <table:table-cell table:style-name="Table21.B1" office:value-type="string">
            <text:p text:style-name="P140">Описание</text:p>
          </table:table-cell>
        </table:table-row>
        <table:table-row>
          <table:table-cell table:style-name="Table21.A2" office:value-type="string">
            <text:p text:style-name="P141">#00B<text:span text:style-name="T105">D</text:span>..#07B<text:span text:style-name="T105">D</text:span> RO</text:p>
            <text:p text:style-name="P141">always</text:p>
          </table:table-cell>
          <table:table-cell table:style-name="Table21.B2" office:value-type="string">
            <text:p text:style-name="P142"><text:span text:style-name="T3">Инверсный</text:span> номер включенной страницы. Распределение:</text:p>
            <text:p text:style-name="P142"><text:span text:style-name="T4">#00B</text:span><text:span text:style-name="T106">D</text:span>..<text:span text:style-name="T4">#03B</text:span><text:span text:style-name="T106">D</text:span> – номера страниц для окон #0000..#3FFF, #4000..#7FFF, #8000..#BFFF и #C000..#FFFF соответственно для нулевой карты памяти,</text:p>
            <text:p text:style-name="P142"><text:span text:style-name="T4">#04B</text:span><text:span text:style-name="T106">D</text:span>..<text:span text:style-name="T4">#07B</text:span><text:span text:style-name="T106">D</text:span> – номера страниц для единичной карты памяти.</text:p>
          </table:table-cell>
        </table:table-row>
        <table:table-row>
          <table:table-cell table:style-name="Table21.A2" office:value-type="string">
            <text:p text:style-name="P141">#08B<text:span text:style-name="T105">D</text:span></text:p>
            <text:p text:style-name="P141">RO</text:p>
            <text:p text:style-name="P141">always</text:p>
          </table:table-cell>
          <table:table-cell table:style-name="Table21.B2" office:value-type="string">
            <text:p text:style-name="P142">Биты «ramnrom» (см. стр. <text:bookmark-ref text:reference-format="page" text:ref-name="port_xFF7">12</text:bookmark-ref>). Порядок битов: бит 0 – соответствует номеру страницы, считанному из порта <text:span text:style-name="T4">#00B</text:span><text:span text:style-name="T106">D</text:span>, бит 1 – номеру из порта <text:span text:style-name="T4">#01B</text:span><text:span text:style-name="T106">D</text:span> и т.д.</text:p>
          </table:table-cell>
        </table:table-row>
        <table:table-row>
          <table:table-cell table:style-name="Table21.A2" office:value-type="string">
            <text:p text:style-name="P141">#09B<text:span text:style-name="T105">D</text:span></text:p>
            <text:p text:style-name="P141">RO</text:p>
            <text:p text:style-name="P141">always</text:p>
          </table:table-cell>
          <table:table-cell table:style-name="Table21.B2" office:value-type="string">
            <text:p text:style-name="P142">Биты «dos7ffd» (см. стр. <text:bookmark-ref text:reference-format="page" text:ref-name="port_xFF7">12</text:bookmark-ref>). Порядок такой же, как для порта <text:span text:style-name="T4">#08B</text:span><text:span text:style-name="T106">D</text:span>.</text:p>
          </table:table-cell>
        </table:table-row>
        <table:table-row>
          <table:table-cell table:style-name="Table21.A2" office:value-type="string">
            <text:p text:style-name="P141">#0AB<text:span text:style-name="T105">D</text:span></text:p>
            <text:p text:style-name="P141">RO</text:p>
            <text:p text:style-name="P141">always</text:p>
          </table:table-cell>
          <table:table-cell table:style-name="Table21.B2" office:value-type="string">
            <text:p text:style-name="P142">Последнее записанное значение в порт <text:span text:style-name="T4">#7FFD</text:span>.</text:p>
          </table:table-cell>
        </table:table-row>
        <table:table-row>
          <table:table-cell table:style-name="Table21.A2" office:value-type="string">
            <text:p text:style-name="P141">#0BB<text:span text:style-name="T105">D</text:span></text:p>
            <text:p text:style-name="P141">RO</text:p>
            <text:p text:style-name="P141">always</text:p>
          </table:table-cell>
          <table:table-cell table:style-name="Table21.B2" office:value-type="string">
            <text:p text:style-name="P142">Последнее записанное значение в порт <text:span text:style-name="T4">#EFF7</text:span>.</text:p>
          </table:table-cell>
        </table:table-row>
        <table:table-row>
          <table:table-cell table:style-name="Table21.A2" office:value-type="string">
            <text:p text:style-name="P141">#0CB<text:span text:style-name="T105">D</text:span></text:p>
            <text:p text:style-name="P141">RO</text:p>
            <text:p text:style-name="P141">always</text:p>
          </table:table-cell>
          <table:table-cell table:style-name="Table21.B2" office:value-type="string">
            <text:p text:style-name="P142">Последнее записанное значение в порт <text:span text:style-name="T4">#xx77</text:span>. Распределение бит:</text:p>
            <text:p text:style-name="P142">биты 3:0 – соответствуют битам данных 3:0 порта <text:span text:style-name="T4">#xx77</text:span><text:span text:style-name="T16">,</text:span></text:p>
            <text:p text:style-name="P142">бит 7 – соответствует биту адреса A14 при записи в <text:span text:style-name="T4">#xx77</text:span><text:span text:style-name="T16">,</text:span></text:p>
            <text:p text:style-name="P142">бит 6 — биту адреса A9,</text:p>
            <text:p text:style-name="P142">бит 5 – биту адреса A8,</text:p>
            <text:p text:style-name="P142">бит 4 – индицирует состояние сигнала DOS: если включено ПЗУ TR-DOS стандартным методом (через вход в #3Dxx), то 1, иначе 0. Этот бит предназначен для определения факта, что в NMI произошёл вход из включенного через #3Dxx ПЗУ TR-DOS. Этот бит остаётся в 1, пока исполняется код из включенной по NMI страницы #FF в области #0000..#3FFF при условии, что в эту область не включалось ОЗУ через порт <text:span text:style-name="T4">#3FF7</text:span> или <text:span text:style-name="T4">#37F7</text:span>.</text:p>
          </table:table-cell>
        </table:table-row>
        <table:table-row>
          <table:table-cell table:style-name="Table21.A2" office:value-type="string">
            <text:p text:style-name="P141">#0DB<text:span text:style-name="T105">D</text:span></text:p>
            <text:p text:style-name="P141">RO</text:p>
            <text:p text:style-name="P141">always</text:p>
          </table:table-cell>
          <table:table-cell table:style-name="Table21.B2" office:value-type="string">
            <text:p text:style-name="P142">Чтение текущего отображаемого цвета. Предназначен для чтения палитры.</text:p>
            <text:p text:style-name="P142">Формат считываемого значения совпадает с форматом записываемого значения в порт <text:span text:style-name="T4">#FF</text:span> при установке палитры (см. стр. <text:bookmark-ref text:reference-format="page" text:ref-name="palette_write_FF">16</text:bookmark-ref>), за исключением битов 2 и 3, которые <text:span text:style-name="T3">не определены</text:span>. Процедура считывания палитры аналогична процедуре записи (см. стр. <text:bookmark-ref text:reference-format="page" text:ref-name="palette_write_FF">16</text:bookmark-ref>), но производится чтение порта <text:span text:style-name="T4">#0DB</text:span><text:span text:style-name="T106">D</text:span> вместо записи порта <text:span text:style-name="T4">#FF</text:span>.</text:p>
          </table:table-cell>
        </table:table-row>
        <table:table-row table:style-name="Table21.9">
          <table:table-cell table:style-name="Table21.A2" office:value-type="string">
            <text:p text:style-name="P141">#0EB<text:span text:style-name="T105">D</text:span></text:p>
            <text:p text:style-name="P141">RO</text:p>
            <text:p text:style-name="P141">always</text:p>
          </table:table-cell>
          <table:table-cell table:style-name="Table21.B2" office:value-type="string">
            <text:p text:style-name="P142">Чтение текущего отображаемого байта в текстовом режиме. Предназначен для считывания шрифта.</text:p>
            <text:p text:style-name="P143">Пример считывания приведён в файле <text:span text:style-name="T3">fontread.src</text:span></text:p>
          </table:table-cell>
        </table:table-row>
        <table:table-row table:style-name="Table21.9">
          <table:table-cell table:style-name="Table21.A2" office:value-type="string">
            <text:p text:style-name="P144">#0FB<text:span text:style-name="T108">D</text:span></text:p>
            <text:p text:style-name="P144">RO always</text:p>
          </table:table-cell>
          <table:table-cell table:style-name="Table21.B2" office:value-type="string">
            <text:p text:style-name="P145">Биты 3:0 – чтение последнего установленного цвета бордюра. Значения 0..7 – цвет, установленный записью в порт #FE, 8..15 – в порт #F6.</text:p>
          </table:table-cell>
        </table:table-row>
        <table:table-row>
          <table:table-cell table:style-name="Table21.A2" office:value-type="string">
            <text:p text:style-name="P141">#10B<text:span text:style-name="T109">D</text:span></text:p>
            <text:p text:style-name="P141">R<text:span text:style-name="T109">W</text:span></text:p>
            <text:p text:style-name="P141">always</text:p>
          </table:table-cell>
          <table:table-cell table:style-name="Table21.B2" office:value-type="string">
            <text:p text:style-name="P142">Чтение <text:span text:style-name="T109">и запись </text:span>младшей части адреса аппаратной ловушки</text:p>
          </table:table-cell>
        </table:table-row>
        <text:soft-page-break/>
        <table:table-row>
          <table:table-cell table:style-name="Table21.A2" office:value-type="string">
            <text:p text:style-name="P141">#11B<text:span text:style-name="T109">D</text:span></text:p>
            <text:p text:style-name="P141">R<text:span text:style-name="T109">W</text:span></text:p>
            <text:p text:style-name="P141">always</text:p>
          </table:table-cell>
          <table:table-cell table:style-name="Table21.B2" office:value-type="string">
            <text:p text:style-name="P142">Чтение <text:span text:style-name="T109">и запись</text:span> старшей части адреса аппаратной ловушки</text:p>
          </table:table-cell>
        </table:table-row>
        <table:table-row>
          <table:table-cell table:style-name="Table21.A2" office:value-type="string">
            <text:p text:style-name="P146">#12B<text:span text:style-name="T110">D</text:span></text:p>
            <text:p text:style-name="P146">R<text:span text:style-name="T109">W</text:span></text:p>
            <text:p text:style-name="P147">always</text:p>
          </table:table-cell>
          <table:table-cell table:style-name="Table21.B2" office:value-type="string">
            <text:p text:style-name="P148">Биты защиты от записи (см. стр. <text:bookmark-ref text:reference-format="page" text:ref-name="port_xBF7">13</text:bookmark-ref>). Порядок такой же, как для порта <text:span text:style-name="T4">#08B</text:span><text:span text:style-name="T111">D</text:span>.</text:p>
          </table:table-cell>
        </table:table-row>
        <table:table-row>
          <table:table-cell table:style-name="Table21.A2" office:value-type="string">
            <text:p text:style-name="P146">#1<text:span text:style-name="T110">3</text:span>B<text:span text:style-name="T110">D</text:span></text:p>
            <text:p text:style-name="P146">R<text:span text:style-name="T109">W</text:span></text:p>
            <text:p text:style-name="P146">always</text:p>
          </table:table-cell>
          <table:table-cell table:style-name="Table21.B2" office:value-type="string">
            <text:p text:style-name="P149">Биты <text:span text:style-name="T2">0..3 </text:span>соответствуют дисководам <text:span text:style-name="T2">A..D. </text:span>Если соответствующий бит стоит в единице, то при обращении к портам <text:span text:style-name="T2">TR-DOS </text:span>во время работы ПЗУ <text:span text:style-name="T2">TR-DOS </text:span>происходит подмена ПЗУ на страницу ОЗУ <text:span text:style-name="T2">#FE </text:span><text:span text:style-name="T112">(т.н. режим “trdos emulation”, см. стр. </text:span><text:span text:style-name="T112"><text:bookmark-ref text:reference-format="page" text:ref-name="__RefNumPara__12290_2869355866">31</text:bookmark-ref></text:span><text:span text:style-name="T112">)</text:span><text:span text:style-name="T2">. </text:span>Подмена происходит начиная со следующей команды после той, что обратилась в порты. Возврат происходит так же, как из обработчика <text:span text:style-name="T2">NMI: </text:span>записью в порт <text:span text:style-name="T5">#xxBE</text:span><text:span text:style-name="T2"> (</text:span>без <text:span text:style-name="T2">RETN). </text:span>После данной записи страница ПЗУ <text:span text:style-name="T2">TR-DOS </text:span>возвращается на место.</text:p>
          </table:table-cell>
        </table:table-row>
        <table:table-row>
          <table:table-cell table:style-name="Table21.A2" office:value-type="string">
            <text:p text:style-name="P150">#14BD</text:p>
            <text:p text:style-name="P150">RW</text:p>
            <text:p text:style-name="P150">always</text:p>
          </table:table-cell>
          <table:table-cell table:style-name="Table21.B2" office:value-type="string">
            <text:p text:style-name="P151"><text:bookmark-start text:name="int_cfg"/>Interrupts <text:span text:style-name="T113">config</text:span><text:bookmark-end text:name="int_cfg"/><text:span text:style-name="T113"> </text:span></text:p>
            <text:p text:style-name="P151">бит <text:span text:style-name="T101">7</text:span> — <text:span text:style-name="T113">enable enhanced mode, 0 после сброса. 1 переключает в режим «</text:span><text:span text:style-name="T101">улучшен</text:span><text:span text:style-name="T113">ных» (несовместимых!) прерываний.</text:span></text:p>
            <text:p text:style-name="P151"/>
            <text:p text:style-name="P152">биты 6..3 — всегда 0</text:p>
            <text:p text:style-name="P153"/>
            <text:p text:style-name="P153">бит 2 — enable external vectoring, 0 после сброса. <text:span text:style-name="T100">Единичка разрешает внешним устройствам (на ZXBUS) выдавать вектора прерываний, пропуская на них </text:span><text:span text:style-name="T99">IORQ</text:span><text:span text:style-name="T100"> при </text:span><text:span text:style-name="T99">M1</text:span><text:span text:style-name="T100">=0. Разрешено использовать, если все устройства на внешней шине являются «умными» или «простыми», см. стр. </text:span><text:span text:style-name="T100"><text:bookmark-ref text:reference-format="page" text:ref-name="clever ext devs">24</text:bookmark-ref></text:span><text:span text:style-name="T100"><text:s/>и </text:span><text:span text:style-name="T100"><text:bookmark-ref text:reference-format="page" text:ref-name="simple ext devs">24</text:bookmark-ref></text:span><text:span text:style-name="T100">. Вектор от «простых» устройств (один на всех) будет подставлен FPGA.</text:span></text:p>
            <text:p text:style-name="P153"/>
            <text:p text:style-name="P154">бит <text:span text:style-name="T100">1</text:span> — enable <text:span text:style-name="T100">internal </text:span>vectoring, 0 после сброса. <text:span text:style-name="T100">Единичка разрешает внутренним устройствам устанавливать свои вектора прерываний. Не зависит от всей функциональности, связанной с векторами от внешних устройств, т. к. прерывания от внутренних устройств всегда имеют приоритет над внешними. При наличии внутреннего прерывания происходит </text:span><text:span text:style-name="T114">безусловная </text:span><text:span text:style-name="T100">блокировка </text:span><text:span text:style-name="T99">IORQ</text:span><text:span text:style-name="T98"> вн</text:span><text:span text:style-name="T115">ешним устройствам в цикле подтверждения прерывания.</text:span></text:p>
            <text:p text:style-name="P154"/>
            <text:p text:style-name="P154">бит <text:span text:style-name="T100">0</text:span> — enable internal interrupts autoclear, 0 после сброса. <text:span text:style-name="T100">Работает только если бит 1 установлен в 1. При входе в прерывание от внутренних устройств автоматически очищается соответствующий бит статуса прерываний.</text:span></text:p>
          </table:table-cell>
        </table:table-row>
        <table:table-row>
          <table:table-cell table:style-name="Table21.A2" office:value-type="string">
            <text:p text:style-name="P150">#15BD</text:p>
            <text:p text:style-name="P150">RW</text:p>
            <text:p text:style-name="P150">always</text:p>
          </table:table-cell>
          <table:table-cell table:style-name="Table21.B2" office:value-type="string">
            <text:p text:style-name="P155"><text:bookmark-start text:name="int_ena"/>Interrupts <text:span text:style-name="T113">enable</text:span><text:bookmark-end text:name="int_ena"/><text:span text:style-name="T113">. </text:span><text:span text:style-name="T116">Актуально, если бит 7 порта </text:span><text:span text:style-name="T5">#14BD</text:span><text:span text:style-name="T19"> </text:span><text:span text:style-name="T117">стоит в 1.</text:span></text:p>
            <text:p text:style-name="P151">бит 7<text:span text:style-name="T101"> </text:span>— <text:span text:style-name="T101">при записи </text:span>set/reset, <text:span text:style-name="T101">при чтении 0</text:span></text:p>
            <text:p text:style-name="P151">биты 6..1 — всегда 0</text:p>
            <text:p text:style-name="P151">бит 0 — VBLANK <text:span text:style-name="T101">enable, 1 — разрешено. 0 после сброса</text:span></text:p>
          </table:table-cell>
        </table:table-row>
        <table:table-row>
          <table:table-cell table:style-name="Table21.A2" office:value-type="string">
            <text:p text:style-name="P150">#1<text:span text:style-name="T113">6</text:span>BD</text:p>
            <text:p text:style-name="P150">RW</text:p>
            <text:p text:style-name="P150">always</text:p>
          </table:table-cell>
          <table:table-cell table:style-name="Table21.B2" office:value-type="string">
            <text:p text:style-name="P156"><text:bookmark-start text:name="int_act"/>Interrupts <text:bookmark-end text:name="int_act"/><text:span text:style-name="T101">status.</text:span> <text:span text:style-name="T116">Актуально, если бит 7 порта </text:span><text:span text:style-name="T118">#14BD</text:span><text:span text:style-name="T119"> </text:span><text:span text:style-name="T117">стоит в 1.</text:span></text:p>
            <text:p text:style-name="P157">бит 7<text:span text:style-name="T101"> </text:span>— <text:span text:style-name="T101">при записи </text:span>set/reset, <text:span text:style-name="T101">при чтении 0</text:span></text:p>
            <text:p text:style-name="P157">биты 6..1 — всегда 0</text:p>
            <text:p text:style-name="P157">бит 0 — VBLANK <text:span text:style-name="T101">status, 1 -- активно</text:span></text:p>
          </table:table-cell>
        </table:table-row>
      </table:table>
      <text:p text:style-name="Standard"/>
      <text:p text:style-name="Standard"/>
      <text:p text:style-name="P158">Алгоритм восстановления состояния диспетчера страниц:</text:p>
      <text:list text:style-name="L21">
        <text:list-item>
          <text:p text:style-name="P159">Записывая в порт <text:span text:style-name="T4">#xFF7</text:span>, восстановить биты «dos7ffd».</text:p>
        </text:list-item>
        <text:list-item>
          <text:p text:style-name="P159">Если страница в данном окне данной карты памяти — ROM или RAM с номером менее 64, то восстановить её записью в <text:span text:style-name="T4">#xFF7</text:span> одновременно с пунктом 1.</text:p>
        </text:list-item>
        <text:list-item>
          <text:p text:style-name="P159">Для всех страниц RAM с номером не менее 64 восстановить номер <text:span text:style-name="T3">дополнительной</text:span> записью в порт <text:span text:style-name="T4">#x7F7</text:span>.</text:p>
        </text:list-item>
      </text:list>
      <text:h text:style-name="Heading_20_2" text:outline-level="2"><text:bookmark-start text:name="__RefNumPara__6533_1618013060"/><text:bookmark-start text:name="__RefHeading__6894_101198354"/><text:span text:style-name="T120">Аппаратная ловушка (п</text:span>орт<text:span text:style-name="T120">ы</text:span> #<text:span text:style-name="T120">10</text:span>BD,<text:span text:style-name="T2"> </text:span><text:span text:style-name="T121">#11BD</text:span>)<text:bookmark-end text:name="__RefNumPara__6533_1618013060"/><text:bookmark-end text:name="__RefHeading__6894_101198354"/></text:h>
      <text:p text:style-name="Text_20_body">Разрешается срабатывание ловушки битом 4 порта <text:span text:style-name="T4">#xxBF</text:span> (см. стр. <text:bookmark-ref text:reference-format="page" text:ref-name="__RefNumPara__6276_1334049885">48</text:bookmark-ref>).</text:p>
      <text:p text:style-name="Text_20_body">Аппаратная ловушка работает следующим образом: если процессор выполняет цикл M1 с указанного адреса (читает опкод команды), ему незамедлительно приходит сигнал NMI и со следующей команды происходит вход в NMI (см. ниже). При этом, в отличие от других методов входа в NMI, сигнал NMI подаётся сразу же <text:span text:style-name="T122">при срабатывании ловушки</text:span>, а не одновременно с сигналом INT, <text:span text:style-name="T122">как в иных случаях</text:span>.</text:p>
      <text:p text:style-name="Text_20_body"><text:span text:style-name="T3">Примечание:</text:span> после входа в NMI при срабатывании ловушки она остаётся разрешённой.</text:p>
      <text:h text:style-name="Heading_20_2" text:outline-level="2"><text:bookmark-start text:name="__RefNumPara__16588_2869355866"/><text:bookmark-start text:name="__RefHeading__20493_459111283"/>Вход в NMI<text:bookmark-end text:name="__RefNumPara__16588_2869355866"/><text:bookmark-end text:name="__RefHeading__20493_459111283"/></text:h>
      <text:p text:style-name="Text_20_body">После подачи NMI (см. стр. <text:bookmark-ref text:reference-format="page" text:ref-name="nmi_gen">8</text:bookmark-ref>) процессор производит следующие действия:</text:p>
      <text:list text:style-name="L22">
        <text:list-item>
          <text:p text:style-name="P160">Сохраняет адрес следующей команды на стеке.</text:p>
        </text:list-item>
        <text:list-item>
          <text:p text:style-name="P160">Запоминает состояние разрешённости прерываний INT в флаге IFF2, при этом запрещая дальнейшие прерывания INT очисткой флага IFF1.</text:p>
        </text:list-item>
        <text:list-item>
          <text:p text:style-name="P160">Начинает выполнять программу с адреса #0066.</text:p>
        </text:list-item>
      </text:list>
      <text:p text:style-name="P161"><text:span text:style-name="T123">В</text:span> момент подачи NMI <text:span text:style-name="T123">после чтения процессором очередного опкода в цикле M1 происходит подстановка в окно #0000..#3FFF последней (с номером #FF) страницы ОЗУ, где должен располагаться обработчик немаскируемого прерывания. Одновременно с этой подстановкой процессору выдаётся аппаратный однократный </text:span><text:span text:style-name="T124">NOP</text:span><text:span text:style-name="T123"> с адреса #0066. Следующую команду процессор прочитает с адреса #0067 страницы ОЗУ #FF.</text:span></text:p>
      <text:p text:style-name="Text_20_body">Так как компьютер при необходимости производит подключение последней страницы ОЗУ <text:span text:style-name="T123">после</text:span> <text:span text:style-name="T123">выдачи </text:span>NMI <text:span text:style-name="T123">и подстановку опкода </text:span><text:span text:style-name="T124">NOP</text:span><text:span text:style-name="T123"> (т. е. #00) по адресу #0066</text:span>, <text:span text:style-name="T123">то в случае прихода NMI в момент выполнения многоопкодовой команды (например </text:span><text:span text:style-name="T124">RLC [IX+0]</text:span><text:span text:style-name="T123">), расположенной по адресам #0063..#0066, возможен некорректный вход в обработчик NMI. <text:s/>Кроме того, некорректный вход возможен также и в случа</text:span><text:span text:style-name="T125">е, если з</text:span>апись на стек программы нарушает её функционирование.</text:p>
      <text:p text:style-name="Text_20_body">Начало сигнала NMI совпадает с началом сигнала INT, таким образом в случае разрешённых прерываний INT, будет выполнен вход в NMI <text:span text:style-name="T3">вместо</text:span> входа в INT. При выходе из обработчика NMI следует иметь это в виду и при необходимости продолжать выполнение программы с обработчика INT. В случае подачи NMI через порт <text:span text:style-name="T7">#BF</text:span> сигнал NMI также придёт совместно со следующим сигналом INT. <text:span text:style-name="T3">Однако,</text:span> при срабатывании аппаратной ловушки сигнал NMI приходит непосредственно в момент срабатывания.</text:p>
      <text:p text:style-name="Text_20_body">Рекомендуемый алгоритм входа в NMI для случая, когда требуется продолжить выполнение программы:</text:p>
      <text:list text:style-name="L23">
        <text:list-item>
          <text:p text:style-name="P162">Сразу после входа в NMI (команда по смещению #0067 в последней странице ОЗУ) <text:soft-page-break/>сохранить содержимое регистра стека в предназначенную для этого ячейку последней страницы ОЗУ.</text:p>
        </text:list-item>
        <text:list-item>
          <text:p text:style-name="P162">Переставить стек в место, выделенное в последней странице ОЗУ.</text:p>
        </text:list-item>
        <text:list-item>
          <text:p text:style-name="P162">Сохранить все регистры процессора на стек.</text:p>
        </text:list-item>
        <text:list-item>
          <text:p text:style-name="P162">Узнать состояние разрешённости прерываний путём считывания флага IFF2 командой <text:span text:style-name="T126">LD A,R</text:span> или <text:span text:style-name="T126">LD A,I</text:span>.</text:p>
        </text:list-item>
        <text:list-item>
          <text:p text:style-name="P162">При необходимости считать текущую конфигурацию компьютера из портов <text:span text:style-name="T4">#xxB</text:span><text:span text:style-name="T127">D</text:span>.</text:p>
        </text:list-item>
      </text:list>
      <text:h text:style-name="Heading_20_2" text:outline-level="2"><text:bookmark text:name="nmi_exit"/><text:bookmark-start text:name="__RefHeading__20495_459111283"/><text:bookmark-start text:name="__RefNumPara__16591_2869355866"/>Выход из NMI<text:bookmark-end text:name="__RefHeading__20495_459111283"/><text:bookmark-end text:name="__RefNumPara__16591_2869355866"/></text:h>
      <text:p text:style-name="Text_20_body">Рекомендуемый алгоритм выхода из обработчика NMI:</text:p>
      <text:list text:style-name="L24">
        <text:list-item>
          <text:p text:style-name="P163">Если обработчик NMI выполнял команды <text:span text:style-name="T126">DI</text:span> или <text:span text:style-name="T126">EI</text:span>, то следует восстановить флаг IFF2 процессора (теми же командами). При этом надо следить, чтобы до момента выхода из NMI не произошло прерывания INT.</text:p>
        </text:list-item>
        <text:list-item>
          <text:p text:style-name="P163">Восстановить регистры процессора.</text:p>
        </text:list-item>
        <text:list-item>
          <text:p text:style-name="P163">Переставить указатель стека на стек программы.</text:p>
        </text:list-item>
        <text:list-item>
          <text:p text:style-name="P163">Выполнить команду <text:span text:style-name="T126">OUT (#BE),A</text:span>. Данная команда не влияет на содержимое флагов и регистров процессора. Записываемое значение игнорируется. Данный шаг указывает компьютеру, что после выполнения следующей команды <text:span text:style-name="T126">RETN</text:span> следует отключить маппинг последней страницы ОЗУ в область #0000..#3FFF с целью продолжения нормального выполнения программы.</text:p>
        </text:list-item>
        <text:list-item>
          <text:p text:style-name="P163">Сразу же после команды <text:span text:style-name="T126">OUT (#BE),A</text:span> выполнить команду <text:span text:style-name="T126">RETN</text:span><text:span text:style-name="T128">. В процессе выполнения этой команды в окне процессора #0000..#3FFF включится вместо последней страницы ОЗУ заданная диспетчером страница и процессор продолжит выполнять прерванную программу.</text:span></text:p>
        </text:list-item>
      </text:list>
      <text:p text:style-name="Text_20_body"><text:span text:style-name="T129">Примечание:</text:span><text:span text:style-name="T128"> выключение подстановки последней страницы ОЗУ происходит на 2ой по порядку сигнал </text:span><text:span text:style-name="T130">M1</text:span><text:span text:style-name="T128"> процессора после записи в порт </text:span><text:span text:style-name="T131">#BE</text:span><text:span text:style-name="T128"> независимо от того, какие команды выполняются в этот момент.</text:span></text:p>
      <text:p text:style-name="Text_20_body">В момент выполнения команды <text:span text:style-name="T126">RETN</text:span> происходит копирования состояния разрешённости прерываний INT из флага IFF2 в флаг IFF1.</text:p>
      <text:p text:style-name="Text_20_body">Команды <text:span text:style-name="T126">DI</text:span> и <text:span text:style-name="T132">EI</text:span> устанавливают флаги IFF1 и IFF2 в одинаковое состояние, таким образом в случае выполнения этих команд в обработчике NMI, последующая команда <text:span text:style-name="T126">RETN</text:span><text:span text:style-name="T128"> не изменит состояние разрешённости прерываний.</text:span></text:p>
      <text:h text:style-name="P164" text:outline-level="2"><text:bookmark-start text:name="__RefNumPara__12290_2869355866"/><text:bookmark-start text:name="__RefHeading___Toc7986_4047076958"/>Режим «trdos emulation»<text:bookmark-end text:name="__RefNumPara__12290_2869355866"/><text:bookmark-end text:name="__RefHeading___Toc7986_4047076958"/></text:h>
      <text:p text:style-name="P165">Данный режим предназначен для осуществления программной эмуляции контроллера дисковода КР1818ВГ93 (WD1793, MB8877A) без необходимости патчить ПЗУ TR-DOS. Работа происходит следующим образом: <text:span text:style-name="T133">во время выполнения кода из ПЗУ TR-DOS </text:span>при попытке обращения к портам контроллера дисковода (см. стр. <text:bookmark-ref text:reference-format="page" text:ref-name="__RefNumPara__12992_2869355866">43</text:bookmark-ref>) <text:span text:style-name="T134">происходит подмена </text:span><text:span text:style-name="T133">ПЗУ TR-DOS в окне #0000..#3FFF на страницу ОЗУ #FE таким образом, что следующая после команды ввода-вывода команда вычитывается из этой страницы ОЗУ. Для возврата из этого режима выполняется команда </text:span><text:span text:style-name="T135">OUT (#BE),A</text:span><text:span text:style-name="T133"> , после которой режим отключается и </text:span><text:soft-page-break/><text:span text:style-name="T133">происходит возврат страницы ПЗУ, из которой произошёл вход в описываемый режим.</text:span></text:p>
      <text:h text:style-name="P166" text:outline-level="3"><text:bookmark-start text:name="__RefHeading___Toc7988_4047076958"/>Вход в <text:span text:style-name="T136">«trdos emulation»</text:span><text:bookmark-end text:name="__RefHeading___Toc7988_4047076958"/></text:h>
      <text:p text:style-name="P167">Условия входа:</text:p>
      <text:list text:style-name="L25">
        <text:list-item>
          <text:p text:style-name="P168">Включён режим DOS <text:span text:style-name="T137">(</text:span><text:span text:style-name="T138">стр. </text:span><text:span text:style-name="T138"><text:bookmark-ref text:reference-format="page" text:ref-name="__RefNumPara__14417_2869355866">11</text:bookmark-ref></text:span><text:span text:style-name="T137">)</text:span></text:p>
        </text:list-item>
        <text:list-item>
          <text:p text:style-name="P168">Выполнение в окне #0000..#3FFF <text:span text:style-name="T139">из ПЗУ TR-DOS</text:span></text:p>
        </text:list-item>
        <text:list-item>
          <text:p text:style-name="P169">Предыдущей записью <text:span text:style-name="T137">в порт TR-DOS </text:span><text:span text:style-name="T140">#xxFF</text:span><text:span text:style-name="T141"> </text:span><text:span text:style-name="T142">(стр. </text:span><text:span text:style-name="T142"><text:bookmark-ref text:reference-format="page" text:ref-name="__RefNumPara__12992_2869355866">43</text:bookmark-ref></text:span><text:span text:style-name="T142">)</text:span><text:span text:style-name="T140"> </text:span><text:span text:style-name="T143">установлен дисковод, имеющий соответствующий единичный бит маски в порту </text:span><text:span text:style-name="T140">#13BD</text:span><text:span text:style-name="T143"> (стр. </text:span><text:span text:style-name="T143"><text:bookmark-ref text:reference-format="page" text:ref-name="__RefNumPara__6273_1391968459">27</text:bookmark-ref></text:span><text:span text:style-name="T143">).</text:span></text:p>
        </text:list-item>
      </text:list>
      <text:p text:style-name="P170">В момент обращения, соответствующего условиям входа, также происходит следующее:</text:p>
      <text:list text:style-name="L26">
        <text:list-item>
          <text:p text:style-name="P171"><text:span text:style-name="T16">Непосредственно после цикла I/O и до первого цикла M1 запрещается любая запись в память. Это предотвращает порчу страницы ОЗУ #FE командами </text:span><text:span text:style-name="T126">INI</text:span><text:span text:style-name="T16">, </text:span><text:span text:style-name="T126">INIR</text:span><text:span text:style-name="T16"> и им подобными.</text:span></text:p>
        </text:list-item>
        <text:list-item>
          <text:p text:style-name="P172"><text:span text:style-name="T16">Записи или чтения, направленные непосредственно в порты м/сх контроллера дисковода (</text:span><text:span text:style-name="T4">#</text:span><text:span text:style-name="T144">xx</text:span><text:span text:style-name="T4">1F</text:span><text:span text:style-name="T16">, </text:span><text:span text:style-name="T4">#</text:span><text:span text:style-name="T144">xx</text:span><text:span text:style-name="T4">3F</text:span><text:span text:style-name="T16">, </text:span><text:span text:style-name="T4">#</text:span><text:span text:style-name="T144">xx</text:span><text:span text:style-name="T4">5F</text:span><text:span text:style-name="T16">, </text:span><text:span text:style-name="T4">#</text:span><text:span text:style-name="T144">xx</text:span><text:span text:style-name="T4">7F</text:span><text:span text:style-name="T16">) — блокируются (не доходят до м/сх). Записи в порт </text:span><text:span text:style-name="T4">#</text:span><text:span text:style-name="T144">xx</text:span><text:span text:style-name="T4">FF</text:span><text:span text:style-name="T16"> — проходят успешно в любом случае.</text:span></text:p>
        </text:list-item>
      </text:list>
      <text:h text:style-name="P173" text:outline-level="3"><text:bookmark-start text:name="__RefHeading___Toc7990_4047076958"/>Выход из «trdos emulation»<text:bookmark-end text:name="__RefHeading___Toc7990_4047076958"/></text:h>
      <text:p text:style-name="P174">Выход осуществляется командой <text:span text:style-name="T135">OUT (#BE),A</text:span> , после которой выполнение сразу же (со следующей команды) продолжается из ранее включенного ПЗУ TR-DOS.</text:p>
      <text:h text:style-name="P175" text:outline-level="3"><text:bookmark-start text:name="__RefHeading___Toc7992_4047076958"/>Комбинация режимов «NMI» и «trdos emulation»<text:bookmark-end text:name="__RefHeading___Toc7992_4047076958"/></text:h>
      <text:p text:style-name="P176">В случае комбинации режимов, например при входе в NMI из «trdos emulation», в окне #0000..#3FFF оказывается включенной страница ОЗУ #FF, при этом процедура входа в NMI (стр. <text:bookmark-ref text:reference-format="page" text:ref-name="__RefNumPara__16588_2869355866">30</text:bookmark-ref>) выполняется корректно.</text:p>
      <text:p text:style-name="P176">Выход при помощи <text:span text:style-name="T135">OUT (#BE),A</text:span> осуществляется сначала из режима «NMI» (стр. <text:bookmark-ref text:reference-format="page" text:ref-name="__RefNumPara__16591_2869355866">31</text:bookmark-ref>), затем из «trdos emulation» (см. выше).</text:p>
      <text:p text:style-name="P177"/>
      <text:h text:style-name="P55" text:outline-level="1"><text:bookmark-start text:name="__RefHeading__20497_459111283"/>Архитектура: порты ввода-вывода<text:bookmark-end text:name="__RefHeading__20497_459111283"/></text:h>
      <text:h text:style-name="P25" text:outline-level="2"><text:bookmark-start text:name="__DdeLink__2634_1805529058"/><text:bookmark-start text:name="__RefHeading__11697_959909826"/>Порт #FE<text:bookmark-end text:name="__DdeLink__2634_1805529058"/><text:bookmark-end text:name="__RefHeading__11697_959909826"/></text:h>
      <text:p text:style-name="P178">Порт считывания состояния клавиатуры и магнитофонного входа, порт установки бита бипера, бита магнитофонного выхода, цвета бордюра.</text:p>
      <table:table table:name="Таблица6" table:style-name="Таблица6">
        <table:table-column table:style-name="Таблица6.A"/>
        <table:table-column table:style-name="Таблица6.B"/>
        <text:soft-page-break/>
        <table:table-row>
          <table:table-cell table:style-name="Таблица6.A1" office:value-type="string">
            <text:p text:style-name="P37">Порт</text:p>
          </table:table-cell>
          <table:table-cell table:style-name="Таблица6.B1" office:value-type="string">
            <text:p text:style-name="P38">Описание</text:p>
          </table:table-cell>
        </table:table-row>
        <table:table-row>
          <table:table-cell table:style-name="Таблица6.A2" office:value-type="string">
            <text:p text:style-name="P39">#xxFE RW</text:p>
            <text:p text:style-name="P39">always</text:p>
          </table:table-cell>
          <table:table-cell table:style-name="Таблица6.B2" office:value-type="string">
            <text:p text:style-name="Table_20_Contents">Чтение:</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table-cell table:style-name="Таблица7.A1" office:value-type="string">
                  <text:p text:style-name="P40">7: 1</text:p>
                </table:table-cell>
                <table:table-cell table:style-name="Таблица7.A1" office:value-type="string">
                  <text:p text:style-name="P40">6: tape_in</text:p>
                </table:table-cell>
                <table:table-cell table:style-name="Таблица7.A1" office:value-type="string">
                  <text:p text:style-name="Table_20_Contents"><text:span text:style-name="T2">5: </text:span>0</text:p>
                </table:table-cell>
                <table:table-cell table:style-name="Таблица7.D1" office:value-type="string">
                  <text:p text:style-name="P40">4..0: keyboard</text:p>
                </table:table-cell>
              </table:table-row>
            </table:table>
            <text:p text:style-name="P41"/>
            <text:p text:style-name="P41">Запись:</text:p>
            <table:table table:name="Таблица8" table:style-name="Таблица8">
              <table:table-column table:style-name="Таблица8.A" table:number-columns-repeated="3"/>
              <table:table-column table:style-name="Таблица8.D"/>
              <table:table-row>
                <table:table-cell table:style-name="Таблица8.A1" office:value-type="string">
                  <text:p text:style-name="Table_20_Contents">7..5: не исп.</text:p>
                </table:table-cell>
                <table:table-cell table:style-name="Таблица8.A1" office:value-type="string">
                  <text:p text:style-name="Table_20_Contents">4: <text:span text:style-name="T2">beeper</text:span></text:p>
                </table:table-cell>
                <table:table-cell table:style-name="Таблица8.A1" office:value-type="string">
                  <text:p text:style-name="Table_20_Contents">3: tape_<text:span text:style-name="T2">out</text:span></text:p>
                </table:table-cell>
                <table:table-cell table:style-name="Таблица8.D1" office:value-type="string">
                  <text:p text:style-name="Table_20_Contents">2..0: цвет бордюра</text:p>
                </table:table-cell>
              </table:table-row>
            </table:table>
            <text:p text:style-name="P41"/>
          </table:table-cell>
        </table:table-row>
      </table:table>
      <text:p text:style-name="P6">Чтение клавиатуры происходит стандартным для ZX-Spectrum способом — установкой в 0 адресных бит A15..A8, соответствующих требуемым рядам, данные всех выбранных рядов складываются по AND, результат возвращается в битах 4..0. Чтение происходит без wait'ов. Магнитофонный вход — отдельный вход ZX <text:span text:style-name="T2">Evolution.</text:span></text:p>
      <text:h text:style-name="P25" text:outline-level="2"><text:bookmark-start text:name="__RefHeading__11864_959909826"/>Порт <text:span text:style-name="T2">COVOX (#xxFB, WO always)</text:span><text:bookmark-end text:name="__RefHeading__11864_959909826"/></text:h>
      <text:p text:style-name="P6">Порт предназначен для вывода 8-битного звука. Звук выводится на биперный выход при помощи широтно-импульсной модуляции с частотой около 218 кГц. Записываемые значения – беззнаковые отсчёты от 0 до 255. После записи в порт <text:span text:style-name="T4">#xxFB</text:span> биперный выход начинает работать в режиме COVOX'а вплоть до последующей записи в порт <text:span text:style-name="T4">#FE</text:span><text:span text:style-name="T16">, после чего <text:s/>биперный выход начинает работать в обычном режиме.</text:span></text:p>
      <text:h text:style-name="P25" text:outline-level="2"><text:bookmark-start text:name="__RefHeading__20499_459111283"/>Порты AY/YM<text:bookmark-end text:name="__RefHeading__20499_459111283"/></text:h>
      <text:p text:style-name="P6"/>
      <table:table table:name="Table20" table:style-name="Table20">
        <table:table-column table:style-name="Table20.A"/>
        <table:table-column table:style-name="Table20.B"/>
        <table:table-row>
          <table:table-cell table:style-name="Table20.A1" office:value-type="string">
            <text:p text:style-name="P37">Порт</text:p>
          </table:table-cell>
          <table:table-cell table:style-name="Table20.B1" office:value-type="string">
            <text:p text:style-name="P38">Описание</text:p>
          </table:table-cell>
        </table:table-row>
        <table:table-row>
          <table:table-cell table:style-name="Table20.A2" office:value-type="string">
            <text:p text:style-name="P39">#FFFD RW</text:p>
            <text:p text:style-name="P39">always</text:p>
          </table:table-cell>
          <table:table-cell table:style-name="Table20.B2" office:value-type="string">
            <text:p text:style-name="P41">Запись – выбор номера регистра AY/YM</text:p>
            <text:p text:style-name="P41">Чтение – чтение содержимого регистра AY/YM</text:p>
          </table:table-cell>
        </table:table-row>
        <table:table-row>
          <table:table-cell table:style-name="Table20.A2" office:value-type="string">
            <text:p text:style-name="P39">#BFFD</text:p>
            <text:p text:style-name="P39">WO</text:p>
            <text:p text:style-name="P39">always</text:p>
          </table:table-cell>
          <table:table-cell table:style-name="Table20.B2" office:value-type="string">
            <text:p text:style-name="Table_20_Contents">Запись – запись в регистр AY/YM</text:p>
          </table:table-cell>
        </table:table-row>
      </table:table>
      <text:h text:style-name="P25" text:outline-level="2"><text:bookmark-start text:name="__RefHeading__11955_959909826"/>Порт <text:span text:style-name="T2">Kempston Joystick</text:span><text:bookmark-end text:name="__RefHeading__11955_959909826"/></text:h>
      <text:p text:style-name="P5">Kempston Joystick —<text:span text:style-name="T1"> пятикнопочный манипулятор. 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able:table table:name="Таблица2" table:style-name="Таблица2">
        <table:table-column table:style-name="Таблица2.A"/>
        <table:table-column table:style-name="Таблица2.B"/>
        <table:table-row>
          <table:table-cell table:style-name="Таблица2.A1" office:value-type="string">
            <text:p text:style-name="P37">Порт</text:p>
          </table:table-cell>
          <table:table-cell table:style-name="Таблица2.B1" office:value-type="string">
            <text:p text:style-name="P38">Описание</text:p>
          </table:table-cell>
        </table:table-row>
        <table:table-row>
          <table:table-cell table:style-name="Таблица2.A2" office:value-type="string">
            <text:p text:style-name="P39">#xx1F RO</text:p>
            <text:p text:style-name="P39">noshad</text:p>
          </table:table-cell>
          <table:table-cell table:style-name="Таблица2.B2" office:value-type="string">
            <text:p text:style-name="Table_20_Contents">Чтение значения из порта позволяет получить состояние игрового манипулятора.</text:p>
            <text:p text:style-name="Table_20_Contents">Формат байта полученного значения:</text:p>
            <table:table table:name="Таблица3" table:style-name="Таблица3">
              <table:table-column table:style-name="Таблица3.A" table:number-columns-repeated="7"/>
              <table:table-column table:style-name="Таблица3.H"/>
              <table:table-row>
                <table:table-cell table:style-name="Таблица3.A1" office:value-type="string">
                  <text:p text:style-name="Table_20_Contents"><text:span text:style-name="T2">7: </text:span>0</text:p>
                </table:table-cell>
                <table:table-cell table:style-name="Таблица3.A1" office:value-type="string">
                  <text:p text:style-name="Table_20_Contents"><text:span text:style-name="T2">6: </text:span>0</text:p>
                </table:table-cell>
                <table:table-cell table:style-name="Таблица3.A1" office:value-type="string">
                  <text:p text:style-name="Table_20_Contents"><text:span text:style-name="T2">5: </text:span>0</text:p>
                </table:table-cell>
                <table:table-cell table:style-name="Таблица3.A1" office:value-type="string">
                  <text:p text:style-name="P40">4: Fire</text:p>
                </table:table-cell>
                <table:table-cell table:style-name="Таблица3.A1" office:value-type="string">
                  <text:p text:style-name="P40">3: Up</text:p>
                </table:table-cell>
                <table:table-cell table:style-name="Таблица3.A1" office:value-type="string">
                  <text:p text:style-name="P40">2: Down</text:p>
                </table:table-cell>
                <table:table-cell table:style-name="Таблица3.A1" office:value-type="string">
                  <text:p text:style-name="P40">1: Left</text:p>
                </table:table-cell>
                <table:table-cell table:style-name="Таблица3.H1" office:value-type="string">
                  <text:p text:style-name="P40">0: Right</text:p>
                </table:table-cell>
              </table:table-row>
            </table:table>
            <text:list text:style-name="L27">
              <text:list-item>
                <text:p text:style-name="P179"><text:span text:style-name="T2">Fire – 1: </text:span><text:span text:style-name="T1">нажата кнопка «Огонь» на манипуляторе, 0: не нажата;</text:span></text:p>
              </text:list-item>
              <text:list-item>
                <text:p text:style-name="P179"><text:span text:style-name="T2">Up – 1: </text:span><text:span text:style-name="T1">нажата кнопка «Вверх» на манипуляторе, 0: не нажата;</text:span></text:p>
              </text:list-item>
              <text:list-item>
                <text:p text:style-name="P179"><text:span text:style-name="T2">Down – 1: </text:span><text:span text:style-name="T1">нажата кнопка «Вниз» на манипуляторе, 0: не нажата;</text:span></text:p>
              </text:list-item>
              <text:list-item>
                <text:p text:style-name="P180">Left – 1: <text:span text:style-name="T1">нажата кнопка «Влево» на манипуляторе, 0: не нажата;</text:span></text:p>
              </text:list-item>
              <text:list-item>
                <text:p text:style-name="P180">Right – 1: <text:span text:style-name="T1">нажата кнопка «Вправо» на манипуляторе, 0: не нажата.</text:span></text:p>
              </text:list-item>
            </text:list>
          </table:table-cell>
        </table:table-row>
      </table:table>
      <text:h text:style-name="Heading_20_2" text:outline-level="2"><text:bookmark-start text:name="__RefHeading__12138_959909826"/><text:soft-page-break/><text:span text:style-name="T1">Порты </text:span><text:span text:style-name="T2">Kempston Mouse</text:span><text:bookmark-end text:name="__RefHeading__12138_959909826"/></text:h>
      <text:p text:style-name="P5">Kempston Mouse —<text:span text:style-name="T1"> интерфейс манипулятора типа «мышь»</text:span>. <text:span text:style-name="T1">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ext:p text:style-name="P6">Поддерживаются трехкнопочные мыши, а так же мышь с колесом.</text:p>
      <table:table table:name="Таблица4" table:style-name="Таблица4">
        <table:table-column table:style-name="Таблица4.A"/>
        <table:table-column table:style-name="Таблица4.B"/>
        <table:table-row>
          <table:table-cell table:style-name="Таблица4.A1" office:value-type="string">
            <text:p text:style-name="P37">Порт</text:p>
          </table:table-cell>
          <table:table-cell table:style-name="Таблица4.B1" office:value-type="string">
            <text:p text:style-name="P52">Описание</text:p>
          </table:table-cell>
        </table:table-row>
        <table:table-row>
          <table:table-cell table:style-name="Таблица4.A2" office:value-type="string">
            <text:p text:style-name="P39">#FADF</text:p>
            <text:p text:style-name="P39">RO always</text:p>
          </table:table-cell>
          <table:table-cell table:style-name="Таблица4.B2" office:value-type="string">
            <text:list xml:id="list1358487560" text:style-name="L28">
              <text:list-header>
                <text:p text:style-name="P181">Чтение порта позволяет определить состояние кнопок и получить счетчик поворота колеса.</text:p>
              </text:list-header>
            </text:list>
            <text:p text:style-name="P41">Формат байта полученного значения:</text:p>
            <table:table table:name="Таблица5" table:style-name="Таблица5">
              <table:table-column table:style-name="Таблица5.A"/>
              <table:table-column table:style-name="Таблица5.B" table:number-columns-repeated="3"/>
              <table:table-column table:style-name="Таблица5.E"/>
              <table:table-row>
                <table:table-cell table:style-name="Таблица5.A1" office:value-type="string">
                  <text:p text:style-name="P40">7..4: Wheel counter</text:p>
                </table:table-cell>
                <table:table-cell table:style-name="Таблица5.A1" office:value-type="string">
                  <text:p text:style-name="P40">3: 1</text:p>
                </table:table-cell>
                <table:table-cell table:style-name="Таблица5.A1" office:value-type="string">
                  <text:p text:style-name="P40">2: MMB</text:p>
                </table:table-cell>
                <table:table-cell table:style-name="Таблица5.A1" office:value-type="string">
                  <text:p text:style-name="P40">1: RMB</text:p>
                </table:table-cell>
                <table:table-cell table:style-name="Таблица5.E1" office:value-type="string">
                  <text:p text:style-name="P40">0: LMB</text:p>
                </table:table-cell>
              </table:table-row>
            </table:table>
            <text:list text:style-name="L29">
              <text:list-item>
                <text:p text:style-name="P182">Wheel counter – <text:span text:style-name="T1">счетчик поворота колеса;</text:span></text:p>
              </text:list-item>
              <text:list-item>
                <text:p text:style-name="P182">MMB – 0: <text:span text:style-name="T1">нажата средняя кнопка мыши, 1: не нажата;</text:span></text:p>
              </text:list-item>
              <text:list-item>
                <text:p text:style-name="P183">RMB – 0: нажата правая кнопка мыши, 1: не нажата;</text:p>
              </text:list-item>
              <text:list-item>
                <text:p text:style-name="P183">LMB – 0: нажата левая кнопка мыши, 1: не нажата;</text:p>
              </text:list-item>
            </text:list>
          </table:table-cell>
        </table:table-row>
        <table:table-row>
          <table:table-cell table:style-name="Таблица4.A2" office:value-type="string">
            <text:p text:style-name="P39">#FBDF</text:p>
            <text:p text:style-name="P39">RO</text:p>
            <text:p text:style-name="P39">always</text:p>
          </table:table-cell>
          <table:table-cell table:style-name="Таблица4.B2" office:value-type="string">
            <text:p text:style-name="Table_20_Contents">Чтение порта позволяет определить значение счетчика координаты <text:span text:style-name="T2">X </text:span><text:span text:style-name="T1">положения мыши.</text:span></text:p>
          </table:table-cell>
        </table:table-row>
        <table:table-row>
          <table:table-cell table:style-name="Таблица4.A2" office:value-type="string">
            <text:p text:style-name="P39">#FFDF</text:p>
            <text:p text:style-name="P39">RO</text:p>
            <text:p text:style-name="P39">always</text:p>
          </table:table-cell>
          <table:table-cell table:style-name="Таблица4.B2" office:value-type="string">
            <text:p text:style-name="P41">Чтение порта позволяет определить значение счетчика координаты <text:span text:style-name="T2">Y </text:span>положения мыши.</text:p>
          </table:table-cell>
        </table:table-row>
      </table:table>
      <text:p text:style-name="Text_20_body">В случае если мышь не обнаружена, из портов считывается значение <text:span text:style-name="T19">0xFF</text:span><text:span text:style-name="T2">.</text:span></text:p>
      <text:h text:style-name="Heading_20_2" text:outline-level="2"><text:bookmark-start text:name="__RefHeading__1028_817451688"/><text:span text:style-name="T1">Порты управления часами и </text:span><text:span text:style-name="T2">NVRAM</text:span><text:bookmark-end text:name="__RefHeading__1028_817451688"/></text:h>
      <text:p text:style-name="P6">Доступ и управление часами и <text:span text:style-name="T2">NVRAM </text:span>программно совместим с широкой распространенной в экс-СССР схемой <text:span text:style-name="T2">Gluk Clock </text:span>(основанной на микросхеме К512ВИ1 или <text:span text:style-name="T2">DALLAS 12877, 12877A).</text:span></text:p>
      <table:table table:name="Таблица1" table:style-name="Таблица1">
        <table:table-column table:style-name="Таблица1.A"/>
        <table:table-column table:style-name="Таблица1.B"/>
        <text:soft-page-break/>
        <table:table-row>
          <table:table-cell table:style-name="Таблица1.A1" office:value-type="string">
            <text:p text:style-name="P37">Порт</text:p>
          </table:table-cell>
          <table:table-cell table:style-name="Таблица1.B1" office:value-type="string">
            <text:p text:style-name="P52">Описание</text:p>
          </table:table-cell>
        </table:table-row>
        <table:table-row>
          <table:table-cell table:style-name="Таблица1.A2" office:value-type="string">
            <text:p text:style-name="P39">#EFF7</text:p>
            <text:p text:style-name="P39">WO</text:p>
            <text:p text:style-name="P39">noshad</text:p>
            <text:p text:style-name="P39"/>
          </table:table-cell>
          <table:table-cell table:style-name="Таблица1.B2" office:value-type="string">
            <text:p text:style-name="P41">7ой бит этого порта <text:s/>управляет доступом к ячейкам часов в нетеневом режиме:</text:p>
            <text:list text:continue-list="list1358487560" text:style-name="L28">
              <text:list-item>
                <text:p text:style-name="P184">установка бита 7 — разрешает доступ;</text:p>
              </text:list-item>
              <text:list-item>
                <text:p text:style-name="P184">снятие бита 7 — запрещает доступ.</text:p>
              </text:list-item>
            </text:list>
            <text:p text:style-name="P41">Значение после сброса — 0.</text:p>
            <text:p text:style-name="P41"/>
            <text:p text:style-name="P41"><text:span text:style-name="T3">Внимание!</text:span> Остальные биты этого <text:span text:style-name="T2">write-only</text:span> порта используются для других целей. См. стр. <text:bookmark-ref text:reference-format="page" text:ref-name="__RefHeading__10979_959909826">48</text:bookmark-ref>.</text:p>
          </table:table-cell>
        </table:table-row>
        <table:table-row>
          <table:table-cell table:style-name="Таблица1.A2" office:value-type="string">
            <text:p text:style-name="P39">#DFF7</text:p>
            <text:p text:style-name="P39">WO</text:p>
            <text:p text:style-name="P39">noshad</text:p>
            <text:p text:style-name="P39"/>
            <text:p text:style-name="P39">#DEF7</text:p>
            <text:p text:style-name="P39">WO</text:p>
            <text:p text:style-name="P39">shadow</text:p>
          </table:table-cell>
          <table:table-cell table:style-name="Таблица1.B2" office:value-type="string">
            <text:p text:style-name="P41">Запись в порт устанавливает адрес ячейки <text:span text:style-name="T16">(0</text:span><text:span text:style-name="T19">x00..0xEF</text:span><text:span text:style-name="T16">)</text:span><text:span text:style-name="T19">.</text:span></text:p>
            <text:p text:style-name="P185"/>
            <text:p text:style-name="P41"><text:span text:style-name="T145">Примечание:</text:span><text:span text:style-name="T16"> в теневом режиме порт </text:span><text:span text:style-name="T5">#DEF7</text:span><text:span text:style-name="T19"> </text:span><text:span text:style-name="T16">доступен независимо от состояния бита 7 порта </text:span><text:span text:style-name="T5">#EFF7</text:span><text:span text:style-name="T19">.</text:span></text:p>
          </table:table-cell>
        </table:table-row>
        <table:table-row>
          <table:table-cell table:style-name="Таблица1.A2" office:value-type="string">
            <text:p text:style-name="P39">#BFF7</text:p>
            <text:p text:style-name="P39">RW</text:p>
            <text:p text:style-name="P39">noshad</text:p>
            <text:p text:style-name="P39"/>
            <text:p text:style-name="P39">#BEF7</text:p>
            <text:p text:style-name="P39">RW</text:p>
            <text:p text:style-name="P39">shadow</text:p>
          </table:table-cell>
          <table:table-cell table:style-name="Таблица1.B2" office:value-type="string">
            <text:p text:style-name="P41">Чтение/запись ячейки<text:span text:style-name="T2">.</text:span></text:p>
            <text:p text:style-name="P40"/>
            <text:p text:style-name="P41"><text:span text:style-name="T146">Примечание:</text:span><text:span text:style-name="T19"> в </text:span><text:span text:style-name="T16">теневом</text:span><text:span text:style-name="T19"> </text:span><text:span text:style-name="T16">режиме</text:span><text:span text:style-name="T19"> порт </text:span><text:span text:style-name="T5">#BEF7</text:span><text:span text:style-name="T19"> доступен </text:span><text:span text:style-name="T16">независимо</text:span><text:span text:style-name="T19"> от состояния</text:span><text:span text:style-name="T16"> бита</text:span><text:span text:style-name="T19"> 7 </text:span><text:span text:style-name="T16">порта</text:span><text:span text:style-name="T19"> </text:span><text:span text:style-name="T5">#EFF7</text:span><text:span text:style-name="T19">.</text:span></text:p>
          </table:table-cell>
        </table:table-row>
      </table:table>
      <text:p text:style-name="P6">Так как<text:span text:style-name="T2"> </text:span>часы компьютера <text:span text:style-name="T2">ZX Evolution </text:span>основаны на микросхеме <text:span text:style-name="T2">PCF8583, </text:span>то совместимость обеспечивается путем эмуляции.</text:p>
      <text:p text:style-name="P6">Особенности эмуляции:</text:p>
      <text:list text:style-name="L30">
        <text:list-item>
          <text:p text:style-name="P186"><text:span text:style-name="T1">Поддерживается запись/чтение всех ячеек </text:span><text:span text:style-name="T2">NVRAM </text:span><text:span text:style-name="T1">(</text:span><text:span text:style-name="T19">0x0E...0x</text:span><text:span text:style-name="T11">3</text:span><text:span text:style-name="T19">F</text:span><text:span text:style-name="T2">), </text:span><text:span text:style-name="T1">добавлена возможность доступа к дополнительным пользовательским ячейкам (0</text:span><text:span text:style-name="T2">x40..0xEF);</text:span></text:p>
        </text:list-item>
        <text:list-item>
          <text:p text:style-name="P187">Поддерживаетс<text:span text:style-name="T16">я чтение всех ячеек , несущих дополнительные функции (</text:span><text:span text:style-name="T19">0x00..0x0D</text:span><text:span text:style-name="T16">)</text:span><text:span text:style-name="T19">;</text:span></text:p>
        </text:list-item>
        <text:list-item>
          <text:p text:style-name="P188">Поддерживается запись ячеек, управляющих временем:</text:p>
        </text:list-item>
      </text:list>
      <text:list text:style-name="L31">
        <text:list-item>
          <text:p text:style-name="P189"><text:span text:style-name="T1">0</text:span><text:span text:style-name="T2">x00 – </text:span><text:span text:style-name="T1">регистр секунд;</text:span></text:p>
        </text:list-item>
        <text:list-item>
          <text:p text:style-name="P189"><text:span text:style-name="T1">0</text:span><text:span text:style-name="T2">x02 – </text:span><text:span text:style-name="T1">регистр минут;</text:span></text:p>
        </text:list-item>
        <text:list-item>
          <text:p text:style-name="P189"><text:span text:style-name="T1">0</text:span><text:span text:style-name="T2">x04 – </text:span><text:span text:style-name="T1">регистр часов;</text:span></text:p>
        </text:list-item>
        <text:list-item>
          <text:p text:style-name="P189"><text:span text:style-name="T1">0</text:span><text:span text:style-name="T2">x06 – </text:span><text:span text:style-name="T1">регистр дня недели;</text:span></text:p>
        </text:list-item>
        <text:list-item>
          <text:p text:style-name="P189"><text:span text:style-name="T1">0</text:span><text:span text:style-name="T2">x07 – </text:span><text:span text:style-name="T1">регистр дня месяца;</text:span></text:p>
        </text:list-item>
        <text:list-item>
          <text:p text:style-name="P189"><text:span text:style-name="T1">0</text:span><text:span text:style-name="T2">x08 – </text:span><text:span text:style-name="T1">регистр месяца;</text:span></text:p>
        </text:list-item>
        <text:list-item>
          <text:p text:style-name="P189"><text:span text:style-name="T1">0</text:span><text:span text:style-name="T2">x09 – </text:span><text:span text:style-name="T1">регистр года.</text:span></text:p>
        </text:list-item>
      </text:list>
      <text:list text:style-name="L32">
        <text:list-item>
          <text:p text:style-name="P190"><text:span text:style-name="T1">Статусные ячейки возвращают следующие значения</text:span><text:span text:style-name="T2">:</text:span></text:p>
        </text:list-item>
      </text:list>
      <text:list text:style-name="L33">
        <text:list-item>
          <text:p text:style-name="P191">0<text:span text:style-name="T2">x0A – </text:span>возвращает значение 0<text:span text:style-name="T2">x00;</text:span></text:p>
        </text:list-item>
        <text:list-item>
          <text:p text:style-name="P191">0<text:span text:style-name="T2">x0B – </text:span>возвращает значение 0<text:span text:style-name="T2">x02 (</text:span>доступен на запись — установка бита <text:span text:style-name="T2">data mode);</text:span></text:p>
        </text:list-item>
        <text:list-item>
          <text:p text:style-name="P191"><text:soft-page-break/>0<text:span text:style-name="T2">x0C – </text:span>возвращает значение 0<text:span text:style-name="T2">x00 (</text:span>поддерживается состояние <text:span text:style-name="T2">update flag), </text:span>смотри ниже дополнительные функции регистра <text:span text:style-name="T2">0x0C;</text:span></text:p>
        </text:list-item>
        <text:list-item>
          <text:p text:style-name="P192"><text:span text:style-name="T11">0x0D</text:span><text:span text:style-name="T1"> - возвращает значение 0x80, </text:span><text:span text:style-name="T11">смотри ниже дополнительные функции регистра </text:span><text:span text:style-name="T19">0x0D</text:span><text:span text:style-name="T1">.</text:span></text:p>
        </text:list-item>
      </text:list>
      <text:list text:style-name="L34">
        <text:list-item>
          <text:p text:style-name="P193"><text:span text:style-name="T1">Статусная ячейка 0</text:span><text:span text:style-name="T2">x0A </text:span><text:span text:style-name="T1">имеет дополнительный функционал.<text:line-break/>В эту ячейку записывается адрес страницы </text:span><text:span text:style-name="T2">EEPROM </text:span><text:span text:style-name="T1">(энергонезависимой памяти)</text:span><text:span text:style-name="T2"> ATMEGA128.</text:span></text:p>
        </text:list-item>
      </text:list>
      <text:list text:style-name="L35">
        <text:list-item>
          <text:p text:style-name="P194">Статусная ячейка 0<text:span text:style-name="T2">x0C </text:span>имеет дополнительный функционал.</text:p>
        </text:list-item>
      </text:list>
      <table:table table:name="Таблица14" table:style-name="Таблица14">
        <table:table-column table:style-name="Таблица14.A"/>
        <table:table-column table:style-name="Таблица14.B"/>
        <table:table-column table:style-name="Таблица14.C"/>
        <table:table-row>
          <table:table-cell table:style-name="Таблица14.A1" office:value-type="string">
            <text:p text:style-name="P195">Номер бита</text:p>
          </table:table-cell>
          <table:table-cell table:style-name="Таблица14.A1" office:value-type="string">
            <text:p text:style-name="P195">Название</text:p>
          </table:table-cell>
          <table:table-cell table:style-name="Таблица14.C1" office:value-type="string">
            <text:p text:style-name="P195">Функция</text:p>
          </table:table-cell>
        </table:table-row>
        <table:table-row>
          <table:table-cell table:style-name="Таблица14.A2" office:value-type="float" office:value="0">
            <text:p text:style-name="P196">0</text:p>
          </table:table-cell>
          <table:table-cell table:style-name="Таблица14.B2" office:value-type="string">
            <text:p text:style-name="P197"><text:span text:style-name="T4">Write:</text:span> RESET_PS2_BUF</text:p>
            <text:p text:style-name="P197"><text:span text:style-name="T4">Read:</text:span> NUMLOCK_STATE</text:p>
          </table:table-cell>
          <table:table-cell table:style-name="Таблица14.C2" office:value-type="string">
            <text:p text:style-name="P198"><text:span text:style-name="T4">Запись:</text:span><text:span text:style-name="T16"> Управляет сбросом буфера кодов </text:span><text:span text:style-name="T19">PS/</text:span><text:span text:style-name="T16">2 клавиатуры. В случае если бит установлен в 1, происходит сброс буфера кодов </text:span><text:span text:style-name="T19">PS/2 </text:span><text:span text:style-name="T16">клавиатуры (см. п</text:span><text:span text:style-name="T16"><text:bookmark-ref text:reference-format="chapter" text:ref-name="__RefHeading__4894_476572230">10.6.2</text:bookmark-ref></text:span><text:span text:style-name="T16">).</text:span></text:p>
            <text:p text:style-name="P199"><text:span text:style-name="T9">Чтение: </text:span><text:span text:style-name="T11">Чтение состояния </text:span><text:span text:style-name="T19">Num Lock Led </text:span><text:span text:style-name="T11">на </text:span><text:span text:style-name="T19">PS/2 </text:span><text:span text:style-name="T11">клавиатуре. В случае если бит установлен в 0 — N</text:span><text:span text:style-name="T19">um Lock Led </text:span><text:span text:style-name="T11">не активен, если установлен в 1 - N</text:span><text:span text:style-name="T19">um Lock Led </text:span><text:span text:style-name="T11">активен.</text:span></text:p>
          </table:table-cell>
        </table:table-row>
        <table:table-row>
          <table:table-cell table:style-name="Таблица14.A2" office:value-type="float" office:value="1">
            <text:p text:style-name="P196">1</text:p>
          </table:table-cell>
          <table:table-cell table:style-name="Таблица14.B2" office:value-type="string">
            <text:p text:style-name="P197">CAPS_LOCK_STATE</text:p>
          </table:table-cell>
          <table:table-cell table:style-name="Таблица14.C2" office:value-type="string">
            <text:p text:style-name="P199"><text:span text:style-name="T11">Управляет состоянием </text:span><text:span text:style-name="T19">Caps Lock Led </text:span><text:span text:style-name="T11">на </text:span><text:span text:style-name="T19">PS/2 </text:span><text:span text:style-name="T11">клавиатуре (значение сохраняется). В случае если бит установлен в 0 — </text:span><text:span text:style-name="T19">Caps Lock Led </text:span><text:span text:style-name="T11">не активен, если установлен в 1 - </text:span><text:span text:style-name="T19">Caps Lock Led </text:span><text:span text:style-name="T11">активен.</text:span></text:p>
          </table:table-cell>
        </table:table-row>
        <table:table-row>
          <table:table-cell table:style-name="Таблица14.A2" office:value-type="float" office:value="2">
            <text:p text:style-name="P200">2</text:p>
          </table:table-cell>
          <table:table-cell table:style-name="Таблица14.B2" office:value-type="string">
            <text:p text:style-name="P197"><text:span text:style-name="T4">Read:</text:span> SD_WP_STATE</text:p>
          </table:table-cell>
          <table:table-cell table:style-name="Таблица14.C2" office:value-type="string">
            <text:p text:style-name="P199"><text:span text:style-name="T9">Чтение: </text:span><text:span text:style-name="T1">Чтение состояния </text:span><text:span text:style-name="T2">Write Protect SD </text:span><text:span text:style-name="T1">карты. Если бит установлен в 0 — запись на </text:span><text:span text:style-name="T2">SD </text:span><text:span text:style-name="T1">карту невозможен. Если бит установлен в 1 — <text:s/>запись на </text:span><text:span text:style-name="T2">SD </text:span><text:span text:style-name="T1">карту разрешена .</text:span></text:p>
          </table:table-cell>
        </table:table-row>
        <table:table-row>
          <table:table-cell table:style-name="Таблица14.A2" office:value-type="float" office:value="3">
            <text:p text:style-name="P200">3</text:p>
          </table:table-cell>
          <table:table-cell table:style-name="Таблица14.B2" office:value-type="string">
            <text:p text:style-name="P197"><text:span text:style-name="T4">Read: </text:span><text:span text:style-name="T16">SD_PRESENT</text:span></text:p>
          </table:table-cell>
          <table:table-cell table:style-name="Таблица14.C2" office:value-type="string">
            <text:p text:style-name="P199"><text:span text:style-name="T9">Чтение: </text:span><text:span text:style-name="T11">Статус нахождения </text:span><text:span text:style-name="T19">SD </text:span><text:span text:style-name="T11">карты в разъеме. Если бит установлен в 0 — </text:span><text:span text:style-name="T19">SD </text:span><text:span text:style-name="T11">карта не установлена. Если бит установлен в 1 — </text:span><text:span text:style-name="T19">SD </text:span><text:span text:style-name="T11">карта находится в разъеме.</text:span></text:p>
          </table:table-cell>
        </table:table-row>
        <table:table-row>
          <table:table-cell table:style-name="Таблица14.A2" office:value-type="float" office:value="4">
            <text:p text:style-name="P200">4</text:p>
          </table:table-cell>
          <table:table-cell table:style-name="Таблица14.B2" office:value-type="string">
            <text:p text:style-name="P197"><text:span text:style-name="T4">Read:</text:span> UPDATE_FLAG</text:p>
          </table:table-cell>
          <table:table-cell table:style-name="Таблица14.C2" office:value-type="string">
            <text:p text:style-name="P201"><text:span text:style-name="T9">Чтение: </text:span><text:span text:style-name="T11">Установлен в 1, если изменилось состояние регистров времени </text:span><text:span text:style-name="T16">RTC</text:span>. <text:span text:style-name="T1">0 — состояние не изменилось.</text:span></text:p>
          </table:table-cell>
        </table:table-row>
        <table:table-row>
          <table:table-cell table:style-name="Таблица14.A2" office:value-type="float" office:value="7">
            <text:p text:style-name="P200">7</text:p>
          </table:table-cell>
          <table:table-cell table:style-name="Таблица14.B2" office:value-type="string">
            <text:p text:style-name="P197"><text:span text:style-name="T4">Write: </text:span>ENABLE_EEPROM_READ</text:p>
          </table:table-cell>
          <table:table-cell table:style-name="Таблица14.C2" office:value-type="string">
            <text:p text:style-name="P202"><text:span text:style-name="T4">Запись:</text:span> Управляет доступом к <text:span text:style-name="T2">EEPROM </text:span>(энергонезависимой памяти)<text:span text:style-name="T2"> ATMEGA128. </text:span>В случае если бит установлен в 0 — доступа нет, если установлен в 1 — доступ разрешен.</text:p>
          </table:table-cell>
        </table:table-row>
      </table:table>
      <text:list text:style-name="L36">
        <text:list-item>
          <text:p text:style-name="P203"><text:span text:style-name="T1">Статусная ячейка 0</text:span><text:span text:style-name="T2">x0D </text:span><text:span text:style-name="T1">имеет дополнительный функционал.</text:span></text:p>
        </text:list-item>
      </text:list>
      <table:table table:name="Таблица13" table:style-name="Таблица13">
        <table:table-column table:style-name="Таблица13.A"/>
        <table:table-column table:style-name="Таблица13.B"/>
        <table:table-column table:style-name="Таблица13.C"/>
        <table:table-row>
          <table:table-cell table:style-name="Таблица13.A1" office:value-type="string">
            <text:p text:style-name="P195">Номер бита</text:p>
          </table:table-cell>
          <table:table-cell table:style-name="Таблица13.A1" office:value-type="string">
            <text:p text:style-name="P195">Название</text:p>
          </table:table-cell>
          <table:table-cell table:style-name="Таблица13.C1" office:value-type="string">
            <text:p text:style-name="P195">Функция</text:p>
          </table:table-cell>
        </table:table-row>
        <table:table-row>
          <table:table-cell table:style-name="Таблица13.A2" office:value-type="float" office:value="0">
            <text:p text:style-name="P196">0</text:p>
          </table:table-cell>
          <table:table-cell table:style-name="Таблица13.B2" office:value-type="string">
            <text:p text:style-name="P197"><text:span text:style-name="T4">Read: </text:span>LEFT_CTRL_STATE</text:p>
          </table:table-cell>
          <table:table-cell table:style-name="Таблица13.C2" office:value-type="string">
            <text:p text:style-name="P199"><text:span text:style-name="T9">Чтение: </text:span><text:span text:style-name="T1">Чтение состояния клавиши </text:span><text:span text:style-name="T2">Left Ctrl </text:span><text:span text:style-name="T1">клавиатуры </text:span><text:span text:style-name="T2">PS/2. </text:span><text:span text:style-name="T1">Если бит установлен в </text:span><text:span text:style-name="T2">0 – </text:span><text:soft-page-break/><text:span text:style-name="T1">клавиша не нажата. Если бит установлен в 1 — клавиша нажата.</text:span></text:p>
          </table:table-cell>
        </table:table-row>
        <table:table-row>
          <table:table-cell table:style-name="Таблица13.A2" office:value-type="float" office:value="1">
            <text:p text:style-name="P196">1</text:p>
          </table:table-cell>
          <table:table-cell table:style-name="Таблица13.B2" office:value-type="string">
            <text:p text:style-name="P197"><text:span text:style-name="T4">Read: </text:span>RIGHT_CTRL_STATE</text:p>
          </table:table-cell>
          <table:table-cell table:style-name="Таблица13.C2" office:value-type="string">
            <text:p text:style-name="P199"><text:span text:style-name="T9">Чтение: </text:span><text:span text:style-name="T1">Чтение состояния клавиши R</text:span><text:span text:style-name="T2">ight Ctrl </text:span><text:span text:style-name="T1">клавиатуры </text:span><text:span text:style-name="T2">PS/2. </text:span><text:span text:style-name="T1">Если бит установлен в </text:span><text:span text:style-name="T2">0 – </text:span><text:span text:style-name="T1">клавиша не нажата. Если бит установлен в 1 — клавиша нажата.</text:span></text:p>
          </table:table-cell>
        </table:table-row>
        <table:table-row>
          <table:table-cell table:style-name="Таблица13.A2" office:value-type="float" office:value="2">
            <text:p text:style-name="P200">2</text:p>
          </table:table-cell>
          <table:table-cell table:style-name="Таблица13.B2" office:value-type="string">
            <text:p text:style-name="P197"><text:span text:style-name="T4">Read: </text:span>LEFT_ALT_STATE</text:p>
          </table:table-cell>
          <table:table-cell table:style-name="Таблица13.C2" office:value-type="string">
            <text:p text:style-name="P199"><text:span text:style-name="T9">Чтение: </text:span><text:span text:style-name="T1">Чтение состояния клавиши L</text:span><text:span text:style-name="T2">eft Alt </text:span><text:span text:style-name="T1">клавиатуры </text:span><text:span text:style-name="T2">PS/2. </text:span><text:span text:style-name="T1">Если бит установлен в </text:span><text:span text:style-name="T2">0 – </text:span><text:span text:style-name="T1">клавиша не нажата. Если бит установлен в 1 — клавиша нажата.</text:span></text:p>
          </table:table-cell>
        </table:table-row>
        <table:table-row>
          <table:table-cell table:style-name="Таблица13.A2" office:value-type="float" office:value="3">
            <text:p text:style-name="P200">3</text:p>
          </table:table-cell>
          <table:table-cell table:style-name="Таблица13.B2" office:value-type="string">
            <text:p text:style-name="P197"><text:span text:style-name="T4">Read: </text:span>RIGHT_ALT_STATE</text:p>
          </table:table-cell>
          <table:table-cell table:style-name="Таблица13.C2" office:value-type="string">
            <text:p text:style-name="P199"><text:span text:style-name="T9">Чтение: </text:span><text:span text:style-name="T1">Чтение состояния клавиши R</text:span><text:span text:style-name="T2">ight Alt [Alt Gr] </text:span><text:span text:style-name="T1">клавиатуры </text:span><text:span text:style-name="T2">PS/2. </text:span><text:span text:style-name="T1">Если бит установлен в </text:span><text:span text:style-name="T2">0 – </text:span><text:span text:style-name="T1">клавиша не нажата. Если бит установлен в 1 — клавиша нажата.</text:span></text:p>
          </table:table-cell>
        </table:table-row>
        <table:table-row>
          <table:table-cell table:style-name="Таблица13.A2" office:value-type="float" office:value="4">
            <text:p text:style-name="P200">4</text:p>
          </table:table-cell>
          <table:table-cell table:style-name="Таблица13.B2" office:value-type="string">
            <text:p text:style-name="P197"><text:span text:style-name="T4">Read: </text:span>LEFT_SHIFT_STATE</text:p>
          </table:table-cell>
          <table:table-cell table:style-name="Таблица13.C2" office:value-type="string">
            <text:p text:style-name="P201"><text:span text:style-name="T9">Чтение: </text:span><text:span text:style-name="T1">Чтение состояния клавиши </text:span>Left Shift <text:span text:style-name="T1">клавиатуры </text:span>PS/2. <text:span text:style-name="T1">Если бит установлен в </text:span>0 – <text:span text:style-name="T1">клавиша не нажата. Если бит установлен в 1 — клавиша нажата.</text:span></text:p>
          </table:table-cell>
        </table:table-row>
        <table:table-row>
          <table:table-cell table:style-name="Таблица13.A2" office:value-type="float" office:value="5">
            <text:p text:style-name="P200">5</text:p>
          </table:table-cell>
          <table:table-cell table:style-name="Таблица13.B2" office:value-type="string">
            <text:p text:style-name="P197"><text:span text:style-name="T4">Read: </text:span>RIGHT_SHIFT_STATE</text:p>
          </table:table-cell>
          <table:table-cell table:style-name="Таблица13.C2" office:value-type="string">
            <text:p text:style-name="P201"><text:span text:style-name="T9">Чтение: </text:span><text:span text:style-name="T1">Чтение состояния клавиши R</text:span>ight Shift <text:span text:style-name="T1">клавиатуры </text:span>PS/2. <text:span text:style-name="T1">Если бит установлен в </text:span>0 – <text:span text:style-name="T1">клавиша не нажата. Если бит установлен в 1 — клавиша нажата.</text:span></text:p>
          </table:table-cell>
        </table:table-row>
        <table:table-row>
          <table:table-cell table:style-name="Таблица13.A2" office:value-type="float" office:value="6">
            <text:p text:style-name="P200">6</text:p>
          </table:table-cell>
          <table:table-cell table:style-name="Таблица13.B2" office:value-type="string">
            <text:p text:style-name="P197"><text:span text:style-name="T4">Read: </text:span>F12_STATE</text:p>
          </table:table-cell>
          <table:table-cell table:style-name="Таблица13.C2" office:value-type="string">
            <text:p text:style-name="P201"><text:span text:style-name="T9">Чтение: </text:span><text:span text:style-name="T1">Чтение состояния клавиши F</text:span>12 <text:span text:style-name="T1">клавиатуры </text:span>PS/2. <text:span text:style-name="T1">Если бит установлен в </text:span>0 – <text:span text:style-name="T1">клавиша не нажата. Если бит установлен в 1 — клавиша нажата.</text:span></text:p>
          </table:table-cell>
        </table:table-row>
        <table:table-row>
          <table:table-cell table:style-name="Таблица13.A2" office:value-type="float" office:value="7">
            <text:p text:style-name="P200">7</text:p>
          </table:table-cell>
          <table:table-cell table:style-name="Таблица13.B2" office:value-type="string">
            <text:p text:style-name="P195"/>
          </table:table-cell>
          <table:table-cell table:style-name="Таблица13.C2" office:value-type="string">
            <text:p text:style-name="P202"><text:span text:style-name="T4">Чтение:</text:span> Всегда возвращается значение 1</text:p>
          </table:table-cell>
        </table:table-row>
      </table:table>
      <text:list text:style-name="L37">
        <text:list-item>
          <text:p text:style-name="P204"><text:span text:style-name="T1">Операция чтения значения ячейки является вайтовой и занимает небольшое кол-во тактов (чтение происходит из внутренних регистров </text:span><text:span text:style-name="T2">ATMEGA</text:span><text:span text:style-name="T1">128, дублирующих значения в </text:span><text:span text:style-name="T2">PCF</text:span><text:span text:style-name="T1">8583); </text:span></text:p>
        </text:list-item>
        <text:list-item>
          <text:p text:style-name="P204"><text:span text:style-name="T1">Операции записи значения ячейки является вайтовой и занимает достаточно большое кол-во тактов (цикл записи в ячейку включает этап записи значения в </text:span><text:span text:style-name="T2">PCF</text:span><text:span text:style-name="T1">8583).</text:span></text:p>
        </text:list-item>
      </text:list>
      <text:h text:style-name="Heading_20_3" text:outline-level="3"><text:bookmark-start text:name="__RefHeading__20501_459111283"/>Чтение версии базовой конфигурации/бутлоадера.<text:bookmark-end text:name="__RefHeading__20501_459111283"/></text:h>
      <text:p text:style-name="P6">Прикладное ПО имеет возможность считывать версию<text:span text:style-name="T2">/</text:span>название базовой конфигурации и бутлоадера <text:span text:style-name="T2">ZX Evolution. </text:span>Обращение к этому функционалу происходит через порты управления часами и <text:span text:style-name="T2">NVRAM (</text:span>см. п<text:bookmark-ref text:reference-format="chapter" text:ref-name="__RefHeading__1028_817451688">10.6</text:bookmark-ref>) так, как будто это расширение функционала эмулируемой м/сх 12877.</text:p>
      <text:p text:style-name="P5"><text:span text:style-name="T8">Внимание!</text:span><text:span text:style-name="T1"> Доступ возможен если бит управляющий доступом к </text:span>EEPROM <text:span text:style-name="T1">установлен в 0 (т. е. если отключен доступо к </text:span>EEPROM)<text:span text:style-name="T1">.</text:span></text:p>
      <text:p text:style-name="P6"><text:soft-page-break/>Записью значен<text:span text:style-name="T16">ия в любую из ячеек с адресами 0</text:span><text:span text:style-name="T19">xF0..0xFF </text:span><text:span text:style-name="T16">можно выбрать, что будет считываться. Допустимы следующие значения:</text:span></text:p>
      <text:list text:style-name="L38">
        <text:list-item>
          <text:p text:style-name="P205">0 — версия базовой конфигурации;</text:p>
        </text:list-item>
        <text:list-item>
          <text:p text:style-name="P205">1 — версия бутлоадера.</text:p>
        </text:list-item>
      </text:list>
      <text:p text:style-name="P206"><text:span text:style-name="T1">Длина данных версии составляет 16 байт (соответственно ячейки </text:span><text:span text:style-name="T2">0xF0..0xFF) </text:span><text:span text:style-name="T1">и имеет следующий формат:</text:span></text:p>
      <text:list text:style-name="L39">
        <text:list-item>
          <text:p text:style-name="P207"><text:span text:style-name="T1">0</text:span><text:span text:style-name="T2">xF0..0xFB – 12 </text:span><text:span text:style-name="T1">байт, название версии в кодировке ASCII (если название короче 12 байт, то дополняется нулями);</text:span></text:p>
        </text:list-item>
        <text:list-item>
          <text:p text:style-name="P207"><text:span text:style-name="T1">0</text:span><text:span text:style-name="T2">xFC..0xFD – 2 </text:span><text:span text:style-name="T1">байт </text:span><text:span text:style-name="T2">(little endian), </text:span><text:span text:style-name="T1">дата и бит релиза (если бит не установлен, то считается, что версия тестовая </text:span><text:span text:style-name="T2">beta);</text:span></text:p>
        </text:list-item>
        <text:list-item>
          <text:p text:style-name="P207"><text:span text:style-name="T2">0xFE..0xFF – 2 </text:span><text:span text:style-name="T1">байт </text:span><text:span text:style-name="T2">(little endian), CRC </text:span><text:span text:style-name="T1">значение прошивки. </text:span><text:span text:style-name="T2">CRC </text:span><text:span text:style-name="T1">считается для файла прошивки </text:span><text:span text:style-name="T2">AVR </text:span><text:span text:style-name="T1">(</text:span><text:span text:style-name="T2">zxevo_fw.bin) </text:span><text:span text:style-name="T1">и не имеет практического смысла для </text:span><text:span text:style-name="T2">Z80.</text:span></text:p>
        </text:list-item>
      </text:list>
      <text:p text:style-name="P58">Формат упаковки даты и бита релиза:</text:p>
      <text:list text:style-name="L40">
        <text:list-item>
          <text:p text:style-name="P208"><text:span text:style-name="T1">7 бит 0</text:span><text:span text:style-name="T2">xFD – 0</text:span><text:span text:style-name="T1">:</text:span><text:span text:style-name="T2"> <text:s/></text:span><text:span text:style-name="T1">тестовая версия; 1: официальный релиз;</text:span></text:p>
        </text:list-item>
        <text:list-item>
          <text:p text:style-name="P209">6..1 <text:span text:style-name="T1">биты 0</text:span>xFD – <text:span text:style-name="T1">год выпуска релиза, значения 0..63 соответствуют 2000..2063 годам;</text:span></text:p>
        </text:list-item>
        <text:list-item>
          <text:p text:style-name="P209"><text:span text:style-name="T1">0 бит </text:span>0xFD <text:span text:style-name="T1">и 7..5 биты </text:span>0xFC – <text:span text:style-name="T1">месяц выпуска релиза (допустимые значения: 1..12);</text:span></text:p>
        </text:list-item>
        <text:list-item>
          <text:p text:style-name="P209"><text:span text:style-name="T1">4..0 биты </text:span>0xFC – <text:span text:style-name="T1">день выпуска релиза (допустимые значения: 1..31).</text:span></text:p>
        </text:list-item>
      </text:list>
      <text:p text:style-name="P210">Пример:</text:p>
      <text:p text:style-name="P211"><text:tab/>50 65 6E 74 31 6D 00 00 00 00 00 00 7B 14 3C B1</text:p>
      <text:p text:style-name="Text_20_body"><text:span text:style-name="T147">50 65 6E 74 31 6</text:span><text:span text:style-name="T13">D 00 00 00 00 00 00</text:span><text:span text:style-name="T1"> — строка </text:span><text:span text:style-name="T2">«Pent1m»;</text:span></text:p>
      <text:p text:style-name="Text_20_body"><text:span text:style-name="T15">7B 14</text:span><text:span text:style-name="T2"> – число #147B </text:span><text:span text:style-name="T1">или</text:span><text:span text:style-name="T2"> %</text:span><text:span text:style-name="T148">0</text:span><text:span text:style-name="T149">001</text:span><text:span text:style-name="T2">_</text:span><text:span text:style-name="T149">010</text:span><text:span text:style-name="T150">0</text:span><text:span text:style-name="T2">_</text:span><text:span text:style-name="T150">011</text:span><text:span text:style-name="T151">1</text:span><text:span text:style-name="T2">_</text:span><text:span text:style-name="T151">1011</text:span><text:span text:style-name="T2">: beta, 10 </text:span><text:span text:style-name="T1">год, 03 месяц, 27 день (27.03.2010);</text:span></text:p>
      <text:p text:style-name="Text_20_body"><text:span text:style-name="T13">3C B1</text:span><text:span text:style-name="T1"> — число #B13C, </text:span><text:span text:style-name="T2">CRC.</text:span></text:p>
      <text:h text:style-name="Heading_20_3" text:outline-level="3"><text:bookmark-start text:name="__RefHeading__4894_476572230"/>Доступ к <text:span text:style-name="T2">PS/2 </text:span><text:span text:style-name="T1">клавиатуре</text:span><text:span text:style-name="T2">.</text:span><text:bookmark-end text:name="__RefHeading__4894_476572230"/></text:h>
      <text:p text:style-name="Text_20_body"><text:span text:style-name="T1">Прикладное ПО имеет возможность считывать коды </text:span><text:span text:style-name="T2">PS/2 </text:span><text:span text:style-name="T1">клавиатуры напрямую. Обращение к этому функционалу происходит через порты управления часами и NVRAM (см. п</text:span><text:span text:style-name="T1"><text:bookmark-ref text:reference-format="chapter" text:ref-name="__RefHeading__1028_817451688">10.6</text:bookmark-ref></text:span><text:span text:style-name="T1">) так, как будто это расширение функционала эмулируемой м/сх 12877.</text:span></text:p>
      <text:p text:style-name="P5"><text:span text:style-name="T8">Внимание!</text:span><text:span text:style-name="T1"> Доступ возможен если бит управляющий доступом к EEPROM установлен в 0 (т. е. если отключен доступ к EEPROM).</text:span></text:p>
      <text:p text:style-name="P6">Записью значен<text:span text:style-name="T16">ия </text:span><text:span text:style-name="T19">2</text:span><text:span text:style-name="T16"> в любую из ячеек с адресами 0</text:span><text:span text:style-name="T19">xF0..0xFF </text:span><text:span text:style-name="T16">включает режим доступа к буферу кодов </text:span><text:span text:style-name="T19">PS/2</text:span><text:span text:style-name="T16"> клавиатуры.</text:span></text:p>
      <text:p text:style-name="P6"><text:span text:style-name="T16">Путем чтения с адресами 0</text:span><text:span text:style-name="T19">xF0..0xFF </text:span><text:span text:style-name="T16">можно получить значения из буфера кодов </text:span><text:span text:style-name="T19">PS/2 </text:span><text:span text:style-name="T16">клавиатуры, при этом считанное значение удаляется из буфера. Если буфер кодов </text:span><text:span text:style-name="T19">PS/2</text:span><text:span text:style-name="T16"> клавиатуры пуст, то возвращается значение 0. Если буфер кодов </text:span><text:span text:style-name="T19">PS/2 </text:span><text:span text:style-name="T16">клавиатуры переполнен, то возвращается значение 0</text:span><text:span text:style-name="T19">xFF. </text:span><text:span text:style-name="T16">В случае переполнения буфера рекомендуется его сбросить <text:s/></text:span><text:span text:style-name="T19">(</text:span><text:span text:style-name="T16">путем записи значения </text:span><text:span text:style-name="T19">1</text:span><text:span text:style-name="T16"> в ячейку с адресом 0</text:span><text:span text:style-name="T19">x0C</text:span><text:span text:style-name="T16">)</text:span><text:span text:style-name="T19">.</text:span></text:p>
      <text:p text:style-name="P6"><text:span text:style-name="T4">Внимание!</text:span><text:span text:style-name="T16"> В буфер кодов </text:span><text:span text:style-name="T19">PS/2 </text:span><text:span text:style-name="T16">клавиатуры записываются коды клавиш не длиннее двух байт (трех байт, если с префиксом отпускания клавиш).</text:span></text:p>
      <text:h text:style-name="P212" text:outline-level="3"><text:bookmark-start text:name="__RefHeading__6908_304593484"/><text:soft-page-break/>Доступ к <text:span text:style-name="T2">EEPROM </text:span>(энергонезависимой памяти) <text:span text:style-name="T2">ATMEGA128.</text:span><text:bookmark-end text:name="__RefHeading__6908_304593484"/></text:h>
      <text:p text:style-name="P206"><text:span text:style-name="T1">Прикладное ПО имеет возможность считывать/записывать </text:span><text:span text:style-name="T2">EEPROM</text:span><text:span text:style-name="T1"> (энергонезависимую память) ATMEGA128 напрямую. Обращение к этому функционалу происходит через порты управления часами и NVRAM (см. п</text:span><text:span text:style-name="T1"><text:bookmark-ref text:reference-format="chapter" text:ref-name="__RefHeading__1028_817451688">10.6</text:bookmark-ref></text:span><text:span text:style-name="T1">) так, как будто это расширение функционала эмулируемой м/сх 12877.</text:span></text:p>
      <text:p text:style-name="P213"><text:span text:style-name="T8">Внимание!</text:span><text:span text:style-name="T1"> Доступ возможен если бит управляющий доступом к EEPROM установлен в 1 (т. е. если включен доступ к EEPROM).</text:span></text:p>
      <text:p text:style-name="P213"><text:span text:style-name="T1">Управляет доступом к </text:span>EEPROM <text:span text:style-name="T1">7ой бит статусной ячейки </text:span>0x0С <text:span text:style-name="T1">(см. п</text:span><text:span text:style-name="T1"><text:bookmark-ref text:reference-format="chapter" text:ref-name="__RefHeading__1028_817451688">10.6</text:bookmark-ref></text:span><text:span text:style-name="T1">).</text:span></text:p>
      <text:p text:style-name="P213">EEPROM <text:span text:style-name="T1">доступен через ячейки с адресами 0</text:span>xF0..0xFF <text:span text:style-name="T1">(т. е. без переключения адреса можно прочитать/считать 16 ячеек или одну страницу </text:span>EEPROM<text:span text:style-name="T1"> размером 16 байт).</text:span></text:p>
      <text:p text:style-name="P213"><text:span text:style-name="T1">Адрес страницы </text:span>EEPROM <text:span text:style-name="T1">записывается <text:s/>в статусную ячейку </text:span>0x0A <text:s/><text:span text:style-name="T1">(см. п</text:span><text:span text:style-name="T1"><text:bookmark-ref text:reference-format="chapter" text:ref-name="__RefHeading__1028_817451688">10.6</text:bookmark-ref></text:span><text:span text:style-name="T1">).</text:span></text:p>
      <text:p text:style-name="P58">Полный адрес ячейки <text:span text:style-name="T2">EEPROM </text:span>рассчитывается по следующей формуле:</text:p>
      <text:p text:style-name="P214"><text:span text:style-name="T2">(</text:span>содержимое статусной ячейки 0<text:span text:style-name="T2">x0A:</text:span>адрес страницы<text:span text:style-name="T2">)*16 + (0..F:</text:span>номер ячейки)</text:p>
      <text:p text:style-name="P58">т. е. например, для доступа к ячейке <text:span text:style-name="T2">EEPROM </text:span>с адресом 1025 нужно:</text:p>
      <text:list text:style-name="L41">
        <text:list-item>
          <text:p text:style-name="P215">записать 64 в статусную ячейку <text:span text:style-name="T2">0x0A;</text:span></text:p>
        </text:list-item>
        <text:list-item>
          <text:p text:style-name="P215">записать/считать значение ячейки <text:span text:style-name="T2">0xF1.</text:span></text:p>
        </text:list-item>
      </text:list>
      <text:h text:style-name="P216" text:outline-level="3"><text:bookmark-start text:name="__RefHeading__7146_1922218393"/><text:span text:style-name="T152">Доступ к </text:span><text:span text:style-name="T153">флагам состояния конфигурации компьютера</text:span><text:span text:style-name="T152">.</text:span><text:bookmark-end text:name="__RefHeading__7146_1922218393"/></text:h>
      <text:p text:style-name="P217"><text:span text:style-name="T1">Обращение к </text:span><text:span text:style-name="T153">данн</text:span><text:span text:style-name="T1">ому функционалу происходит через порты управления часами и NVRAM (см. п</text:span><text:span text:style-name="T1"><text:bookmark-ref text:reference-format="chapter" text:ref-name="__RefHeading__1028_817451688">10.6</text:bookmark-ref></text:span><text:span text:style-name="T1">) так, как будто это расширение функционала эмулируемой м/сх 12877.</text:span></text:p>
      <text:p text:style-name="P218"><text:span text:style-name="T8">Внимание!</text:span><text:span text:style-name="T1"> Доступ возможен если бит управляющий доступом к EEPROM установлен в 0 (т. е. если отключен доступ к EEPROM).</text:span></text:p>
      <text:p text:style-name="P219">Записью значен<text:span text:style-name="T16">ия </text:span><text:span text:style-name="T154">3</text:span><text:span text:style-name="T16"> в любую из ячеек с адресами 0</text:span><text:span text:style-name="T19">xF0..0xFF </text:span><text:span text:style-name="T16">включает режим доступа к </text:span><text:span text:style-name="T155">флагам AVR</text:span><text:span text:style-name="T16">.</text:span></text:p>
      <text:p text:style-name="P220">Чтение ячейки 0xF0 – «modes_register» со следующими битами:</text:p>
      <table:table table:name="Table35" table:style-name="Table35">
        <table:table-column table:style-name="Table35.A" table:number-columns-repeated="3"/>
        <table:table-row>
          <table:table-cell table:style-name="Table35.A1" office:value-type="string">
            <text:p text:style-name="P221">Номер бита</text:p>
          </table:table-cell>
          <table:table-cell table:style-name="Table35.A1" office:value-type="string">
            <text:p text:style-name="P221">Название бита</text:p>
          </table:table-cell>
          <table:table-cell table:style-name="Table35.C1" office:value-type="string">
            <text:p text:style-name="P221">Функция</text:p>
          </table:table-cell>
        </table:table-row>
        <table:table-row>
          <table:table-cell table:style-name="Table35.A2" office:value-type="string">
            <text:p text:style-name="P221">0</text:p>
          </table:table-cell>
          <table:table-cell table:style-name="Table35.A2" office:value-type="string">
            <text:p text:style-name="P221">MODE_VGA</text:p>
          </table:table-cell>
          <table:table-cell table:style-name="Table35.C2" office:value-type="string">
            <text:p text:style-name="P221">1 – VGA-режим (31kHz), 0 – ТВ-режим (15 kHz)</text:p>
          </table:table-cell>
        </table:table-row>
        <table:table-row>
          <table:table-cell table:style-name="Table35.A2" office:value-type="string">
            <text:p text:style-name="P221">1</text:p>
          </table:table-cell>
          <table:table-cell table:style-name="Table35.A2" office:value-type="string">
            <text:p text:style-name="P221">MODE_TAPEOUT</text:p>
          </table:table-cell>
          <table:table-cell table:style-name="Table35.C2" office:value-type="string">
            <text:p text:style-name="P221">0 – звучит бипер или ковокс, 1 – звучит tape out</text:p>
          </table:table-cell>
        </table:table-row>
        <table:table-row>
          <table:table-cell table:style-name="Table35.A2" office:value-type="string">
            <text:p text:style-name="P221">4</text:p>
          </table:table-cell>
          <table:table-cell table:style-name="Table35.A2" office:value-type="string">
            <text:p text:style-name="P221">MODE_60HZ</text:p>
          </table:table-cell>
          <table:table-cell table:style-name="Table35.C2" office:value-type="string">
            <text:p text:style-name="P221">0 – кадровая 50 Hz, 1 – кадровая 60 Hz</text:p>
          </table:table-cell>
        </table:table-row>
      </table:table>
      <text:p text:style-name="P220"/>
      <text:p text:style-name="P220">Не описанные выше биты и ячейки – зарезервированы.</text:p>
      <text:h text:style-name="P222" text:outline-level="2"><text:bookmark-start text:name="__RefHeading__12239_959909826"/>Доступ к SD-карте.<text:bookmark-end text:name="__RefHeading__12239_959909826"/></text:h>
      <text:p text:style-name="P6">Происходит аналогично доступу в Z-контроллере от КОЕ. В обычном режиме:</text:p>
      <table:table table:name="Table1" table:style-name="Table1">
        <table:table-column table:style-name="Table1.A"/>
        <table:table-column table:style-name="Table1.B"/>
        <table:table-row>
          <table:table-cell table:style-name="Table1.A1" office:value-type="string">
            <text:p text:style-name="P37">Порт</text:p>
          </table:table-cell>
          <table:table-cell table:style-name="Table1.B1" office:value-type="string">
            <text:p text:style-name="P38">Описание</text:p>
          </table:table-cell>
        </table:table-row>
        <table:table-row>
          <table:table-cell table:style-name="Table1.A2" office:value-type="string">
            <text:p text:style-name="P39">#xx77</text:p>
            <text:p text:style-name="P39">RW noshad</text:p>
          </table:table-cell>
          <table:table-cell table:style-name="Table1.B2" office:value-type="string">
            <text:p text:style-name="Table_20_Contents">Запись: управление сигналом CS на SD-карту:</text:p>
            <table:table table:name="Table5" table:style-name="Table5">
              <table:table-column table:style-name="Table5.A" table:number-columns-repeated="3"/>
              <table:table-row>
                <table:table-cell table:style-name="Table5.A1" office:value-type="string">
                  <text:p text:style-name="Table_20_Contents">Биты 7..2: устанавливайте в 0 для совместимости</text:p>
                </table:table-cell>
                <table:table-cell table:style-name="Table5.A1" office:value-type="string">
                  <text:p text:style-name="Table_20_Contents">Бит 1: сигнал CS, 1 после сброса, устанавливать в 0 для выбора SD-карты</text:p>
                </table:table-cell>
                <table:table-cell table:style-name="Table5.C1" office:value-type="string">
                  <text:p text:style-name="Table_20_Contents">Бит 0: устанавливайте в 1 для совместимости с Z-контроллером</text:p>
                </table:table-cell>
              </table:table-row>
            </table:table>
            <text:p text:style-name="Table_20_Contents"/>
            <text:p text:style-name="Table_20_Contents">Чтение: всегда 0 (карта всегда вставлена и в режиме R/W — в соответствии с интерпретацией в Z-контроллере). Реальное наличие карты следует проверять попыткой её инициализации с таймаутом.</text:p>
          </table:table-cell>
        </table:table-row>
        <table:table-row>
          <table:table-cell table:style-name="Table1.A2" office:value-type="string">
            <text:p text:style-name="P39">#xx57</text:p>
            <text:p text:style-name="P39">RW</text:p>
            <text:p text:style-name="P39">noshad</text:p>
          </table:table-cell>
          <table:table-cell table:style-name="Table1.B2" office:value-type="string">
            <text:p text:style-name="Table_20_Contents">Запись: отсылка байта в SD-карту по SPI, одновременно принятый байт можно в дальнейшем считать из этого же порта.</text:p>
            <text:p text:style-name="Table_20_Contents"/>
            <text:p text:style-name="Table_20_Contents">Чтение: считать ранее принятый байт, отослать #FF в карту. Вновь принятый байт доступен при повторном чтении.</text:p>
          </table:table-cell>
        </table:table-row>
      </table:table>
      <text:p text:style-name="P223"/>
      <text:p text:style-name="P6">Примечание: в цикле обмена по SPI, инициируемом <text:span text:style-name="T3">записью или чтением</text:span> порта <text:span text:style-name="T4">#xx57</text:span>, происходит <text:span text:style-name="T3">одновременно</text:span> отсылка байта в SD-карту и приём байта от неё. Отсылаемый байт тот же, что записан в этот порт (если цикл обмена инициирован записью), или #FF, если цикл обмена инициирован чтением порта.</text:p>
      <text:p text:style-name="P6">Принятый байт запоминается во внутреннем буфере и доступен для последующего чтения из этого же порта. Данное чтение вновь инициирует цикл обмена и т. д.</text:p>
      <text:p text:style-name="P6">Допускается читать/писать порт <text:span text:style-name="T4">#xx57</text:span> командами <text:span text:style-name="T126">INIR</text:span> и <text:span text:style-name="T126">OTIR</text:span>. Пример чтения сектора:<text:line-break/><text:span text:style-name="T126"><text:tab/>LD<text:tab/>C,#57<text:line-break/><text:tab/>LD<text:tab/>B,0<text:line-break/><text:tab/>INIR<text:line-break/><text:tab/>INIR</text:span></text:p>
      <text:p text:style-name="P6">SD-карта также доступна в shadow-режиме. В этом режиме порт <text:span text:style-name="T4">#xx77</text:span> используется для других целей, потому остаётся только порт <text:span text:style-name="T4">#xx57</text:span> и адресация меняется следующим образом.</text:p>
      <table:table table:name="Table3" table:style-name="Table3">
        <table:table-column table:style-name="Table3.A"/>
        <table:table-column table:style-name="Table3.B"/>
        <table:table-row>
          <table:table-cell table:style-name="Table3.A1" office:value-type="string">
            <text:p text:style-name="P37">Порт</text:p>
          </table:table-cell>
          <table:table-cell table:style-name="Table3.B1" office:value-type="string">
            <text:p text:style-name="P38">Описание</text:p>
          </table:table-cell>
        </table:table-row>
        <table:table-row>
          <table:table-cell table:style-name="Table3.A2" office:value-type="string">
            <text:p text:style-name="P39">#xx57</text:p>
            <text:p text:style-name="P39">RW</text:p>
            <text:p text:style-name="P39">shadow</text:p>
          </table:table-cell>
          <table:table-cell table:style-name="Table3.B2" office:value-type="string">
            <text:p text:style-name="Table_20_Contents">Запись: если A15=<text:span text:style-name="T2">0</text:span>, то отсылка байта в SD-карту по SPI, одновременно принятый байт можно в дальнейшем считать из этого же порта — аналогично записи в <text:span text:style-name="T4">#xx57</text:span> в noshad-режиме. Если A15=<text:span text:style-name="T2">1</text:span> — управление сигналом CS, аналогично записи в <text:span text:style-name="T4">#xx77</text:span> в noshad-режиме.</text:p>
            <text:p text:style-name="Table_20_Contents"/>
            <text:p text:style-name="Table_20_Contents">Чтение: считать ранее принятый байт, отослать #FF в карту. Вновь принятый байт доступен при повторном чтении. Чтение полностью аналогично noshad-режиму.</text:p>
          </table:table-cell>
        </table:table-row>
      </table:table>
      <text:p text:style-name="P53"/>
      <text:p text:style-name="P224">Таким образом полноценный доступ к SD-карте сохраняется и в shadow-режиме. Запись командой <text:span text:style-name="T126">OTIR</text:span> 512 байт выглядит так (<text:span text:style-name="T126">OTIR</text:span> работает с предекрементом <text:span text:style-name="T126">B</text:span>):</text:p>
      <text:p text:style-name="P225"><text:tab/>LD<text:tab/>C,#57</text:p>
      <text:p text:style-name="P225"><text:soft-page-break/><text:tab/>LD <text:tab/>B,#<text:span text:style-name="T2">80</text:span></text:p>
      <text:p text:style-name="P225"><text:tab/>OTIR</text:p>
      <text:p text:style-name="P225"><text:tab/>LD<text:tab/>B,#<text:span text:style-name="T2">80</text:span></text:p>
      <text:p text:style-name="P225"><text:tab/>OTIR</text:p>
      <text:p text:style-name="P225"><text:tab/>LD<text:tab/>B,#<text:span text:style-name="T2">80</text:span></text:p>
      <text:p text:style-name="P225"><text:tab/>OTIR</text:p>
      <text:p text:style-name="P225"><text:tab/>LD<text:tab/>B,#<text:span text:style-name="T2">80</text:span></text:p>
      <text:p text:style-name="P225"><text:tab/>OTIR</text:p>
      <text:p text:style-name="P53"><text:span text:style-name="T4">Внимание!</text:span> Статусы состояния <text:span text:style-name="T2">SD </text:span>карты доступны через функционал доступа к часам (см. п<text:bookmark-ref text:reference-format="chapter" text:ref-name="__RefHeading__1028_817451688">10.6</text:bookmark-ref>).</text:p>
      <text:h text:style-name="Heading_20_2" text:outline-level="2"><text:bookmark-start text:name="__RefHeading__12342_959909826"/><text:span text:style-name="T1">Доступ к </text:span><text:span text:style-name="T2">IDE-</text:span><text:span text:style-name="T1">устройствам.</text:span><text:bookmark-end text:name="__RefHeading__12342_959909826"/></text:h>
      <text:p text:style-name="P138"><text:span text:style-name="T2">IDE-</text:span><text:span text:style-name="T1">интерфейс сделан по стандарту </text:span><text:span text:style-name="T2">nemo-ide </text:span><text:span text:style-name="T1">с некоторыми расширениями. В отличие от оригинала (и </text:span><text:span text:style-name="T2">Z-</text:span><text:span text:style-name="T1">контроллера), </text:span><text:span text:style-name="T2">IDE-</text:span><text:span text:style-name="T1">порты доступны и в </text:span><text:span text:style-name="T2">shadow-</text:span><text:span text:style-name="T1">режиме. Однако, в отличие от оригинала, поддерживаются лишь порты </text:span><text:span text:style-name="T4">#10</text:span><text:span text:style-name="T2">, </text:span><text:span text:style-name="T4">#11</text:span><text:span text:style-name="T2">, </text:span><text:span text:style-name="T4">#30</text:span><text:span text:style-name="T2">, </text:span><text:span text:style-name="T4">#50</text:span><text:span text:style-name="T2">, </text:span><text:span text:style-name="T4">#70</text:span><text:span text:style-name="T2">, </text:span><text:span text:style-name="T4">#90</text:span><text:span text:style-name="T2">, </text:span><text:span text:style-name="T4">#B0</text:span><text:span text:style-name="T2">, </text:span><text:span text:style-name="T4">#D0</text:span><text:span text:style-name="T2">, </text:span><text:span text:style-name="T4">#F0</text:span><text:span text:style-name="T2"> </text:span><text:span text:style-name="T1">и </text:span><text:span text:style-name="T4">#C8</text:span><text:span text:style-name="T2">, </text:span><text:span text:style-name="T1">при этом осуществляется полная дешифрация (по 8 младшим битам адреса). Расширенный режим передачи данных по сравнению с оригиналом заключается в возможности читать и писать сектора полностью через порт </text:span><text:span text:style-name="T4">#10</text:span><text:span text:style-name="T2"> </text:span><text:span text:style-name="T1">командами </text:span>INIR<text:span text:style-name="T2"> </text:span><text:span text:style-name="T1">и </text:span>OTIR<text:span text:style-name="T2">, </text:span><text:span text:style-name="T1">причём в последнем случае нет надобности переставлять старший и младший байты. Расширенный режим не требует какого-либо специального включения, т. е. работает одновременно со старым (nemo-ide).</text:span></text:p>
      <table:table table:name="Таблица9" table:style-name="Таблица9">
        <table:table-column table:style-name="Таблица9.A"/>
        <table:table-column table:style-name="Таблица9.B"/>
        <text:soft-page-break/>
        <table:table-row>
          <table:table-cell table:style-name="Таблица9.A1" office:value-type="string">
            <text:p text:style-name="P37">Порт</text:p>
          </table:table-cell>
          <table:table-cell table:style-name="Таблица9.B1" office:value-type="string">
            <text:p text:style-name="P38">Описание</text:p>
          </table:table-cell>
        </table:table-row>
        <table:table-row>
          <table:table-cell table:style-name="Таблица9.A2" office:value-type="string">
            <text:p text:style-name="P39">#xx10</text:p>
            <text:p text:style-name="P39">RW</text:p>
            <text:p text:style-name="P39">always</text:p>
          </table:table-cell>
          <table:table-cell table:style-name="Таблица9.B2" office:value-type="string">
            <text:p text:style-name="Table_20_Contents">Порт для записи или чтения данных, читается/пишется как младшая часть 16-битного слова (режим совместимости с nemo-ide), так и старшая тоже (расширенный режим).</text:p>
          </table:table-cell>
        </table:table-row>
        <table:table-row>
          <table:table-cell table:style-name="Таблица9.A2" office:value-type="string">
            <text:p text:style-name="P39">#xx11</text:p>
            <text:p text:style-name="P39">RW</text:p>
            <text:p text:style-name="P39">always</text:p>
          </table:table-cell>
          <table:table-cell table:style-name="Таблица9.B2" office:value-type="string">
            <text:p text:style-name="Table_20_Contents">Чтение и запись старшей части 16-битного слова (режим совместимости с nemo-ide). Чтение происходит после чтения <text:span text:style-name="T4">#10</text:span>, запись сюда — до записи в <text:span text:style-name="T4">#10</text:span>. Обращение к этому порту не приводит к физическому обращению в IDE-устройства.</text:p>
          </table:table-cell>
        </table:table-row>
        <table:table-row>
          <table:table-cell table:style-name="Таблица9.A2" office:value-type="string">
            <text:p text:style-name="P39">#xx30</text:p>
            <text:p text:style-name="P39">RW</text:p>
            <text:p text:style-name="P39">always</text:p>
          </table:table-cell>
          <table:table-cell table:style-name="Таблица9.B2" office:value-type="string">
            <text:p text:style-name="Table_20_Contents">Порт ошибок/свойств. Этот и дальнейшие порты см. в документации на протокол ATA. Биты ША Z80 7..5 мапятся на биты адреса шины ATA 2..0, порты <text:span text:style-name="T4">#10</text:span>, <text:span text:style-name="T4">#30</text:span>, …, <text:span text:style-name="T4">#F0</text:span> мапятся на CS0 шины ATA, порт <text:span text:style-name="T4">#С8</text:span> — на CS1.</text:p>
          </table:table-cell>
        </table:table-row>
        <table:table-row>
          <table:table-cell table:style-name="Таблица9.A2" office:value-type="string">
            <text:p text:style-name="P39">#xx50</text:p>
            <text:p text:style-name="P39">RW</text:p>
            <text:p text:style-name="P39">always</text:p>
          </table:table-cell>
          <table:table-cell table:style-name="Таблица9.B2" office:value-type="string">
            <text:p text:style-name="Table_20_Contents">Счётчик секторов</text:p>
          </table:table-cell>
        </table:table-row>
        <table:table-row>
          <table:table-cell table:style-name="Таблица9.A2" office:value-type="string">
            <text:p text:style-name="P39">#xx70</text:p>
            <text:p text:style-name="P39">RW</text:p>
            <text:p text:style-name="P39">always</text:p>
          </table:table-cell>
          <table:table-cell table:style-name="Таблица9.B2" office:value-type="string">
            <text:p text:style-name="Table_20_Contents">Номер сектора (CHS) или биты 7..0 LBA-адреса</text:p>
          </table:table-cell>
        </table:table-row>
        <table:table-row>
          <table:table-cell table:style-name="Таблица9.A2" office:value-type="string">
            <text:p text:style-name="P39">#xx90</text:p>
            <text:p text:style-name="P39">RW</text:p>
            <text:p text:style-name="P39">always</text:p>
          </table:table-cell>
          <table:table-cell table:style-name="Таблица9.B2" office:value-type="string">
            <text:p text:style-name="Table_20_Contents">Биты номера цилиндра 7..0 (CHS) или биты 15..8 LBA-адреса</text:p>
          </table:table-cell>
        </table:table-row>
        <table:table-row>
          <table:table-cell table:style-name="Таблица9.A2" office:value-type="string">
            <text:p text:style-name="P39">#xxB0</text:p>
            <text:p text:style-name="P39">RW</text:p>
            <text:p text:style-name="P39">always</text:p>
          </table:table-cell>
          <table:table-cell table:style-name="Таблица9.B2" office:value-type="string">
            <text:p text:style-name="Table_20_Contents">Биты номера цилиндра 15..8 (CHS) или биты 23..16 LBA-адреса</text:p>
          </table:table-cell>
        </table:table-row>
        <table:table-row>
          <table:table-cell table:style-name="Таблица9.A2" office:value-type="string">
            <text:p text:style-name="P39">#xxD0</text:p>
            <text:p text:style-name="P39">RW</text:p>
            <text:p text:style-name="P39">always</text:p>
          </table:table-cell>
          <table:table-cell table:style-name="Таблица9.B2" office:value-type="string">
            <text:p text:style-name="Table_20_Contents">Номер головки (CHS) или биты 27..24 LBA-адреса,</text:p>
            <text:p text:style-name="Table_20_Contents">выбор устройства (master/<text:span text:style-name="T2">slave</text:span>), выбор режима (LBA/CHS)</text:p>
          </table:table-cell>
        </table:table-row>
        <table:table-row>
          <table:table-cell table:style-name="Таблица9.A2" office:value-type="string">
            <text:p text:style-name="P39">#xxF0</text:p>
            <text:p text:style-name="P39">RW</text:p>
            <text:p text:style-name="P39">always</text:p>
          </table:table-cell>
          <table:table-cell table:style-name="Таблица9.B2" office:value-type="string">
            <text:p text:style-name="Table_20_Contents">Регистр состояния/регистр команд</text:p>
          </table:table-cell>
        </table:table-row>
        <table:table-row>
          <table:table-cell table:style-name="Таблица9.A2" office:value-type="string">
            <text:p text:style-name="P39">#xxC8</text:p>
            <text:p text:style-name="P39">RW</text:p>
            <text:p text:style-name="P39">always</text:p>
          </table:table-cell>
          <table:table-cell table:style-name="Таблица9.B2" office:value-type="string">
            <text:p text:style-name="Table_20_Contents">Регистр состояния/управления</text:p>
          </table:table-cell>
        </table:table-row>
      </table:table>
      <text:p text:style-name="P53"/>
      <text:p text:style-name="P53">Чтение данных в режиме nemo-ide выглядит так:</text:p>
      <text:p text:style-name="P225"><text:tab/>IN<text:tab/>A,(#10)<text:tab/>;читаем младший байт, одновременно старший <text:tab/><text:tab/><text:tab/><text:tab/><text:tab/>;защёлкивается в #11</text:p>
      <text:p text:style-name="P225"><text:tab/>LD<text:tab/>(HL),A</text:p>
      <text:p text:style-name="P225"><text:tab/>INC<text:tab/>HL</text:p>
      <text:p text:style-name="P225"><text:tab/>IN<text:tab/>A,(#11)<text:tab/>;читаем ранее защёлкнутый старший байт</text:p>
      <text:p text:style-name="P225"><text:tab/>LD<text:tab/>(HL),A</text:p>
      <text:p text:style-name="P225"><text:tab/>INC<text:tab/>HL</text:p>
      <text:p text:style-name="P226"/>
      <text:p text:style-name="P227">Запись данных в режиме nemo-ide:</text:p>
      <text:p text:style-name="P228"><text:soft-page-break/><text:tab/>LD<text:tab/>D,(HL)</text:p>
      <text:p text:style-name="P228"><text:tab/>INC<text:tab/>HL</text:p>
      <text:p text:style-name="P228"><text:tab/>LD<text:tab/>A,(HL)</text:p>
      <text:p text:style-name="P228"><text:tab/>INC<text:tab/>HL</text:p>
      <text:p text:style-name="P228"><text:tab/>OUT<text:tab/>(#11),A<text:tab/>;пишем в защёлку старший байт</text:p>
      <text:p text:style-name="P228"><text:tab/>LD<text:tab/>A,D</text:p>
      <text:p text:style-name="P228"><text:tab/>OUT<text:tab/>(#10),A<text:tab/>;пишем младший байт одновременно со старшим</text:p>
      <text:p text:style-name="P228"><text:tab/><text:tab/><text:tab/><text:tab/>;из защёлки </text:p>
      <text:p text:style-name="P228"/>
      <text:p text:style-name="P5"><text:span text:style-name="T1">Чтение</text:span> и<text:span text:style-name="T1"> з</text:span>апись в расширенном <text:span text:style-name="T1">режиме</text:span>:</text:p>
      <text:p text:style-name="P228"><text:tab/>LD<text:tab/>C,#10</text:p>
      <text:p text:style-name="P228"><text:tab/>LD<text:tab/>B,0</text:p>
      <text:p text:style-name="P228"><text:tab/>INIR ;Читаем сектор из #10 (2 раза <text:span text:style-name="T1">по</text:span> 256 <text:span text:style-name="T1">байт</text:span>)</text:p>
      <text:p text:style-name="P228"><text:tab/>INIR</text:p>
      <text:p text:style-name="P228"><text:tab/>…</text:p>
      <text:p text:style-name="P228"><text:tab/>LD<text:tab/>C,#10</text:p>
      <text:p text:style-name="P228"><text:tab/>LD<text:tab/>B,0</text:p>
      <text:p text:style-name="P228"><text:tab/>OTIR ;пишем сектор в #10 (2 раза <text:span text:style-name="T1">по</text:span> 256 <text:span text:style-name="T1">байт</text:span>)</text:p>
      <text:p text:style-name="P228"><text:tab/>OTIR</text:p>
      <text:p text:style-name="P228"/>
      <text:p text:style-name="Standard"><text:span text:style-name="T4">Внимание!</text:span> В расширенном режиме синхронизация выдачи младшего или старшего байтов (а также записи сначала младшего, а потом старшего байта) в начале чтения или записи сектора осуществляется в момент доступа в порты #30, #50 и т.д. (любые IDE-порты кроме #10 и #11).</text:p>
      <text:h text:style-name="P25" text:outline-level="2"><text:bookmark-start text:name="__RefNumPara__12992_2869355866"/><text:bookmark-start text:name="__RefHeading__12344_959909826"/>Порты контроллера дисковода<text:bookmark-end text:name="__RefNumPara__12992_2869355866"/><text:bookmark-end text:name="__RefHeading__12344_959909826"/></text:h>
      <table:table table:name="Table17" table:style-name="Table17">
        <table:table-column table:style-name="Table17.A"/>
        <table:table-column table:style-name="Table17.B"/>
        <table:table-row>
          <table:table-cell table:style-name="Table17.A1" office:value-type="string">
            <text:p text:style-name="P37">Порт</text:p>
          </table:table-cell>
          <table:table-cell table:style-name="Table17.B1" office:value-type="string">
            <text:p text:style-name="P38">Описание</text:p>
          </table:table-cell>
        </table:table-row>
        <table:table-row>
          <table:table-cell table:style-name="Table17.A2" office:value-type="string">
            <text:p text:style-name="P39">#xx1F</text:p>
            <text:p text:style-name="P39">RW</text:p>
            <text:p text:style-name="P39">shadow</text:p>
          </table:table-cell>
          <table:table-cell table:style-name="Table17.B2" office:value-type="string">
            <text:p text:style-name="Table_20_Contents">Регистр команд/состояния ВГ93</text:p>
          </table:table-cell>
        </table:table-row>
        <table:table-row>
          <table:table-cell table:style-name="Table17.A2" office:value-type="string">
            <text:p text:style-name="P39">#xx3F</text:p>
            <text:p text:style-name="P39">RW</text:p>
            <text:p text:style-name="P39">shadow</text:p>
          </table:table-cell>
          <table:table-cell table:style-name="Table17.B2" office:value-type="string">
            <text:p text:style-name="Table_20_Contents">Регистр трека ВГ93</text:p>
          </table:table-cell>
        </table:table-row>
        <table:table-row>
          <table:table-cell table:style-name="Table17.A2" office:value-type="string">
            <text:p text:style-name="P39">#xx5F</text:p>
            <text:p text:style-name="P39">RW</text:p>
            <text:p text:style-name="P39">shadow</text:p>
          </table:table-cell>
          <table:table-cell table:style-name="Table17.B2" office:value-type="string">
            <text:p text:style-name="Table_20_Contents">Регистр сектора ВГ93</text:p>
          </table:table-cell>
        </table:table-row>
        <table:table-row>
          <table:table-cell table:style-name="Table17.A2" office:value-type="string">
            <text:p text:style-name="P39">#xx7F</text:p>
            <text:p text:style-name="P39">RW</text:p>
            <text:p text:style-name="P39">shadow</text:p>
          </table:table-cell>
          <table:table-cell table:style-name="Table17.B2" office:value-type="string">
            <text:p text:style-name="Table_20_Contents">Регистр данных ВГ93</text:p>
          </table:table-cell>
        </table:table-row>
        <table:table-row>
          <table:table-cell table:style-name="Table17.A2" office:value-type="string">
            <text:p text:style-name="P39">#xxFF</text:p>
            <text:p text:style-name="P39">RW</text:p>
            <text:p text:style-name="P39">shadow</text:p>
          </table:table-cell>
          <table:table-cell table:style-name="Table17.B2" office:value-type="string">
            <text:p text:style-name="Table_20_Contents">«Системный» регистр.</text:p>
            <text:p text:style-name="Table_20_Contents"/>
            <text:p text:style-name="Table_20_Contents">Чтение:</text:p>
            <text:p text:style-name="Table_20_Contents">бит 7 — состояние сигнала <text:span text:style-name="T156">INTRQ</text:span> от ВГ93</text:p>
            <text:p text:style-name="Table_20_Contents">бит 6 — состояние сигнала DRQ от ВГ93</text:p>
            <text:p text:style-name="Table_20_Contents">биты 5..0 — <text:span text:style-name="T157">предыдущее записанное в этот порт значение.</text:span></text:p>
            <text:p text:style-name="Table_20_Contents"><text:soft-page-break/></text:p>
            <text:p text:style-name="Table_20_Contents">Запись:</text:p>
            <text:p text:style-name="Table_20_Contents">Биты 1..0: выбор одного из 4 дисководов</text:p>
            <text:p text:style-name="Table_20_Contents">бит 2: сигнал RESET на ВГ93, 0 после сброса</text:p>
            <text:p text:style-name="Table_20_Contents">бит 3: сигнал HRDY на ВГ93</text:p>
            <text:p text:style-name="Table_20_Contents">бит 4: выбор стороны дискеты</text:p>
          </table:table-cell>
        </table:table-row>
      </table:table>
      <text:p text:style-name="Standard"/>
      <text:h text:style-name="Heading_20_2" text:outline-level="2"><text:bookmark-start text:name="__RefHeading__12451_959909826"/><text:span text:style-name="T1">Порт </text:span><text:span text:style-name="T2">RS232 (</text:span><text:span text:style-name="T1">коммуникационный интерфейс)</text:span><text:bookmark-end text:name="__RefHeading__12451_959909826"/></text:h>
      <text:p text:style-name="Text_20_body"><text:span text:style-name="T1">Работа с коммуникационный интерфейсом </text:span><text:span text:style-name="T2">RS232C </text:span><text:span text:style-name="T1">на </text:span><text:span text:style-name="T2">ZX Evolution </text:span><text:span text:style-name="T1">реализована по стандарту предложенным Кондратьевым без использования прерываний. В этом стандарте использовался стандартный </text:span><text:span text:style-name="T2">PC </text:span><text:span text:style-name="T1">совместимый </text:span><text:span text:style-name="T2">ISA</text:span><text:span text:style-name="T1">-модем, базировавшийся на микросхеме 16550 или совместимой. Соответственно внутренние регистры интерфейса соответствуют регистрам вышеуказанной микросхемы. В связи с тем, что не весь функционал 16550 используется в нашей реализации, часть регистров или битов регистров не используется. Поэтому рекомендуется перед программированием ознакомится с ограничениями реализации (в документации описаны только используемые регистры и биты).</text:span></text:p>
      <text:p text:style-name="P6">Особенности реализации:</text:p>
      <text:list text:style-name="L42">
        <text:list-item>
          <text:p text:style-name="P229">отсутствует поддержка прерываний;</text:p>
        </text:list-item>
        <text:list-item>
          <text:p text:style-name="P229">поддерж<text:span text:style-name="T1">иваются только следующие дополнительные сигналы коммуникационного интерфейса</text:span><text:span text:style-name="T2">: CTS, RTS;</text:span></text:p>
        </text:list-item>
        <text:list-item>
          <text:p text:style-name="P229"><text:span text:style-name="T2">FIFO </text:span><text:span text:style-name="T1">всегда используется.</text:span></text:p>
        </text:list-item>
      </text:list>
      <table:table table:name="Таблица11" table:style-name="Таблица11">
        <table:table-column table:style-name="Таблица11.A"/>
        <table:table-column table:style-name="Таблица11.B"/>
        <text:soft-page-break/>
        <table:table-row>
          <table:table-cell table:style-name="Таблица11.A1" office:value-type="string">
            <text:p text:style-name="P37">Порт</text:p>
          </table:table-cell>
          <table:table-cell table:style-name="Таблица11.B1" office:value-type="string">
            <text:p text:style-name="P38">Описание</text:p>
          </table:table-cell>
        </table:table-row>
        <table:table-row>
          <table:table-cell table:style-name="Таблица11.A2" office:value-type="string">
            <text:p text:style-name="P39">#F8EF</text:p>
            <text:p text:style-name="P39">RW</text:p>
            <text:p text:style-name="P39">always</text:p>
          </table:table-cell>
          <table:table-cell table:style-name="Таблица11.B2" office:value-type="string">
            <text:p text:style-name="Table_20_Contents"><text:span text:style-name="T19">&lt;</text:span><text:span text:style-name="T5">LCR</text:span><text:span text:style-name="T19">&amp;0x80==0&gt; </text:span><text:span text:style-name="T5">DAT</text:span><text:span text:style-name="T2"> – </text:span><text:span text:style-name="T1">р</text:span>егистр данных</text:p>
            <text:p text:style-name="P40">&lt;<text:span text:style-name="T4">LCR</text:span>&amp;0x80==1&gt; <text:span text:style-name="T4">DLL</text:span> – <text:span text:style-name="T1">младший регистр делителя</text:span></text:p>
          </table:table-cell>
        </table:table-row>
        <table:table-row>
          <table:table-cell table:style-name="Таблица11.A2" office:value-type="string">
            <text:p text:style-name="P39">#F9EF</text:p>
            <text:p text:style-name="P39">RW</text:p>
            <text:p text:style-name="P39">always</text:p>
          </table:table-cell>
          <table:table-cell table:style-name="Таблица11.B2" office:value-type="string">
            <text:p text:style-name="Table_20_Contents"><text:span text:style-name="T19">&lt;</text:span><text:span text:style-name="T5">LCR</text:span><text:span text:style-name="T19">&amp;0x80==0&gt; </text:span><text:span text:style-name="T5">IER</text:span><text:span text:style-name="T2"> – </text:span><text:span text:style-name="T1">р</text:span>егистр разрешения прерываний (не используется)</text:p>
            <text:p text:style-name="P40">&lt;<text:span text:style-name="T4">LCR</text:span>&amp;0x80==1&gt; <text:span text:style-name="T4">DLM</text:span> – <text:span text:style-name="T1">старший регистр делителя</text:span></text:p>
          </table:table-cell>
        </table:table-row>
        <table:table-row>
          <table:table-cell table:style-name="Таблица11.A2" office:value-type="string">
            <text:p text:style-name="P39">#FAEF</text:p>
            <text:p text:style-name="P39">RW</text:p>
            <text:p text:style-name="P39">always</text:p>
          </table:table-cell>
          <table:table-cell table:style-name="Таблица11.B2" office:value-type="string">
            <text:p text:style-name="P230">Запись:</text:p>
            <text:p text:style-name="P40"><text:span text:style-name="T4">FCR</text:span> – <text:span text:style-name="T1">регистр управления </text:span>FIFO</text:p>
            <text:p text:style-name="P41">Чтение:</text:p>
            <text:p text:style-name="P41"><text:span text:style-name="T5">ISR</text:span><text:span text:style-name="T2"> – </text:span>регистр статуса прерываний (не используется)</text:p>
          </table:table-cell>
        </table:table-row>
        <table:table-row>
          <table:table-cell table:style-name="Таблица11.A2" office:value-type="string">
            <text:p text:style-name="P39">#FBEF</text:p>
            <text:p text:style-name="P39">RW</text:p>
            <text:p text:style-name="P39">always</text:p>
          </table:table-cell>
          <table:table-cell table:style-name="Таблица11.B2" office:value-type="string">
            <text:p text:style-name="P40"><text:span text:style-name="T4">LCR</text:span> – <text:span text:style-name="T1">регистр управления линией</text:span></text:p>
          </table:table-cell>
        </table:table-row>
        <table:table-row>
          <table:table-cell table:style-name="Таблица11.A2" office:value-type="string">
            <text:p text:style-name="P39">#<text:span text:style-name="T1">FСEF</text:span></text:p>
            <text:p text:style-name="P39">RW</text:p>
            <text:p text:style-name="P39">always</text:p>
          </table:table-cell>
          <table:table-cell table:style-name="Таблица11.B2" office:value-type="string">
            <text:p text:style-name="P40"><text:span text:style-name="T4">MCR</text:span> – <text:span text:style-name="T1">регистр управления модемом</text:span></text:p>
          </table:table-cell>
        </table:table-row>
        <table:table-row>
          <table:table-cell table:style-name="Таблица11.A2" office:value-type="string">
            <text:p text:style-name="P39">#FDEF</text:p>
            <text:p text:style-name="P39">RO</text:p>
            <text:p text:style-name="P39">always</text:p>
          </table:table-cell>
          <table:table-cell table:style-name="Таблица11.B2" office:value-type="string">
            <text:p text:style-name="P40"><text:span text:style-name="T4">LSR</text:span> – <text:span text:style-name="T1">регистр статуса линии</text:span></text:p>
          </table:table-cell>
        </table:table-row>
        <table:table-row>
          <table:table-cell table:style-name="Таблица11.A2" office:value-type="string">
            <text:p text:style-name="P39">#FEEF</text:p>
            <text:p text:style-name="P39">RO</text:p>
            <text:p text:style-name="P39">always</text:p>
          </table:table-cell>
          <table:table-cell table:style-name="Таблица11.B2" office:value-type="string">
            <text:p text:style-name="P40"><text:span text:style-name="T4">MSR</text:span> – <text:span text:style-name="T1">регистр статуса модема</text:span></text:p>
          </table:table-cell>
        </table:table-row>
        <table:table-row>
          <table:table-cell table:style-name="Таблица11.A2" office:value-type="string">
            <text:p text:style-name="P39">#FFEF</text:p>
            <text:p text:style-name="P39">RW</text:p>
            <text:p text:style-name="P39">always</text:p>
          </table:table-cell>
          <table:table-cell table:style-name="Таблица11.B2" office:value-type="string">
            <text:p text:style-name="P40"><text:span text:style-name="T4">SPR</text:span> – <text:span text:style-name="T1">пользовательский регистр</text:span></text:p>
          </table:table-cell>
        </table:table-row>
      </table:table>
      <text:h text:style-name="Heading_20_3" text:outline-level="3"><text:bookmark-start text:name="__RefHeading__20503_459111283"/><text:span text:style-name="T1">Регистр данных </text:span><text:span text:style-name="T2">(DAT)</text:span><text:bookmark-end text:name="__RefHeading__20503_459111283"/></text:h>
      <text:p text:style-name="P6">Регистр используется для передачи/приема данных. </text:p>
      <text:h text:style-name="Heading_20_3" text:outline-level="3"><text:bookmark-start text:name="__RefHeading__20505_459111283"/>Регистры делителя <text:span text:style-name="T2">(DLL,DLM)</text:span><text:bookmark-end text:name="__RefHeading__20505_459111283"/></text:h>
      <text:p text:style-name="P6">Регистр используется для установки скорости передачи порта.</text:p>
      <text:p text:style-name="P6">Существует два режима работы делителя:</text:p>
      <text:list text:style-name="L43">
        <text:list-item>
          <text:p text:style-name="P231"><text:span text:style-name="T1">стандартный режим (старший бит </text:span><text:span text:style-name="T5">DLM</text:span><text:span text:style-name="T2"> </text:span><text:span text:style-name="T1">установлен в 0);</text:span></text:p>
        </text:list-item>
        <text:list-item>
          <text:p text:style-name="P231"><text:span text:style-name="T1">нативный режим (старший бит </text:span><text:span text:style-name="T5">DLM</text:span><text:span text:style-name="T2"> </text:span><text:span text:style-name="T1">установлен в 1);</text:span></text:p>
        </text:list-item>
      </text:list>
      <text:p text:style-name="Text_20_body"><text:span text:style-name="T1">Для стандартного режима скорость рассчитывается, как для микросхемы 16550</text:span><text:span text:style-name="T2">,</text:span><text:span text:style-name="T1"> по формуле: </text:span><text:span text:style-name="T158">&lt;</text:span><text:span text:style-name="T159">скорость в бодах</text:span><text:span text:style-name="T158">&gt; </text:span><text:span text:style-name="T159">= 115200/((</text:span><text:span text:style-name="T160">DLM</text:span><text:span text:style-name="T161">)</text:span><text:span text:style-name="T159">*256) + </text:span><text:span text:style-name="T160">DLL</text:span><text:span text:style-name="T159">) </text:span></text:p>
      <text:p text:style-name="Text_20_body"><text:span text:style-name="T1">Для нативного режима значения </text:span><text:span text:style-name="T5">DLL</text:span><text:span text:style-name="T2"> </text:span><text:span text:style-name="T1">и </text:span><text:span text:style-name="T5">DLM</text:span><text:span text:style-name="T2"> </text:span><text:span text:style-name="T1">(без учета старшего бита) напрямую записываются в регистры </text:span><text:span text:style-name="T9">UBRR</text:span><text:span text:style-name="T5">L</text:span><text:span text:style-name="T1"> и </text:span><text:span text:style-name="T9">UBRR</text:span><text:span text:style-name="T5">H </text:span><text:span text:style-name="T11">микросхемы </text:span><text:span text:style-name="T19">ATMEGA128. </text:span><text:span text:style-name="T11">В этом случае значения </text:span><text:span text:style-name="T5">DLL</text:span><text:span text:style-name="T19"> </text:span><text:span text:style-name="T11">и </text:span><text:span text:style-name="T5">DLM</text:span><text:span text:style-name="T11"> рассчитывается по формуле:</text:span></text:p>
      <text:p text:style-name="P232"><text:span text:style-name="Source_20_Text"><text:span text:style-name="T2">(uint16)(</text:span></text:span><text:span text:style-name="Source_20_Text">(</text:span><text:span text:style-name="Source_20_Text"><text:span text:style-name="T5">DLM</text:span></text:span><text:span text:style-name="Source_20_Text"><text:span text:style-name="T2">&amp;0x7F</text:span></text:span><text:span text:style-name="Source_20_Text">)*</text:span><text:span text:style-name="Source_20_Text"><text:span text:style-name="T2">256+</text:span></text:span><text:span text:style-name="Source_20_Text"><text:span text:style-name="T5">DLL</text:span></text:span><text:span text:style-name="Source_20_Text"><text:span text:style-name="T19">)</text:span></text:span><text:span text:style-name="Source_20_Text"> = ((</text:span><text:span text:style-name="Source_20_Text"><text:span text:style-name="T4">F_CPU</text:span></text:span><text:span text:style-name="Source_20_Text">/16)/&lt;скорость в бодах&gt;)-1<text:line-break/></text:span><text:soft-page-break/><text:span text:style-name="Source_20_Text">где </text:span><text:span text:style-name="Source_20_Text"><text:span text:style-name="T4">F_CPU</text:span></text:span><text:span text:style-name="Source_20_Text"> = 11059200 (для ZXEvo)</text:span></text:p>
      <text:p text:style-name="Text_20_body"><text:span text:style-name="Source_20_Text"><text:span text:style-name="T162">Пример:</text:span></text:span><text:span text:style-name="Source_20_Text"><text:span text:style-name="T163"> Рассчитаем значения </text:span></text:span><text:span text:style-name="Source_20_Text"><text:span text:style-name="T164">DLL</text:span></text:span><text:span text:style-name="Source_20_Text"><text:span text:style-name="T165"> </text:span></text:span><text:span text:style-name="Source_20_Text"><text:span text:style-name="T163">и </text:span></text:span><text:span text:style-name="Source_20_Text"><text:span text:style-name="T164">DLM</text:span></text:span><text:span text:style-name="Source_20_Text"><text:span text:style-name="T163"> для скорости 31250 бод <text:s/></text:span></text:span><text:span text:style-name="Source_20_Text"><text:span text:style-name="T165">(</text:span></text:span><text:span text:style-name="Source_20_Text"><text:span text:style-name="T163">скорость </text:span></text:span><text:span text:style-name="Source_20_Text"><text:span text:style-name="T165">MIDI </text:span></text:span><text:span text:style-name="Source_20_Text"><text:span text:style-name="T163">интерфейса) при использовании нативного режима.</text:span></text:span></text:p>
      <text:list text:style-name="L44">
        <text:list-item>
          <text:p text:style-name="P233"><text:span text:style-name="Source_20_Text"><text:span text:style-name="T163">Рассчитаем значение делителя ((11059200/16)/31250)-1 = 21 </text:span></text:span><text:span text:style-name="Source_20_Text"><text:span text:style-name="T165">[0x15];</text:span></text:span></text:p>
        </text:list-item>
        <text:list-item>
          <text:p text:style-name="P233"><text:span text:style-name="Source_20_Text"><text:span text:style-name="T163">Устанавливаем значения </text:span></text:span><text:span text:style-name="Source_20_Text"><text:span text:style-name="T162">DLL</text:span></text:span><text:span text:style-name="Source_20_Text"><text:span text:style-name="T163"> = 0x15, </text:span></text:span><text:span text:style-name="Source_20_Text"><text:span text:style-name="T162">DLM</text:span></text:span><text:span text:style-name="Source_20_Text"><text:span text:style-name="T163"> = 0x80 (старший бит включает нативный режим). </text:span></text:span></text:p>
        </text:list-item>
      </text:list>
      <text:p text:style-name="Text_20_body"><text:span text:style-name="T8">Внимание!</text:span><text:span text:style-name="T1"> </text:span><text:span text:style-name="T2">ZX Evolution </text:span><text:span text:style-name="T1">поддерживает дополнительную скорость передачи 256000, для этого нужно установить </text:span><text:span text:style-name="T5">DLM</text:span><text:span text:style-name="T2"> </text:span><text:span text:style-name="T1">и </text:span><text:span text:style-name="T5">DLL</text:span><text:span text:style-name="T2"> </text:span><text:span text:style-name="T1">в значение 0.</text:span></text:p>
      <text:h text:style-name="Heading_20_3" text:outline-level="3"><text:bookmark-start text:name="__RefHeading__20507_459111283"/>Регистр управления <text:span text:style-name="T2">FIFO (FCR)</text:span><text:bookmark-end text:name="__RefHeading__20507_459111283"/></text:h>
      <text:p text:style-name="P6">Регистр используется для управления <text:span text:style-name="T2">FIFO.</text:span></text:p>
      <text:list text:style-name="L45">
        <text:list-item>
          <text:p text:style-name="P234">7..3 <text:span text:style-name="T1">биты: не используются;</text:span></text:p>
        </text:list-item>
        <text:list-item>
          <text:p text:style-name="P234">2 <text:span text:style-name="T1">бит </text:span>(<text:span text:style-name="T4">XMIT FIFO reset</text:span><text:span text:style-name="T16">)</text:span>: <text:span text:style-name="T1">сброс </text:span>FIFO <text:span text:style-name="T1">отправки, если установлена </text:span><text:span text:style-name="T9">1</text:span><text:span text:style-name="T1">;</text:span></text:p>
        </text:list-item>
        <text:list-item>
          <text:p text:style-name="P234">1 <text:span text:style-name="T1">бит </text:span>(<text:span text:style-name="T4">RCVR FIFO reset</text:span><text:span text:style-name="T16">)</text:span>: <text:span text:style-name="T1">сброс </text:span>FIFO <text:span text:style-name="T1">приема, если установлена </text:span><text:span text:style-name="T9">1</text:span><text:span text:style-name="T1">;</text:span></text:p>
        </text:list-item>
        <text:list-item>
          <text:p text:style-name="P234">0 <text:span text:style-name="T1">бит </text:span>(<text:span text:style-name="T4">enable FIFO</text:span><text:span text:style-name="T16">)</text:span>: <text:span text:style-name="T1">включает </text:span>FIFO,<text:span text:style-name="T1"> если установлена </text:span><text:span text:style-name="T9">1</text:span><text:span text:style-name="T1">. Так как </text:span>FIFO <text:span text:style-name="T1">всегда включено, то этот бит должен быть установлен в случае подачи команд на сброс </text:span>FIFO. <text:span text:style-name="T1">В случае </text:span><text:span text:style-name="T9">0</text:span><text:span text:style-name="T1">, команды сброса </text:span>FIFO <text:span text:style-name="T1">игнорируются.</text:span></text:p>
        </text:list-item>
      </text:list>
      <text:h text:style-name="Heading_20_3" text:outline-level="3"><text:bookmark-start text:name="__RefHeading__20509_459111283"/><text:span text:style-name="T1">Регистр управления линией </text:span><text:span text:style-name="T2">(LCR)</text:span><text:bookmark-end text:name="__RefHeading__20509_459111283"/></text:h>
      <text:p text:style-name="P6">Регистр используется для установки формата передачи данных по коммуникационному интерфейсу.</text:p>
      <text:list text:style-name="L46">
        <text:list-item>
          <text:p text:style-name="P235">7 бит<text:span text:style-name="T2"> (</text:span><text:span text:style-name="T5">DL enable</text:span><text:span text:style-name="T19">)</text:span><text:span text:style-name="T2">: </text:span><text:span text:style-name="T1">запись </text:span><text:span text:style-name="T9">1</text:span><text:span text:style-name="T1"> устанавливает видимым по портам </text:span><text:span text:style-name="T5">#F8EF</text:span><text:span text:style-name="T2">, </text:span><text:span text:style-name="T5">#F9EF</text:span><text:span text:style-name="T2"> </text:span><text:span text:style-name="T1">соответствующие части регистра делителя </text:span><text:span text:style-name="T5">DLL</text:span><text:span text:style-name="T2">, </text:span><text:span text:style-name="T5">DLM</text:span><text:span text:style-name="T2">;</text:span></text:p>
        </text:list-item>
        <text:list-item>
          <text:p text:style-name="P235"><text:span text:style-name="T2">6 </text:span><text:span text:style-name="T1">бит:</text:span><text:span text:style-name="T2"> </text:span><text:span text:style-name="T1">не используется;</text:span></text:p>
        </text:list-item>
        <text:list-item>
          <text:p text:style-name="P236">5..3 <text:span text:style-name="T1">бит:</text:span> <text:span text:style-name="T1">задает алгоритм расчета бита четности данных. Поддерживаются только следующие значения:<text:line-break/></text:span><text:span text:style-name="T9">001</text:span><text:span text:style-name="T1"> — </text:span>odd parity;<text:line-break/><text:span text:style-name="T4">011</text:span> – even parity;<text:line-break/><text:span text:style-name="T1">все остальные значения — четность не используется.</text:span></text:p>
        </text:list-item>
        <text:list-item>
          <text:p text:style-name="P235"><text:span text:style-name="T2">2 </text:span><text:span text:style-name="T1">бит </text:span><text:span text:style-name="T2">(</text:span><text:span text:style-name="T5">stop bits</text:span><text:span text:style-name="T19">)</text:span><text:span text:style-name="T2">: </text:span><text:span text:style-name="T1">кол-во стопбит. </text:span><text:span text:style-name="T166">Кол-во “стоп-битов”: при </text:span><text:span text:style-name="T167">0</text:span><text:span text:style-name="T166"> = 1, при </text:span><text:span text:style-name="T168">1</text:span><text:span text:style-name="T166"> = 1,5 в режиме 5 бит данных, иначе = 2.</text:span></text:p>
        </text:list-item>
        <text:list-item>
          <text:p text:style-name="P236"><text:span text:style-name="T169">1,0 </text:span><text:span text:style-name="T166">биты </text:span><text:span text:style-name="T169">(</text:span><text:span text:style-name="T170">word length</text:span><text:span text:style-name="T171">)</text:span><text:span text:style-name="T169">: </text:span><text:span text:style-name="T166">длина слова данных. Возможны следующие значения:<text:line-break/></text:span><text:span text:style-name="T168">00</text:span><text:span text:style-name="T166"> — 5 бит;<text:line-break/></text:span><text:span text:style-name="T168">01</text:span><text:span text:style-name="T166"> — 6 бит;<text:line-break/></text:span><text:span text:style-name="T168">10</text:span><text:span text:style-name="T166"> — 7 бит;<text:line-break/></text:span><text:span text:style-name="T168">11</text:span><text:span text:style-name="T166"> — 8 бит.</text:span></text:p>
        </text:list-item>
      </text:list>
      <text:h text:style-name="P69" text:outline-level="3"><text:bookmark-start text:name="__RefHeading__20511_459111283"/>Регистр управления модемом <text:span text:style-name="T2">(MCR)</text:span><text:bookmark-end text:name="__RefHeading__20511_459111283"/></text:h>
      <text:p text:style-name="P6">Регистр используется для установки режима интерфейса и управления дополнительными <text:soft-page-break/>сигналами.</text:p>
      <text:list text:style-name="L47">
        <text:list-item>
          <text:p text:style-name="P237">7..2 <text:span text:style-name="T1">биты: не используются;</text:span></text:p>
        </text:list-item>
        <text:list-item>
          <text:p text:style-name="P237">1 <text:span text:style-name="T1">бит </text:span>(<text:span text:style-name="T4">RTS</text:span><text:span text:style-name="T16">)</text:span>: <text:span text:style-name="T1">управление сигналом </text:span>RTS <text:span text:style-name="T1">интерфейса;</text:span></text:p>
        </text:list-item>
        <text:list-item>
          <text:p text:style-name="P237">0 <text:span text:style-name="T1">бит:</text:span> <text:span text:style-name="T1">не используется.</text:span></text:p>
        </text:list-item>
      </text:list>
      <text:h text:style-name="Heading_20_3" text:outline-level="3"><text:bookmark-start text:name="__RefHeading__20513_459111283"/><text:span text:style-name="T1">Регистр статуса линии (</text:span><text:span text:style-name="T2">LSR)</text:span><text:bookmark-end text:name="__RefHeading__20513_459111283"/></text:h>
      <text:p text:style-name="P6">Регистр для получения состояния линии и <text:span text:style-name="T2">FIFO.</text:span></text:p>
      <text:list text:style-name="L48">
        <text:list-item>
          <text:p text:style-name="P238"><text:span text:style-name="T2">7 </text:span><text:span text:style-name="T1">бит</text:span><text:span text:style-name="T2">:</text:span><text:span text:style-name="T1"> </text:span><text:span text:style-name="T172">(</text:span><text:span text:style-name="T173">FIFO </text:span><text:span text:style-name="T174">h</text:span><text:span text:style-name="T173">alf-</text:span><text:span text:style-name="T174">f</text:span><text:span text:style-name="T173">ull indicator</text:span><text:span text:style-name="T175">): </text:span><text:span text:style-name="T172">если установлена </text:span><text:span text:style-name="T173">1</text:span><text:span text:style-name="T172">, то </text:span><text:span text:style-name="T175">FIFO </text:span><text:span text:style-name="T172">приема данных заполнен на половину (нестандартный флаг, только на </text:span><text:span text:style-name="T175">ZX Evolution);</text:span></text:p>
        </text:list-item>
        <text:list-item>
          <text:p text:style-name="P238"><text:span text:style-name="T2">6 </text:span><text:span text:style-name="T1">бит </text:span><text:span text:style-name="T19">(</text:span><text:span text:style-name="T5">transmit empty</text:span><text:span text:style-name="T19">)</text:span><text:span text:style-name="T2">: </text:span><text:span text:style-name="T1">если установлена </text:span><text:span text:style-name="T9">1</text:span><text:span text:style-name="T1">, то передатчик и </text:span><text:span text:style-name="T2">FIFO </text:span><text:span text:style-name="T1">отправки пустые;</text:span></text:p>
        </text:list-item>
        <text:list-item>
          <text:p text:style-name="P239">5 <text:span text:style-name="T1">бит</text:span> <text:span text:style-name="T16">(</text:span><text:span text:style-name="T4">THR empty</text:span><text:span text:style-name="T16">)</text:span>:<text:span text:style-name="T1">если установлена </text:span><text:span text:style-name="T9">1</text:span><text:span text:style-name="T1">, то </text:span>FIFO <text:span text:style-name="T1">отправки</text:span> <text:span text:style-name="T1">данных пустое;</text:span></text:p>
        </text:list-item>
        <text:list-item>
          <text:p text:style-name="P239">4 <text:span text:style-name="T1">бит:</text:span> <text:span text:style-name="T1">не используется;</text:span></text:p>
        </text:list-item>
        <text:list-item>
          <text:p text:style-name="P239">3 <text:span text:style-name="T1">бит</text:span> (<text:span text:style-name="T4">framing </text:span><text:span text:style-name="T9">error</text:span><text:span text:style-name="T16">)</text:span><text:span text:style-name="T1">: если установлена </text:span><text:span text:style-name="T9">1</text:span><text:span text:style-name="T1">, то произошла ошибка кадра;</text:span></text:p>
        </text:list-item>
        <text:list-item>
          <text:p text:style-name="P239">2 <text:span text:style-name="T1">бит</text:span> (<text:span text:style-name="T4">parity error</text:span><text:span text:style-name="T16">)</text:span>: <text:span text:style-name="T1">если установлена </text:span><text:span text:style-name="T9">1</text:span><text:span text:style-name="T1">, то произошла ошибка четности;</text:span></text:p>
        </text:list-item>
        <text:list-item>
          <text:p text:style-name="P239">1 <text:span text:style-name="T1">бит</text:span> (<text:span text:style-name="T4">overrun error</text:span><text:span text:style-name="T16">)</text:span>: <text:span text:style-name="T1">если установлена </text:span><text:span text:style-name="T9">1</text:span><text:span text:style-name="T1">, то </text:span>FIFO <text:span text:style-name="T1">приема данных переполнено;</text:span></text:p>
        </text:list-item>
        <text:list-item>
          <text:p text:style-name="P239">0 <text:span text:style-name="T1">бит</text:span> (<text:span text:style-name="T4">data received</text:span><text:span text:style-name="T16">)</text:span>: <text:span text:style-name="T1">если установлена </text:span><text:span text:style-name="T9">1</text:span><text:span text:style-name="T1">, то </text:span>FIFO <text:span text:style-name="T1">приема данных не пустое;</text:span></text:p>
        </text:list-item>
      </text:list>
      <text:h text:style-name="Heading_20_3" text:outline-level="3"><text:bookmark-start text:name="__RefHeading__20515_459111283"/><text:span text:style-name="T1">Регистр статуса модема </text:span><text:span text:style-name="T2">(MSR)</text:span><text:bookmark-end text:name="__RefHeading__20515_459111283"/></text:h>
      <text:p text:style-name="P6">Регистр для получения состояния дополнительных сигналов интерфейса.</text:p>
      <text:list text:style-name="L49">
        <text:list-item>
          <text:p text:style-name="P240">7 <text:span text:style-name="T1">бит (</text:span><text:span text:style-name="T4">CD status</text:span><text:span text:style-name="T16">)</text:span>: <text:span text:style-name="T1">всегда </text:span><text:span text:style-name="T9">1</text:span><text:span text:style-name="T1">;</text:span></text:p>
        </text:list-item>
        <text:list-item>
          <text:p text:style-name="P241"><text:span text:style-name="T2">6 </text:span>бит <text:span text:style-name="T2">(</text:span><text:span text:style-name="T5">RI status</text:span><text:span text:style-name="T19">)</text:span><text:span text:style-name="T2">: </text:span>всегда <text:span text:style-name="T4">0</text:span>;</text:p>
        </text:list-item>
        <text:list-item>
          <text:p text:style-name="P241"><text:span text:style-name="T2">5 </text:span>бит <text:span text:style-name="T2">(</text:span><text:span text:style-name="T5">DSR status</text:span><text:span text:style-name="T19">)</text:span><text:span text:style-name="T2">: </text:span>всегда <text:span text:style-name="T4">1</text:span>;</text:p>
        </text:list-item>
        <text:list-item>
          <text:p text:style-name="P240">4 <text:span text:style-name="T1">бит</text:span> (<text:span text:style-name="T4">CTS status</text:span><text:span text:style-name="T16">)</text:span><text:span text:style-name="T4">:</text:span> <text:span text:style-name="T1">отображает состояние линии </text:span>CTS <text:span text:style-name="T1">интерфейса</text:span>; </text:p>
        </text:list-item>
        <text:list-item>
          <text:p text:style-name="P241"><text:span text:style-name="T2">1..3 </text:span>биты: не используется, всегда <text:span text:style-name="T5">0</text:span><text:span text:style-name="T2">;</text:span></text:p>
        </text:list-item>
        <text:list-item>
          <text:p text:style-name="P241">0 бит (<text:span text:style-name="T5">CTS change</text:span><text:span text:style-name="T16">)</text:span><text:span text:style-name="T2">: </text:span>устанавливается в <text:span text:style-name="T4">1</text:span>, если произошло изменение состояния сигнала <text:span text:style-name="T2">CTS (</text:span>сбрасывается в <text:span text:style-name="T4">0</text:span> после чтения регистра).</text:p>
        </text:list-item>
      </text:list>
      <text:h text:style-name="Heading_20_3" text:outline-level="3"><text:bookmark-start text:name="__RefHeading__20517_459111283"/>Пользовательский регистр <text:span text:style-name="T2">(SPR)</text:span><text:bookmark-end text:name="__RefHeading__20517_459111283"/></text:h>
      <text:p text:style-name="P6">Регистр служит для хранения пользовательских данных. Сбрасывается в случае выключения питания или полного сброса компьютера.</text:p>
      <text:h text:style-name="P15" text:outline-level="1"><text:bookmark-start text:name="__RefNumPara__6276_1334049885"/><text:bookmark-start text:name="__RefHeading__10979_959909826"/>Сводная таблица портов<text:bookmark-end text:name="__RefNumPara__6276_1334049885"/><text:bookmark-end text:name="__RefHeading__10979_959909826"/></text:h>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242">Адрес порта, режим доступа</text:p>
            </table:table-cell>
            <table:table-cell table:style-name="Table23.A1" office:value-type="string">
              <text:p text:style-name="P242">Старшие адреса порта</text:p>
            </table:table-cell>
            <table:table-cell table:style-name="Table23.C1" office:value-type="string">
              <text:p text:style-name="P242">Описание</text:p>
            </table:table-cell>
          </table:table-row>
        </table:table-header-rows>
        <table:table-row>
          <table:table-cell table:style-name="Table23.A2" office:value-type="string">
            <text:p text:style-name="P243"><text:bookmark-start text:name="Порт BF"/>#xxBF<text:bookmark-end text:name="Порт BF"/></text:p>
            <text:p text:style-name="P243">RW always</text:p>
          </table:table-cell>
          <table:table-cell table:style-name="Table23.A2" office:value-type="string">
            <text:p text:style-name="P244">―</text:p>
          </table:table-cell>
          <table:table-cell table:style-name="Table23.C2" office:value-type="string">
            <text:p text:style-name="P245">Включение теневого режима портов; разрешение записи в ПЗУ, генерация NMI, разрешение записи в fontROM.</text:p>
            <table:table table:name="Table24" table:style-name="Table24">
              <table:table-column table:style-name="Table24.A"/>
              <table:table-row>
                <table:table-cell table:style-name="Table24.A1" office:value-type="string">
                  <text:p text:style-name="P245"><text:span text:style-name="T2">7..</text:span><text:span text:style-name="T176">6</text:span><text:span text:style-name="T2">: </text:span><text:span text:style-name="T1">устанавливайте</text:span><text:span text:style-name="T2"> </text:span><text:span text:style-name="T1">в</text:span><text:span text:style-name="T2"> </text:span>0 для совместимости</text:p>
                </table:table-cell>
              </table:table-row>
              <table:table-row>
                <table:table-cell table:style-name="Table24.A2" office:value-type="string">
                  <text:p text:style-name="P246">5: <text:span text:style-name="T1">если 1, разрешена установка </text:span><text:span text:style-name="T22">и вывод </text:span><text:span text:style-name="T1">цветов палитры из расширенного </text:span><text:span text:style-name="T177">цветового </text:span><text:span text:style-name="T1">диапазона </text:span><text:span text:style-name="T22">(4 бита на компоненту цвета)</text:span><text:span text:style-name="T1">. 0 после сброса. </text:span><text:span text:style-name="T178">См. </text:span><text:span text:style-name="T179">Раздел </text:span><text:span text:style-name="T179"><text:bookmark-ref text:reference-format="chapter" text:ref-name="__RefNumPara__7617_195782161">7.2.1</text:bookmark-ref></text:span></text:p>
                </table:table-cell>
              </table:table-row>
              <table:table-row>
                <table:table-cell table:style-name="Table24.A2" office:value-type="string">
                  <text:p text:style-name="P245">4: если 1, разрешено срабатывание аппаратной ловушки. 0 после сброса. См. стр. <text:bookmark-ref text:reference-format="page" text:ref-name="__RefNumPara__6533_1618013060">30</text:bookmark-ref>.</text:p>
                </table:table-cell>
              </table:table-row>
              <table:table-row>
                <table:table-cell table:style-name="Table24.A2" office:value-type="string">
                  <text:p text:style-name="P245">3: Генерация NMI для процессора. NMI выдаётся при переходе бита из 1 в 0. 0 после сброса.</text:p>
                </table:table-cell>
              </table:table-row>
              <table:table-row>
                <table:table-cell table:style-name="Table24.A2" office:value-type="string">
                  <text:p text:style-name="P245">2: если 1, то разрешается загрузка в font rom. 0 после сброса. См. стр. <text:bookmark-ref text:reference-format="page" text:ref-name="__RefNumPara__5872_1048627447">21</text:bookmark-ref>.</text:p>
                </table:table-cell>
              </table:table-row>
              <table:table-row>
                <table:table-cell table:style-name="Table24.A2" office:value-type="string">
                  <text:p text:style-name="P247">1: <text:span text:style-name="T1">если</text:span> 1, <text:span text:style-name="T1">то</text:span> запись <text:span text:style-name="T1">в</text:span> ПЗУ <text:span text:style-name="T1">разрешена.</text:span> 0 <text:span text:style-name="T1">после</text:span> <text:span text:style-name="T1">сброса.</text:span></text:p>
                </table:table-cell>
              </table:table-row>
              <table:table-row>
                <table:table-cell table:style-name="Table24.A7" office:value-type="string">
                  <text:p text:style-name="P247">0: <text:span text:style-name="T1">если</text:span> 1, <text:span text:style-name="T1">то</text:span> включены <text:span text:style-name="T1">теневые</text:span> <text:span text:style-name="T1">порты.</text:span> 0 <text:span text:style-name="T1">после</text:span> <text:span text:style-name="T1">сброса.</text:span></text:p>
                </table:table-cell>
              </table:table-row>
            </table:table>
            <text:p text:style-name="P245"><text:span text:style-name="T2">Бит 0 </text:span><text:span text:style-name="T1">этого</text:span><text:span text:style-name="T2"> порта имеет приоритет </text:span><text:span text:style-name="T1">над</text:span><text:span text:style-name="T2"> другими способами включения теневых </text:span><text:span text:style-name="T1">портов</text:span><text:span text:style-name="T2">: </text:span><text:span text:style-name="T1">теневой</text:span><text:span text:style-name="T2"> </text:span><text:span text:style-name="T1">режим</text:span><text:span text:style-name="T2"> </text:span><text:span text:style-name="T1">включается</text:span><text:span text:style-name="T2"> безусловно при </text:span><text:span text:style-name="T1">записи</text:span><text:span text:style-name="T2"> 1 </text:span><text:span text:style-name="T1">в</text:span><text:span text:style-name="T2"> </text:span><text:span text:style-name="T1">этот</text:span><text:span text:style-name="T2"> </text:span><text:span text:style-name="T1">бит.</text:span><text:span text:style-name="T2"> </text:span><text:span text:style-name="T1">При записи</text:span><text:span text:style-name="T2"> 0 </text:span><text:span text:style-name="T1">включение</text:span><text:span text:style-name="T2"> теневого </text:span><text:span text:style-name="T1">режима</text:span><text:span text:style-name="T2"> </text:span><text:span text:style-name="T1">управляется</text:span><text:span text:style-name="T2"> </text:span><text:span text:style-name="T1">другими</text:span><text:span text:style-name="T2"> способами, например портом </text:span><text:span text:style-name="T5">#xx77</text:span><text:span text:style-name="T2"> </text:span><text:span text:style-name="T1">или</text:span><text:span text:style-name="T2"> </text:span><text:span text:style-name="T1">переходом</text:span><text:span text:style-name="T2"> </text:span><text:span text:style-name="T1">в</text:span><text:span text:style-name="T2"> TR-DOS. Данный </text:span><text:span text:style-name="T1">бит</text:span><text:span text:style-name="T2"> </text:span><text:span text:style-name="T13">не</text:span><text:span text:style-name="T15"> </text:span><text:span text:style-name="T13">включает</text:span><text:span text:style-name="T2"> TR-DOS.</text:span></text:p>
            <text:p text:style-name="P248">Данный порт <text:span text:style-name="T3">отсутствует</text:span> в ATM2.</text:p>
            <text:p text:style-name="P248">При чтении: биты <text:span text:style-name="T180">4</text:span>:0 — последнее записанное значение, биты 7:<text:span text:style-name="T180">5</text:span> — не определены.</text:p>
          </table:table-cell>
        </table:table-row>
        <table:table-row>
          <table:table-cell table:style-name="Table23.A2" office:value-type="string">
            <text:p text:style-name="P243">#xx77</text:p>
            <text:p text:style-name="P243">WO shadow</text:p>
          </table:table-cell>
          <table:table-cell table:style-name="Table23.A2" office:value-type="string">
            <text:p text:style-name="P249">#FD,</text:p>
            <text:p text:style-name="P249">#BD,</text:p>
            <text:p text:style-name="P249">#BF,</text:p>
            <text:p text:style-name="P249">#FF,</text:p>
            <text:p text:style-name="P249">#FC,</text:p>
            <text:p text:style-name="P249">#BC,</text:p>
            <text:p text:style-name="P249">#BE,</text:p>
            <text:p text:style-name="P249">#FE</text:p>
          </table:table-cell>
          <table:table-cell table:style-name="Table23.C2" office:value-type="string">
            <text:p text:style-name="P245">Включение теневого режима портов; разрешение работы диспетчера памяти, разрешение записи палитры, управление турбо-режимом, <text:s/>управление видеорежимами.</text:p>
            <table:table table:name="Table25" table:style-name="Table25">
              <table:table-column table:style-name="Table25.A"/>
              <table:table-row>
                <table:table-cell table:style-name="Table25.A1" office:value-type="string">
                  <text:p text:style-name="P245">2..0: управление видеорежимами, 011 после сброса. См. стр. <text:bookmark-ref text:reference-format="page" text:ref-name="__RefHeading__11018_959909826">15</text:bookmark-ref>.</text:p>
                </table:table-cell>
              </table:table-row>
              <table:table-row>
                <table:table-cell table:style-name="Table25.A2" office:value-type="string">
                  <text:p text:style-name="P245">3: управление турбо-режимом. 0 после сброса. См. стр. <text:bookmark-ref text:reference-format="page" text:ref-name="__RefHeading__11020_959909826">15</text:bookmark-ref>.</text:p>
                </table:table-cell>
              </table:table-row>
              <table:table-row>
                <table:table-cell table:style-name="Table25.A2" office:value-type="string">
                  <text:p text:style-name="P245">A8: 0 — выключение диспетчера памяти. 0 после сброса. См. стр. <text:bookmark-ref text:reference-format="page" text:ref-name="__RefHeading__11062_959909826">11</text:bookmark-ref>.</text:p>
                </table:table-cell>
              </table:table-row>
              <table:table-row>
                <table:table-cell table:style-name="Table25.A2" office:value-type="string">
                  <text:p text:style-name="P245">A9: 0 – удержание режима включения TR-DOS и теневых портов. 0 после сброса. См. стр. <text:bookmark-ref text:reference-format="page" text:ref-name="__RefHeading__11062_959909826">11</text:bookmark-ref>.</text:p>
                </table:table-cell>
              </table:table-row>
              <table:table-row>
                <table:table-cell table:style-name="Table25.A5" office:value-type="string">
                  <text:p text:style-name="P245">A14: 0 – разрешение записи палитры. 1 после сброса. См. стр. <text:bookmark-ref text:reference-format="page" text:ref-name="__RefHeading__11064_959909826">16</text:bookmark-ref>.</text:p>
                </table:table-cell>
              </table:table-row>
            </table:table>
            <text:p text:style-name="P245"/>
          </table:table-cell>
        </table:table-row>
        <table:table-row>
          <table:table-cell table:style-name="Table23.A2" office:value-type="string">
            <text:p text:style-name="P243">#xxF7</text:p>
            <text:p text:style-name="P243">WO shadow</text:p>
          </table:table-cell>
          <table:table-cell table:style-name="Table23.A2" office:value-type="string">
            <text:p text:style-name="P243">#3F, #7F, #BF, #FF, #37, #77, #B7, #F7, <text:span text:style-name="T181">#3B, #7B, #BB, #FB</text:span></text:p>
          </table:table-cell>
          <table:table-cell table:style-name="Table23.C2" office:value-type="string">
            <text:p text:style-name="P245">Управление диспетчером страниц. Порты <text:span text:style-name="T4">#3xF7</text:span>, <text:span text:style-name="T4">#7xF7,</text:span> <text:span text:style-name="T4">#BxF7</text:span> и <text:span text:style-name="T4">#FxF7</text:span> относятся, соответственно, к окнам #0000..#3FFF, #4000..#7FFF, #8000..#BFFF и #C000..#FFFF.</text:p>
            <text:p text:style-name="P245">Формат портов <text:span text:style-name="T4">#xFF7</text:span>:</text:p>
            <table:table table:name="Table26" table:style-name="Table26">
              <table:table-column table:style-name="Table26.A"/>
              <table:table-row>
                <table:table-cell table:style-name="Table26.A1" office:value-type="string">
                  <text:p text:style-name="P245">5..0: <text:span text:style-name="T3">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26.A2" office:value-type="string">
                  <text:p text:style-name="P245">6: <text:s/>бит «ramnrom»: если 0, то в данном окне процессора включается ПЗУ, если 1 — ОЗУ.</text:p>
                </table:table-cell>
              </table:table-row>
              <table:table-row>
                <table:table-cell table:style-name="Table26.A2" office:value-type="string">
                  <text:p text:style-name="P245">7: бит «dos7ffd»: если 1, то:</text:p>
                  <text:p text:style-name="P245">для ОЗУ — в данном окне происходит подмена младших 3 или 6 бит (в зависимости от режима ZX Spectrum 128k или <text:span text:style-name="T2">pentagon</text:span> 1024k) номера страницы <text:span text:style-name="T3">неинверсными</text:span> битами из порта #7FFD.</text:p>
                  <text:p text:style-name="P245">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text:soft-page-break/>выполнение кода со смещения #3Dxx.</text:p>
                </table:table-cell>
              </table:table-row>
            </table:table>
            <text:p text:style-name="P245">Формат портов <text:span text:style-name="T4">#x7F7</text:span><text:span text:style-name="T16">:</text:span></text:p>
            <table:table table:name="Table27" table:style-name="Table27">
              <table:table-column table:style-name="Table27.A"/>
              <table:table-row>
                <table:table-cell table:style-name="Table27.A1" office:value-type="string">
                  <text:p text:style-name="P248">7..0: <text:span text:style-name="T3">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250">Формат портов <text:span text:style-name="T4">#x</text:span><text:span text:style-name="T182">B</text:span><text:span text:style-name="T4">F7</text:span><text:span text:style-name="T16">:</text:span></text:p>
            <table:table table:name="Table38" table:style-name="Table38">
              <table:table-column table:style-name="Table38.A"/>
              <table:table-row>
                <table:table-cell table:style-name="Table38.A1" office:value-type="string">
                  <text:p text:style-name="P250">0: <text:span text:style-name="T17">Режим read-only для соотв. окна. 1 – режим read-only включён. 0 после сброса компьютера. Действует в т.ч. и на ROM-страницы, предлагая дополнительный уровень защиты от записи в ROM.</text:span></text:p>
                </table:table-cell>
              </table:table-row>
            </table:table>
            <text:p text:style-name="P245"><text:span text:style-name="T16">См. стр. </text:span><text:span text:style-name="T16"><text:bookmark-ref text:reference-format="page" text:ref-name="__RefHeading__11062_959909826">11</text:bookmark-ref></text:span><text:span text:style-name="T16">.</text:span></text:p>
          </table:table-cell>
        </table:table-row>
        <table:table-row>
          <table:table-cell table:style-name="Table23.A2" office:value-type="string">
            <text:p text:style-name="P243">#7FFD</text:p>
            <text:p text:style-name="P243">WO always</text:p>
          </table:table-cell>
          <table:table-cell table:style-name="Table23.A2" office:value-type="string">
            <text:p text:style-name="P244">―</text:p>
          </table:table-cell>
          <table:table-cell table:style-name="Table23.C2" office:value-type="string">
            <text:p text:style-name="P245">Переключение страниц в окне #C000..#FFFF для режимов pentagon 1024k и ZX-Spectrum 128k, переключение экранов, блокировка 128k для режима ZX-Spectrum 128k, выбор карты памяти.</text:p>
            <text:p text:style-name="P245">В режиме ZX <text:span text:style-name="T2">Spectrum</text:span> 128k:</text:p>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office:value-type="string">
                  <text:p text:style-name="P245">6..7: не исп.</text:p>
                </table:table-cell>
                <table:table-cell table:style-name="Table28.A1" office:value-type="string">
                  <text:p text:style-name="P245">5: при записи 1 <text:s/>блокируется дальнейшая запись в порт <text:span text:style-name="T4">#7FFD</text:span>, до перехода в режим <text:span text:style-name="T2">pentagon</text:span> 1024k или до сброса. 0 после сброса.</text:p>
                </table:table-cell>
                <table:table-cell table:style-name="Table28.A1" office:value-type="string">
                  <text:p text:style-name="P245">4: выбор карты памяти. 0 после сброса.</text:p>
                </table:table-cell>
                <table:table-cell table:style-name="Table28.A1" office:value-type="string">
                  <text:p text:style-name="P245">3: выбор экрана. 0 после сброса.</text:p>
                </table:table-cell>
                <table:table-cell table:style-name="Table28.E1" office:value-type="string">
                  <text:p text:style-name="P245">2..0: замещают младшие 3 бита номера страницы, если такое замещение разрешено для какого-либо окна (см. описание портов <text:span text:style-name="T4">#xxF7</text:span>). 0 после сброса.</text:p>
                </table:table-cell>
              </table:table-row>
            </table:table>
            <text:p text:style-name="P245">В режиме <text:span text:style-name="T2">pentagon</text:span> 1024k:</text:p>
            <table:table table:name="Table29" table:style-name="Table29">
              <table:table-column table:style-name="Table29.A"/>
              <table:table-column table:style-name="Table29.B"/>
              <table:table-column table:style-name="Table29.C"/>
              <table:table-row>
                <table:table-cell table:style-name="Table29.A1" office:value-type="string">
                  <text:p text:style-name="P245">7..5, 2..0: замещают при необходимости младшие 6 бит номера страницы.</text:p>
                </table:table-cell>
                <table:table-cell table:style-name="Table29.A1" office:value-type="string">
                  <text:p text:style-name="P245">4: выбор карты памяти.</text:p>
                </table:table-cell>
                <table:table-cell table:style-name="Table29.C1" office:value-type="string">
                  <text:p text:style-name="P245">3: выбор экрана.</text:p>
                </table:table-cell>
              </table:table-row>
            </table:table>
            <text:p text:style-name="P245">См. стр. <text:bookmark-ref text:reference-format="page" text:ref-name="__RefHeading__11062_959909826">11</text:bookmark-ref>, <text:bookmark-ref text:reference-format="page" text:ref-name="__RefHeading__11166_959909826">18</text:bookmark-ref>.</text:p>
          </table:table-cell>
        </table:table-row>
        <table:table-row>
          <table:table-cell table:style-name="Table23.A2" office:value-type="string">
            <text:p text:style-name="P243">#EFF7</text:p>
            <text:p text:style-name="P243">WO noshad</text:p>
          </table:table-cell>
          <table:table-cell table:style-name="Table23.A2" office:value-type="string">
            <text:p text:style-name="P244">―</text:p>
          </table:table-cell>
          <table:table-cell table:style-name="Table23.C2" office:value-type="string">
            <text:p text:style-name="P245">Управление турбо-режимом, управление видеорежимами, управление режимами ZX-Spectrum 128k / pentagon 1024k, включение нулевой страницы ОЗУ в окно #0000..#3FFF, управление доступом к портам энергонезависимой памяти и часов.</text:p>
            <table:table table:name="Table30" table:style-name="Table30">
              <table:table-column table:style-name="Table30.A"/>
              <table:table-row>
                <table:table-cell table:style-name="Table30.A1" office:value-type="string">
                  <text:p text:style-name="P245">7: 1 разрешает доступ к портам энергонезависимой памяти и часов в нетеневом режим. См. стр. <text:bookmark-ref text:reference-format="page" text:ref-name="__RefHeading__1028_817451688">34</text:bookmark-ref>.</text:p>
                </table:table-cell>
              </table:table-row>
              <table:table-row>
                <table:table-cell table:style-name="Table30.A2" office:value-type="string">
                  <text:p text:style-name="P245">3: 1 включает в окно #0000..#3FFF нулевую страницу ОЗУ. Имеет приоритет над настройками диспетчера памяти. См. стр. <text:bookmark-ref text:reference-format="page" text:ref-name="__RefHeading__11062_959909826">11</text:bookmark-ref>.</text:p>
                </table:table-cell>
              </table:table-row>
              <table:table-row>
                <table:table-cell table:style-name="Table30.A2" office:value-type="string">
                  <text:p text:style-name="P245">2: 1 включает режим ZX Spectrum 128k. 0 – режим pentagon 1024k. См. cтр. <text:bookmark-ref text:reference-format="page" text:ref-name="__RefHeading__11062_959909826">11</text:bookmark-ref>.</text:p>
                </table:table-cell>
              </table:table-row>
              <table:table-row>
                <table:table-cell table:style-name="Table30.A2" office:value-type="string">
                  <text:p text:style-name="P245">4: управление турбо-режимом. См. стр. <text:bookmark-ref text:reference-format="page" text:ref-name="__RefHeading__11020_959909826">15</text:bookmark-ref>.</text:p>
                </table:table-cell>
              </table:table-row>
              <table:table-row>
                <table:table-cell table:style-name="Table30.A2" office:value-type="string">
                  <text:p text:style-name="P245">5, 0: управление видеорежимами. См. стр. <text:bookmark-ref text:reference-format="page" text:ref-name="__RefHeading__11018_959909826">15</text:bookmark-ref>.</text:p>
                </table:table-cell>
              </table:table-row>
            </table:table>
            <text:p text:style-name="P245">Значение всех бит порта после сброса – 0.</text:p>
          </table:table-cell>
        </table:table-row>
        <table:table-row>
          <table:table-cell table:style-name="Table23.A2" office:value-type="string">
            <text:p text:style-name="P251">#DFF7</text:p>
            <text:p text:style-name="P251">WO</text:p>
            <text:p text:style-name="P251">noshad</text:p>
            <text:p text:style-name="P251"/>
            <text:p text:style-name="P251"><text:soft-page-break/>#DEF7</text:p>
            <text:p text:style-name="P251">WO</text:p>
            <text:p text:style-name="P251">shadow</text:p>
          </table:table-cell>
          <table:table-cell table:style-name="Table23.A2" office:value-type="string">
            <text:p text:style-name="P244">―</text:p>
          </table:table-cell>
          <table:table-cell table:style-name="Table23.C2" office:value-type="string">
            <text:p text:style-name="P245">Установка адреса ячейки энергонезависимой памяти и часов.</text:p>
            <text:p text:style-name="P245"><text:span text:style-name="T3">Примечание:</text:span> в нетеневом режиме порт <text:span text:style-name="T4">#DFF7</text:span> доступен в зависимости от бита 7 порта <text:span text:style-name="T4">#EFF7</text:span>. В теневом режиме порт #<text:span text:style-name="T4">DEF7</text:span> доступен всегда.</text:p>
            <text:p text:style-name="P245">См. стр. <text:bookmark-ref text:reference-format="page" text:ref-name="__RefHeading__1028_817451688">34</text:bookmark-ref>.</text:p>
          </table:table-cell>
        </table:table-row>
        <table:table-row>
          <table:table-cell table:style-name="Table23.A2" office:value-type="string">
            <text:p text:style-name="P251">#BFF7</text:p>
            <text:p text:style-name="P251">RW</text:p>
            <text:p text:style-name="P251">noshad</text:p>
            <text:p text:style-name="P251"/>
            <text:p text:style-name="P251">#BEF7</text:p>
            <text:p text:style-name="P251">RW</text:p>
            <text:p text:style-name="P251">shadow</text:p>
          </table:table-cell>
          <table:table-cell table:style-name="Table23.A2" office:value-type="string">
            <text:p text:style-name="P244">―</text:p>
          </table:table-cell>
          <table:table-cell table:style-name="Table23.C2" office:value-type="string">
            <text:p text:style-name="P245">Чтение/запись ячейки энергонезависимой памяти и часов.</text:p>
            <text:p text:style-name="P245"><text:span text:style-name="T3">Примечание:</text:span> в нетеневом режиме порт <text:span text:style-name="T4">#BFF7</text:span> доступен в зависимости от бита 7 порта <text:span text:style-name="T4">#EFF7</text:span>. В теневом режиме порт <text:span text:style-name="T4">#BEF7</text:span> доступен всегда.</text:p>
            <text:p text:style-name="P245">См. стр. <text:bookmark-ref text:reference-format="page" text:ref-name="__RefHeading__1028_817451688">34</text:bookmark-ref>.</text:p>
          </table:table-cell>
        </table:table-row>
        <table:table-row>
          <table:table-cell table:style-name="Table23.A2" office:value-type="string">
            <text:p text:style-name="P243">#xxB<text:span text:style-name="T183">D</text:span></text:p>
            <text:p text:style-name="P243">RO/<text:span text:style-name="T183">RW</text:span> always</text:p>
          </table:table-cell>
          <table:table-cell table:style-name="Table23.A2" office:value-type="string">
            <text:p text:style-name="P243">#00, #01, #02, #03, #04, #05, #06, #07, #08, #09, #0A, #0B, #0C, #0D,</text:p>
            <text:p text:style-name="P243">#0E, <text:span text:style-name="T184">#0F, </text:span>#10, #11<text:span text:style-name="T185">, #12, </text:span><text:span text:style-name="T183">#13</text:span></text:p>
          </table:table-cell>
          <table:table-cell table:style-name="Table23.C2" office:value-type="string">
            <text:p text:style-name="P245">Порты чтения<text:span text:style-name="T1"> </text:span>конфигурации <text:span text:style-name="T186">и модификации поведения</text:span> компьютера. См. стр. <text:bookmark-ref text:reference-format="page" text:ref-name="__RefHeading__11538_959909826">27</text:bookmark-ref>.</text:p>
          </table:table-cell>
        </table:table-row>
        <table:table-row>
          <table:table-cell table:style-name="Table23.A2" office:value-type="string">
            <text:p text:style-name="P243">#xxBE</text:p>
            <text:p text:style-name="P243">WO always</text:p>
          </table:table-cell>
          <table:table-cell table:style-name="Table23.A2" office:value-type="string">
            <text:p text:style-name="P244">―</text:p>
          </table:table-cell>
          <table:table-cell table:style-name="Table23.C2" office:value-type="string">
            <text:p text:style-name="P245">Порт восстановления маппинга окна #0000..#3FFF при выходе из NMI. См. Стр. <text:bookmark-ref text:reference-format="page" text:ref-name="__RefHeading___Toc9330_2489220154">27</text:bookmark-ref>.</text:p>
          </table:table-cell>
        </table:table-row>
        <table:table-row>
          <table:table-cell table:style-name="Table23.A2" office:value-type="string">
            <text:p text:style-name="P252">#xx3B</text:p>
            <text:p text:style-name="P252">WO always</text:p>
          </table:table-cell>
          <table:table-cell table:style-name="Table23.A2" office:value-type="string">
            <text:p text:style-name="P253">#BF, #FF</text:p>
          </table:table-cell>
          <table:table-cell table:style-name="Table23.C2" office:value-type="string">
            <text:p text:style-name="P254"><text:span text:style-name="T187">Управление режимом ULAPLUS. См. стр. </text:span><text:span text:style-name="T187"><text:bookmark-ref text:reference-format="page" text:ref-name="__RefNumPara__7901_422571322">21</text:bookmark-ref></text:span><text:span text:style-name="T187">.</text:span></text:p>
          </table:table-cell>
        </table:table-row>
        <table:table-row>
          <table:table-cell table:style-name="Table23.A2" office:value-type="string">
            <text:p text:style-name="P243">#xxFE</text:p>
            <text:p text:style-name="P243">RW always</text:p>
          </table:table-cell>
          <table:table-cell table:style-name="Table23.A2" office:value-type="string">
            <text:p text:style-name="P244">―</text:p>
          </table:table-cell>
          <table:table-cell table:style-name="Table23.C2" office:value-type="string">
            <text:p text:style-name="P245">Чтение:</text:p>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P247">7: 1</text:p>
                </table:table-cell>
                <table:table-cell table:style-name="Table31.A1" office:value-type="string">
                  <text:p text:style-name="P247">6: tape_in</text:p>
                </table:table-cell>
                <table:table-cell table:style-name="Table31.A1" office:value-type="string">
                  <text:p text:style-name="P245"><text:span text:style-name="T2">5: </text:span>0</text:p>
                </table:table-cell>
                <table:table-cell table:style-name="Table31.D1" office:value-type="string">
                  <text:p text:style-name="P247">4..0: keyboard</text:p>
                </table:table-cell>
              </table:table-row>
            </table:table>
            <text:p text:style-name="P248"/>
            <text:p text:style-name="P248">Запись:</text:p>
            <table:table table:name="Table32" table:style-name="Table32">
              <table:table-column table:style-name="Table32.A" table:number-columns-repeated="3"/>
              <table:table-column table:style-name="Table32.D"/>
              <table:table-row>
                <table:table-cell table:style-name="Table32.A1" office:value-type="string">
                  <text:p text:style-name="P245">7..5: не исп.</text:p>
                </table:table-cell>
                <table:table-cell table:style-name="Table32.A1" office:value-type="string">
                  <text:p text:style-name="P245">4: <text:span text:style-name="T2">beeper</text:span></text:p>
                </table:table-cell>
                <table:table-cell table:style-name="Table32.A1" office:value-type="string">
                  <text:p text:style-name="P245">3: tape_<text:span text:style-name="T2">out</text:span></text:p>
                </table:table-cell>
                <table:table-cell table:style-name="Table32.D1" office:value-type="string">
                  <text:p text:style-name="P245">2..0: цвет бордюра</text:p>
                </table:table-cell>
              </table:table-row>
            </table:table>
            <text:p text:style-name="P248">Устанавливает цвета бордюра 0..7.</text:p>
            <text:p text:style-name="P248">См. стр. <text:bookmark-ref text:reference-format="page" text:ref-name="__RefHeading__11697_959909826">32</text:bookmark-ref>, <text:bookmark-ref text:reference-format="page" text:ref-name="__RefHeading__11777_959909826">17</text:bookmark-ref>.</text:p>
          </table:table-cell>
        </table:table-row>
        <table:table-row>
          <table:table-cell table:style-name="Table23.A2" office:value-type="string">
            <text:p text:style-name="P243">#xxF6</text:p>
            <text:p text:style-name="P243">RW always</text:p>
          </table:table-cell>
          <table:table-cell table:style-name="Table23.A2" office:value-type="string">
            <text:p text:style-name="P244">―</text:p>
          </table:table-cell>
          <table:table-cell table:style-name="Table23.C2" office:value-type="string">
            <text:p text:style-name="P245"><text:span text:style-name="T1">Полностью дублирует функционал порта </text:span><text:span text:style-name="T9">#xxFE</text:span><text:span text:style-name="T1">, за исключением того, что устанавливает цвета бордюра 8..15.</text:span></text:p>
            <text:p text:style-name="P248">См. стр. <text:bookmark-ref text:reference-format="page" text:ref-name="__RefHeading__11697_959909826">32</text:bookmark-ref>, <text:bookmark-ref text:reference-format="page" text:ref-name="__RefHeading__11777_959909826">17</text:bookmark-ref>.</text:p>
          </table:table-cell>
        </table:table-row>
        <table:table-row>
          <table:table-cell table:style-name="Table23.A2" office:value-type="string">
            <text:p text:style-name="P243">#xxFB</text:p>
            <text:p text:style-name="P243">WO always</text:p>
          </table:table-cell>
          <table:table-cell table:style-name="Table23.A2" office:value-type="string">
            <text:p text:style-name="P244">―</text:p>
          </table:table-cell>
          <table:table-cell table:style-name="Table23.C2" office:value-type="string">
            <text:p text:style-name="P245">Порт вывода 8-битного звука (covox). См. стр. <text:bookmark-ref text:reference-format="page" text:ref-name="__RefHeading__11864_959909826">33</text:bookmark-ref>.</text:p>
          </table:table-cell>
        </table:table-row>
        <table:table-row>
          <table:table-cell table:style-name="Table23.A2" office:value-type="string">
            <text:p text:style-name="P243">#FFFD</text:p>
            <text:p text:style-name="P243">RW always</text:p>
          </table:table-cell>
          <table:table-cell table:style-name="Table23.A2" office:value-type="string">
            <text:p text:style-name="P244">―</text:p>
          </table:table-cell>
          <table:table-cell table:style-name="Table23.C2" office:value-type="string">
            <text:p text:style-name="P248">Запись – выбор номера регистра AY/YM</text:p>
            <text:p text:style-name="P248">Чтение – чтение содержимого регистра AY/YM</text:p>
          </table:table-cell>
        </table:table-row>
        <table:table-row>
          <table:table-cell table:style-name="Table23.A2" office:value-type="string">
            <text:p text:style-name="P243">#BFFD</text:p>
            <text:p text:style-name="P243">WO always</text:p>
          </table:table-cell>
          <table:table-cell table:style-name="Table23.A2" office:value-type="string">
            <text:p text:style-name="P244">―</text:p>
          </table:table-cell>
          <table:table-cell table:style-name="Table23.C2" office:value-type="string">
            <text:p text:style-name="P245">Запись – запись в регистр AY/YM</text:p>
          </table:table-cell>
        </table:table-row>
        <table:table-row>
          <table:table-cell table:style-name="Table23.A2" office:value-type="string">
            <text:p text:style-name="P251">#xx1F</text:p>
            <text:p text:style-name="P251">RO noshad</text:p>
          </table:table-cell>
          <table:table-cell table:style-name="Table23.A2" office:value-type="string">
            <text:p text:style-name="P244">―</text:p>
          </table:table-cell>
          <table:table-cell table:style-name="Table23.C2" office:value-type="string">
            <text:p text:style-name="P245">Чтение состояния игрового манипулятора (kempston-джойстика).</text:p>
            <table:table table:name="Table33" table:style-name="Table33">
              <table:table-column table:style-name="Table33.A"/>
              <table:table-column table:style-name="Table33.B" table:number-columns-repeated="3"/>
              <table:table-column table:style-name="Table33.E"/>
              <table:table-column table:style-name="Table33.F"/>
              <table:table-column table:style-name="Table33.B"/>
              <table:table-column table:style-name="Table33.H"/>
              <table:table-row>
                <table:table-cell table:style-name="Table33.A1" office:value-type="string">
                  <text:p text:style-name="P245"><text:span text:style-name="T2">7: </text:span>0</text:p>
                </table:table-cell>
                <table:table-cell table:style-name="Table33.A1" office:value-type="string">
                  <text:p text:style-name="P245"><text:span text:style-name="T2">6: </text:span>0</text:p>
                </table:table-cell>
                <table:table-cell table:style-name="Table33.A1" office:value-type="string">
                  <text:p text:style-name="P245"><text:span text:style-name="T2">5: </text:span>0</text:p>
                </table:table-cell>
                <table:table-cell table:style-name="Table33.A1" office:value-type="string">
                  <text:p text:style-name="P247">4: Fire</text:p>
                </table:table-cell>
                <table:table-cell table:style-name="Table33.A1" office:value-type="string">
                  <text:p text:style-name="P247">3: Up</text:p>
                </table:table-cell>
                <table:table-cell table:style-name="Table33.A1" office:value-type="string">
                  <text:p text:style-name="P247">2: Down</text:p>
                </table:table-cell>
                <table:table-cell table:style-name="Table33.A1" office:value-type="string">
                  <text:p text:style-name="P247">1: Left</text:p>
                </table:table-cell>
                <table:table-cell table:style-name="Table33.H1" office:value-type="string">
                  <text:p text:style-name="P247">0: Right</text:p>
                </table:table-cell>
              </table:table-row>
            </table:table>
            <text:p text:style-name="P247"><text:span text:style-name="T1">См. стр. </text:span><text:span text:style-name="T1"><text:bookmark-ref text:reference-format="page" text:ref-name="__RefHeading__11955_959909826">33</text:bookmark-ref></text:span><text:span text:style-name="T1">.</text:span></text:p>
          </table:table-cell>
        </table:table-row>
        <table:table-row>
          <table:table-cell table:style-name="Table23.A2" office:value-type="string">
            <text:p text:style-name="P251">#FADF</text:p>
            <text:p text:style-name="P251">RO always</text:p>
          </table:table-cell>
          <table:table-cell table:style-name="Table23.A2" office:value-type="string">
            <text:p text:style-name="P244">―</text:p>
          </table:table-cell>
          <table:table-cell table:style-name="Table23.C2" office:value-type="string">
            <text:p text:style-name="P245">Кнопки и колесо kempston-мышки.</text:p>
            <table:table table:name="Table34" table:style-name="Table34">
              <table:table-column table:style-name="Table34.A"/>
              <table:table-column table:style-name="Table34.B"/>
              <table:table-column table:style-name="Table34.C"/>
              <table:table-column table:style-name="Table34.D"/>
              <table:table-column table:style-name="Table34.E"/>
              <table:table-row>
                <table:table-cell table:style-name="Table34.A1" office:value-type="string">
                  <text:p text:style-name="P247">7..4: Wheel counter</text:p>
                </table:table-cell>
                <table:table-cell table:style-name="Table34.A1" office:value-type="string">
                  <text:p text:style-name="P247">3: 1</text:p>
                </table:table-cell>
                <table:table-cell table:style-name="Table34.A1" office:value-type="string">
                  <text:p text:style-name="P247">2: MMB</text:p>
                </table:table-cell>
                <table:table-cell table:style-name="Table34.A1" office:value-type="string">
                  <text:p text:style-name="P247">1: RMB</text:p>
                </table:table-cell>
                <table:table-cell table:style-name="Table34.E1" office:value-type="string">
                  <text:p text:style-name="P247">0: LMB</text:p>
                </table:table-cell>
              </table:table-row>
            </table:table>
            <text:p text:style-name="P247"><text:soft-page-break/>См. стр. <text:bookmark-ref text:reference-format="page" text:ref-name="__RefHeading__12138_959909826">34</text:bookmark-ref>.</text:p>
          </table:table-cell>
        </table:table-row>
        <table:table-row>
          <table:table-cell table:style-name="Table23.A2" office:value-type="string">
            <text:p text:style-name="P251">#FBDF</text:p>
            <text:p text:style-name="P251">RO always</text:p>
          </table:table-cell>
          <table:table-cell table:style-name="Table23.A2" office:value-type="string">
            <text:p text:style-name="P244">―</text:p>
          </table:table-cell>
          <table:table-cell table:style-name="Table23.C2" office:value-type="string">
            <text:p text:style-name="P245">X-координата kempston-мышки. <text:span text:style-name="T2">См. стр. </text:span><text:span text:style-name="T2"><text:bookmark-ref text:reference-format="page" text:ref-name="__RefHeading__12138_959909826">34</text:bookmark-ref></text:span><text:span text:style-name="T2">.</text:span></text:p>
          </table:table-cell>
        </table:table-row>
        <table:table-row>
          <table:table-cell table:style-name="Table23.A2" office:value-type="string">
            <text:p text:style-name="P251">#FFDF</text:p>
            <text:p text:style-name="P251">RO always</text:p>
          </table:table-cell>
          <table:table-cell table:style-name="Table23.A2" office:value-type="string">
            <text:p text:style-name="P244">―</text:p>
          </table:table-cell>
          <table:table-cell table:style-name="Table23.C2" office:value-type="string">
            <text:p text:style-name="P245">Y-координата kempston-мышки. <text:span text:style-name="T2">См. стр. </text:span><text:span text:style-name="T2"><text:bookmark-ref text:reference-format="page" text:ref-name="__RefHeading__12138_959909826">34</text:bookmark-ref></text:span><text:span text:style-name="T2">.</text:span></text:p>
          </table:table-cell>
        </table:table-row>
        <table:table-row>
          <table:table-cell table:style-name="Table23.A2" office:value-type="string">
            <text:p text:style-name="P243">#xx77</text:p>
            <text:p text:style-name="P243">RW noshad</text:p>
          </table:table-cell>
          <table:table-cell table:style-name="Table23.A2" office:value-type="string">
            <text:p text:style-name="P244">―</text:p>
          </table:table-cell>
          <table:table-cell table:style-name="Table23.C2" office:value-type="string">
            <text:p text:style-name="P245">Управление сигналом CS на SD-карту. См. стр. <text:bookmark-ref text:reference-format="page" text:ref-name="__RefHeading__12239_959909826">40</text:bookmark-ref>.</text:p>
          </table:table-cell>
        </table:table-row>
        <table:table-row>
          <table:table-cell table:style-name="Table23.A2" office:value-type="string">
            <text:p text:style-name="P243">#xx57</text:p>
            <text:p text:style-name="P243">RW noshad, shadow</text:p>
          </table:table-cell>
          <table:table-cell table:style-name="Table23.A2" office:value-type="string">
            <text:p text:style-name="P244">―</text:p>
          </table:table-cell>
          <table:table-cell table:style-name="Table23.C2" office:value-type="string">
            <text:p text:style-name="P245">Обмен данными с SD-картой, управление сигналом CS на SD-карту в shadow-режиме. См. стр. <text:bookmark-ref text:reference-format="page" text:ref-name="__RefHeading__12239_959909826">40</text:bookmark-ref>.</text:p>
          </table:table-cell>
        </table:table-row>
        <table:table-row>
          <table:table-cell table:style-name="Table23.A2" office:value-type="string">
            <text:p text:style-name="P243">#xx10, #xx11, #xx30, #xx50, #xx70, #xx90, #xxB0, #xxD0, #xxF0, #xxC8</text:p>
            <text:p text:style-name="P243">RW always</text:p>
          </table:table-cell>
          <table:table-cell table:style-name="Table23.A2" office:value-type="string">
            <text:p text:style-name="P244">―</text:p>
          </table:table-cell>
          <table:table-cell table:style-name="Table23.C2" office:value-type="string">
            <text:p text:style-name="P245">Работа с IDE-шиной. См. стр. <text:bookmark-ref text:reference-format="page" text:ref-name="__RefHeading__12342_959909826">41</text:bookmark-ref>.</text:p>
          </table:table-cell>
        </table:table-row>
        <table:table-row>
          <table:table-cell table:style-name="Table23.A2" office:value-type="string">
            <text:p text:style-name="P243">#xx1F,</text:p>
            <text:p text:style-name="P243">#xx3F,</text:p>
            <text:p text:style-name="P243">#xx5F,</text:p>
            <text:p text:style-name="P243">#xx7F,</text:p>
            <text:p text:style-name="P243">#xxFF</text:p>
            <text:p text:style-name="P243">RW shadow</text:p>
          </table:table-cell>
          <table:table-cell table:style-name="Table23.A2" office:value-type="string">
            <text:p text:style-name="P244">―</text:p>
          </table:table-cell>
          <table:table-cell table:style-name="Table23.C2" office:value-type="string">
            <text:p text:style-name="P245">Порты контроллера дисковода. См. стр. <text:bookmark-ref text:reference-format="page" text:ref-name="__RefHeading__12344_959909826">43</text:bookmark-ref>.</text:p>
          </table:table-cell>
        </table:table-row>
        <table:table-row>
          <table:table-cell table:style-name="Table23.A2" office:value-type="string">
            <text:p text:style-name="P243">#xxFF</text:p>
            <text:p text:style-name="P243">WO shadow</text:p>
          </table:table-cell>
          <table:table-cell table:style-name="Table23.A2" office:value-type="string">
            <text:p text:style-name="P244">―</text:p>
          </table:table-cell>
          <table:table-cell table:style-name="Table23.C2" office:value-type="string">
            <text:p text:style-name="P245">Порт контроллера дисковода и <text:span text:style-name="T3">одновременно</text:span> порт записи палитры. Выполняет функцию записи палитры при установленном A14=0 в порте <text:span text:style-name="T4">#xx77</text:span> (WO, shadow). См. стр. <text:bookmark-ref text:reference-format="page" text:ref-name="__RefHeading__11064_959909826">16</text:bookmark-ref>, <text:bookmark-ref text:reference-format="page" text:ref-name="__RefHeading__12344_959909826">43</text:bookmark-ref>.</text:p>
          </table:table-cell>
        </table:table-row>
        <table:table-row>
          <table:table-cell table:style-name="Table23.A2" office:value-type="string">
            <text:p text:style-name="P243">#xxEF</text:p>
            <text:p text:style-name="P243">RW always</text:p>
          </table:table-cell>
          <table:table-cell table:style-name="Table23.A2" office:value-type="string">
            <text:p text:style-name="P243">#F8, #F9, #FA, #FB, #FC, #FD (RO), #FE, #FF</text:p>
          </table:table-cell>
          <table:table-cell table:style-name="Table23.C2" office:value-type="string">
            <text:p text:style-name="P245">Порты RS232. См. стр. <text:bookmark-ref text:reference-format="page" text:ref-name="__RefHeading__12451_959909826">44</text:bookmark-ref>.</text:p>
          </table:table-cell>
        </table:table-row>
      </table:table>
      <text:p text:style-name="Text_20_body"/>
      <text:h text:style-name="P15" text:outline-level="1"><text:bookmark-start text:name="__RefHeading__20519_459111283"/>История версий <text:span text:style-name="T188">документа</text:span><text:bookmark-end text:name="__RefHeading__20519_459111283"/></text:h>
      <text:p text:style-name="P255">Здесь описывается история изменения документа.</text:p>
      <text:p text:style-name="P255"><text:span text:style-name="T4">Внимание:</text:span> Ранее, в этой главе, отображался перечень изменений в самой конфигурации, но с зеркалированием репозитория в интернет — необходимость в этом отпала. Уже внесенные записи остались для истории.</text:p>
      <text:h text:style-name="P256" text:outline-level="2"><text:bookmark-start text:name="__RefHeading___Toc25473_993949196"/>Версия 23.07.2024<text:bookmark-end text:name="__RefHeading___Toc25473_993949196"/></text:h>
      <text:list text:style-name="L50">
        <text:list-item>
          <text:p text:style-name="P257"><text:span text:style-name="T1">Добавлен раздел </text:span><text:span text:style-name="T1"><text:bookmark-ref text:reference-format="text" text:ref-name="__RefHeading___Toc8793_178822302">Архитектура: маскируемые прерывания</text:bookmark-ref></text:span><text:span text:style-name="T1">.</text:span></text:p>
        </text:list-item>
      </text:list>
      <text:h text:style-name="P258" text:outline-level="2"><text:bookmark-start text:name="__RefHeading___Toc7994_4047076958"/>Версия 08.10.2023<text:bookmark-end text:name="__RefHeading___Toc7994_4047076958"/></text:h>
      <text:list text:style-name="L51">
        <text:list-item>
          <text:p text:style-name="P259"><text:span text:style-name="T189">Добавлено описание 7 бита регистра </text:span><text:span text:style-name="T190">LSR </text:span><text:span text:style-name="T189">порта </text:span><text:span text:style-name="T190">RS232 </text:span><text:span text:style-name="T189">см. </text:span><text:span text:style-name="T189"><text:bookmark-ref text:reference-format="chapter" text:ref-name="__RefHeading__20513_459111283">10.10.6</text:bookmark-ref></text:span><text:span text:style-name="T189">.</text:span></text:p>
        </text:list-item>
      </text:list>
      <text:h text:style-name="P260" text:outline-level="2"><text:bookmark-start text:name="__RefHeading___Toc7996_4047076958"/>Версия 04.12.2022<text:bookmark-end text:name="__RefHeading___Toc7996_4047076958"/></text:h>
      <text:list text:style-name="L52">
        <text:list-item>
          <text:p text:style-name="P261">Описан режим «trdos emulation».</text:p>
        </text:list-item>
      </text:list>
      <text:h text:style-name="P262" text:outline-level="2"><text:bookmark-start text:name="__RefHeading___Toc7862_3140968079"/>Версия <text:span text:style-name="T2">25.12.2021</text:span><text:bookmark-end text:name="__RefHeading___Toc7862_3140968079"/></text:h>
      <text:list text:style-name="L53">
        <text:list-item>
          <text:p text:style-name="P263"><text:span text:style-name="T191">Актуализировано описание портов </text:span><text:span text:style-name="T183">#xxBE </text:span><text:span text:style-name="T191">и </text:span><text:span text:style-name="T183">#xxBD.</text:span></text:p>
        </text:list-item>
      </text:list>
      <text:h text:style-name="P264" text:outline-level="2"><text:bookmark-start text:name="__RefHeading__8044_20958821051"/>Версия <text:span text:style-name="T192">22</text:span>.1<text:span text:style-name="T193">1</text:span>.20<text:span text:style-name="T193">21</text:span><text:bookmark-end text:name="__RefHeading__8044_20958821051"/></text:h>
      <text:list xml:id="list4126846734" text:style-name="L54">
        <text:list-item>
          <text:p text:style-name="P265"><text:span text:style-name="T1">Добавлено описани</text:span><text:span text:style-name="T194">е расширенного цветового диапазона см. </text:span><text:span text:style-name="T194"><text:bookmark-ref text:reference-format="chapter" text:ref-name="__RefNumPara__7617_195782161">7.2.1</text:bookmark-ref></text:span><text:span text:style-name="T194">.</text:span></text:p>
        </text:list-item>
      </text:list>
      <text:h text:style-name="P266" text:outline-level="2"><text:bookmark-start text:name="__RefHeading__8044_2095882105"/>Версия 27.10.2014<text:bookmark-end text:name="__RefHeading__8044_2095882105"/></text:h>
      <text:list text:continue-numbering="true" text:style-name="L54">
        <text:list-item>
          <text:p text:style-name="P267"><text:span text:style-name="T1">Добавлено описание функции readonly на страницы памяти (порт </text:span><text:span text:style-name="T9">#xBF7)</text:span><text:span text:style-name="T1">.</text:span></text:p>
        </text:list-item>
      </text:list>
      <text:h text:style-name="P268" text:outline-level="2"><text:bookmark-start text:name="__RefHeading__28853_121678263"/>Версия 01.10.2014<text:bookmark-end text:name="__RefHeading__28853_121678263"/></text:h>
      <text:list text:style-name="L55">
        <text:list-item>
          <text:p text:style-name="P269"><text:span text:style-name="T1">Добавлено чтение бита состояния </text:span><text:span text:style-name="T2">Num Lock </text:span><text:span text:style-name="T1">в </text:span><text:span text:style-name="T2">RTC </text:span><text:span text:style-name="T1">регистр С</text:span><text:span text:style-name="T2">;</text:span></text:p>
        </text:list-item>
        <text:list-item>
          <text:p text:style-name="P270">Добавлено чтение состояния контрольных клавиш клавиатуры <text:span text:style-name="T2">PS/2 </text:span>(<text:span text:style-name="T2">Ctrl,Alt,Shift) в RTC</text:span> регистр <text:span text:style-name="T2">D;</text:span></text:p>
        </text:list-item>
        <text:list-item>
          <text:p text:style-name="P270"><text:span text:style-name="T123">Изменена процедура обработки контрольных комбинаций с клавиатуры </text:span><text:span text:style-name="T195">PS/2.</text:span></text:p>
        </text:list-item>
      </text:list>
      <text:h text:style-name="P271" text:outline-level="2"><text:bookmark-start text:name="__RefHeading__7148_1922218393"/>Версия 29.09.2014<text:bookmark-end text:name="__RefHeading__7148_1922218393"/></text:h>
      <text:list text:style-name="L56">
        <text:list-item>
          <text:p text:style-name="P272">Уточнено поведение NMI (приведено в соответствие с тем, что реально есть в железе)</text:p>
        </text:list-item>
        <text:list-item>
          <text:p text:style-name="P272">Описано расширение ULAPLUS</text:p>
        </text:list-item>
      </text:list>
      <text:h text:style-name="P273" text:outline-level="2"><text:bookmark-start text:name="__RefHeading__7150_1922218393"/>Версия 18.05.2014<text:bookmark-end text:name="__RefHeading__7150_1922218393"/></text:h>
      <text:list xml:id="list652404638" text:style-name="L57">
        <text:list-item>
          <text:p text:style-name="P274"><text:span text:style-name="T1">Добавлен</text:span><text:span text:style-name="T153">о описание чтения различных флагов AVR.</text:span></text:p>
        </text:list-item>
      </text:list>
      <text:h text:style-name="P25" text:outline-level="2"><text:bookmark-start text:name="__RefHeading__7050_304593484"/><text:soft-page-break/>Версия <text:span text:style-name="T196">15.05.2014</text:span><text:bookmark-end text:name="__RefHeading__7050_304593484"/></text:h>
      <text:list text:continue-numbering="true" text:style-name="L57">
        <text:list-item>
          <text:p text:style-name="P275">Добавлена возможность работы с <text:span text:style-name="T2">EEPROM ATMEGA128;</text:span></text:p>
        </text:list-item>
        <text:list-item>
          <text:p text:style-name="P276"><text:span text:style-name="T1">Добавлена отправка команды сброса </text:span><text:span text:style-name="T2">PS/2</text:span><text:span text:style-name="T1"> клавиатуре, в случае ошибки работы с </text:span><text:span text:style-name="T2">PS/2 </text:span><text:span text:style-name="T1">клавиатурой</text:span><text:span text:style-name="T2">;</text:span></text:p>
        </text:list-item>
        <text:list-item>
          <text:p text:style-name="P276"><text:span text:style-name="T1">Исправлена ошибка работы с некоторыми </text:span><text:span text:style-name="T2">PS/2 </text:span><text:span text:style-name="T1">мышами.</text:span></text:p>
        </text:list-item>
      </text:list>
      <text:h text:style-name="P25" text:outline-level="2"><text:bookmark-start text:name="__RefHeading__6605_1274384796"/>Версия 13.04.2014<text:bookmark-end text:name="__RefHeading__6605_1274384796"/></text:h>
      <text:list text:style-name="L58">
        <text:list-item>
          <text:p text:style-name="P277">Исправлена ошибка при работе с пользовательской раскладкой клавиатуры.</text:p>
        </text:list-item>
      </text:list>
      <text:h text:style-name="P25" text:outline-level="2"><text:bookmark-start text:name="__RefHeading__6896_101198354"/>Версия 08.11.2013<text:bookmark-end text:name="__RefHeading__6896_101198354"/></text:h>
      <text:list text:style-name="L59">
        <text:list-item>
          <text:p text:style-name="P278">Добавлен режим «60Гц».</text:p>
        </text:list-item>
      </text:list>
      <text:h text:style-name="P25" text:outline-level="2"><text:bookmark-start text:name="__RefHeading__6898_101198354"/>Версия 2<text:span text:style-name="T2">9</text:span>.1<text:span text:style-name="T2">1</text:span>.2012<text:bookmark-end text:name="__RefHeading__6898_101198354"/></text:h>
      <text:list xml:id="list3673579948" text:style-name="L60">
        <text:list-item>
          <text:p text:style-name="P279">Добавлена аппаратная ловушка.</text:p>
        </text:list-item>
      </text:list>
      <text:h text:style-name="P25" text:outline-level="2"><text:bookmark-start text:name="__RefHeading__20521_459111283"/>Версия 13.02.2012<text:bookmark-end text:name="__RefHeading__20521_459111283"/></text:h>
      <text:list text:continue-numbering="true" text:style-name="L60">
        <text:list-item>
          <text:p text:style-name="P280"><text:span text:style-name="T1">Добавлен доступ к <text:s/></text:span><text:span text:style-name="T2">PS2 </text:span><text:span text:style-name="T1">клавиатуре;</text:span></text:p>
        </text:list-item>
        <text:list-item>
          <text:p text:style-name="P279">Исправлена ошибка клавиатуры проявляющаяся при нажатии нескольких клавиш;</text:p>
        </text:list-item>
        <text:list-item>
          <text:p text:style-name="P280"><text:span text:style-name="T1">Скорректирована работа </text:span><text:span text:style-name="T2">IDE </text:span><text:span text:style-name="T1">контроллера;</text:span></text:p>
        </text:list-item>
        <text:list-item>
          <text:p text:style-name="P279">Добавлен текстовый видеорежим в одной странице;</text:p>
        </text:list-item>
        <text:list-item>
          <text:p text:style-name="P279">Изменено описание входа в NMI в соответствии с изменениями в прошивке FPGA;</text:p>
        </text:list-item>
        <text:list-item>
          <text:p text:style-name="P279">Добавлена в описание сводная таблица портов.</text:p>
        </text:list-item>
      </text:list>
      <text:h text:style-name="P25" text:outline-level="2"><text:bookmark-start text:name="__RefHeading__20523_459111283"/>Версия 29.09.2011<text:bookmark-end text:name="__RefHeading__20523_459111283"/></text:h>
      <text:list text:style-name="L61">
        <text:list-item>
          <text:p text:style-name="P281">Добавлен ФАПЧ для ВГ93;</text:p>
        </text:list-item>
        <text:list-item>
          <text:p text:style-name="P282"><text:span text:style-name="T1">Скорректирована обработка линии </text:span><text:span text:style-name="T2">RTS </text:span><text:span text:style-name="T1">коммуникационного порта;</text:span></text:p>
        </text:list-item>
        <text:list-item>
          <text:p text:style-name="P282"><text:span text:style-name="T1">Добавлен выбор </text:span><text:span text:style-name="T2">BCD/HEX </text:span><text:span text:style-name="T1">в эмуляции работы </text:span><text:span text:style-name="T2">GLUK </text:span><text:span text:style-name="T1">часов;</text:span></text:p>
        </text:list-item>
        <text:list-item>
          <text:p text:style-name="P282"><text:span text:style-name="T1">Изменен алгоритм обработки </text:span><text:span text:style-name="T2">NMI.</text:span></text:p>
        </text:list-item>
      </text:list>
      <text:h text:style-name="P25" text:outline-level="2"><text:bookmark-start text:name="__RefHeading__20525_459111283"/>Версия 11.06.2011<text:bookmark-end text:name="__RefHeading__20525_459111283"/></text:h>
      <text:list text:style-name="L62">
        <text:list-item>
          <text:p text:style-name="P283"><text:span text:style-name="T1">Добавлен обработчик </text:span><text:span text:style-name="T2">NMI;</text:span></text:p>
        </text:list-item>
        <text:list-item>
          <text:p text:style-name="P284">Добавлена работа с текстовым режимом и поддержка шрифтов;</text:p>
        </text:list-item>
        <text:list-item>
          <text:p text:style-name="P284">Скорректирована процедура инициализации <text:span text:style-name="T2">PS/2 </text:span>мыши;</text:p>
        </text:list-item>
        <text:list-item>
          <text:p text:style-name="P284">Добавлено управление <text:span text:style-name="T2">NMI <text:s/></text:span>с внешних контактов (для плат <text:span text:style-name="T2">revision </text:span>A и B <text:s/><text:span text:style-name="T2">- </text:span>замыканием контактов <text:span text:style-name="T2">“Turbo”).</text:span></text:p>
        </text:list-item>
      </text:list>
      <text:h text:style-name="P25" text:outline-level="2"><text:bookmark-start text:name="__RefHeading__20527_459111283"/><text:soft-page-break/>Версия 11.05.2011<text:bookmark-end text:name="__RefHeading__20527_459111283"/></text:h>
      <text:list text:style-name="L63">
        <text:list-item>
          <text:p text:style-name="P285"><text:span text:style-name="T1">Добавлена поддержка нативного режим для делителя скорости </text:span><text:span text:style-name="T2">RS232;</text:span></text:p>
        </text:list-item>
        <text:list-item>
          <text:p text:style-name="P286">Учитывается управление умножителем частоты <text:span text:style-name="T2">ICS501M</text:span> (для плат <text:span text:style-name="T2">revision C).</text:span></text:p>
        </text:list-item>
      </text:list>
      <text:h text:style-name="P25" text:outline-level="2"><text:bookmark-start text:name="__RefHeading__20529_459111283"/>Версия 26.04.2011<text:bookmark-end text:name="__RefHeading__20529_459111283"/></text:h>
      <text:list text:style-name="L64">
        <text:list-item>
          <text:p text:style-name="P287"><text:span text:style-name="T1">Добавлена поддержка коммуникационного интерфейса </text:span><text:span text:style-name="T2">(RS232)</text:span><text:span text:style-name="T1">;</text:span></text:p>
        </text:list-item>
        <text:list-item>
          <text:p text:style-name="P288">Повышена надежность загрузки <text:span text:style-name="T2">FPGA;</text:span></text:p>
        </text:list-item>
        <text:list-item>
          <text:p text:style-name="P288">Повышена надежность работы с <text:span text:style-name="T2">RTC (</text:span>исправлена ошибка, проявляющаяся на некоторых платах).</text:p>
        </text:list-item>
      </text:list>
      <text:h text:style-name="P25" text:outline-level="2"><text:bookmark-start text:name="__RefHeading__20531_459111283"/>Версия 30.03.2011<text:bookmark-end text:name="__RefHeading__20531_459111283"/></text:h>
      <text:list text:style-name="L65">
        <text:list-item>
          <text:p text:style-name="P289">Поправлено описание портов кемпстон-мышки.</text:p>
        </text:list-item>
        <text:list-item>
          <text:p text:style-name="P289">Добавлено описание ковокса.</text:p>
        </text:list-item>
        <text:list-item>
          <text:p text:style-name="P289">Поправлены рекомендуемые значения старшего байта адреса для порта #xx77.</text:p>
        </text:list-item>
        <text:list-item>
          <text:p text:style-name="P289">Добавлено описание поддерживаемых видеорежимов.</text:p>
        </text:list-item>
        <text:list-item>
          <text:p text:style-name="P290"><text:span text:style-name="T1">Добавлен доступ к дополнительным ячейкам </text:span><text:span text:style-name="T2">NVRAM (</text:span><text:span text:style-name="T1">0</text:span><text:span text:style-name="T2">x40..0xEF).</text:span></text:p>
        </text:list-item>
      </text:list>
      <text:h text:style-name="P25" text:outline-level="2"><text:bookmark-start text:name="__RefHeading__20533_459111283"/>Версия 07.12.2010<text:bookmark-end text:name="__RefHeading__20533_459111283"/></text:h>
      <text:list text:style-name="L66">
        <text:list-item>
          <text:p text:style-name="P291">Добавлена регулировка разрешения PS/2 мыши.</text:p>
        </text:list-item>
        <text:list-item>
          <text:p text:style-name="P291">Маппер клавиатуры <text:span text:style-name="T2">PS/2 </text:span>в <text:span text:style-name="T2">ZX </text:span>реализован без использования <text:span text:style-name="T2">RAM </text:span>микроконтроллера.</text:p>
        </text:list-item>
      </text:list>
      <text:h text:style-name="P25" text:outline-level="2"><text:bookmark-start text:name="__RefHeading__20535_459111283"/>Версия <text:span text:style-name="T2">29.11.2010</text:span><text:bookmark-end text:name="__RefHeading__20535_459111283"/></text:h>
      <text:list text:style-name="L67">
        <text:list-item>
          <text:p text:style-name="P292"><text:span text:style-name="T1">Реализован выбор </text:span><text:span text:style-name="T2">(«Num Lock») </text:span><text:span text:style-name="T1">и индикация </text:span><text:span text:style-name="T2">(Num Lock led) </text:span><text:span text:style-name="T1">режима аудиовыхода (</text:span><text:span text:style-name="T2">beeper</text:span><text:span text:style-name="T1">/</text:span><text:span text:style-name="T2">tapeout).</text:span></text:p>
        </text:list-item>
        <text:list-item>
          <text:p text:style-name="P293">Поддержан маппер клавиатуры <text:span text:style-name="T2">PS/2 </text:span>в <text:span text:style-name="T2">ZX </text:span>для всех дополнительных кодов клавиатуры (<text:span text:style-name="T2">E0 xx).</text:span></text:p>
        </text:list-item>
        <text:list-item>
          <text:p text:style-name="P293">Скорректирован менеджер памяти и видимость портов в различных режимах.</text:p>
        </text:list-item>
      </text:list>
      <text:h text:style-name="P25" text:outline-level="2"><text:bookmark-start text:name="__RefHeading__20537_459111283"/>Версия <text:span text:style-name="T2">17.10.2010</text:span><text:bookmark-end text:name="__RefHeading__20537_459111283"/></text:h>
      <text:list text:style-name="L68">
        <text:list-item>
          <text:p text:style-name="P294">Поддержка загрузки с магнитофонного входа.</text:p>
        </text:list-item>
        <text:list-item>
          <text:p text:style-name="P295"><text:span text:style-name="T1">Скорректировано управление ресетами с </text:span><text:span text:style-name="T2">PS/2 </text:span><text:span text:style-name="T1">клавиатуры </text:span><text:span text:style-name="T2">(«F12» </text:span><text:span text:style-name="T1">и </text:span><text:span text:style-name="T2">«CTRL‑ALT‑DEL»).</text:span></text:p>
        </text:list-item>
        <text:list-item>
          <text:p text:style-name="P294">Реализован менеджер для всей памяти (<text:span text:style-name="T2">ROM </text:span>и <text:span text:style-name="T2">RAM).</text:span></text:p>
        </text:list-item>
        <text:list-item>
          <text:p text:style-name="P294">Оптимизирована работа с <text:span text:style-name="T2">PS/2 </text:span>устройствами.</text:p>
        </text:list-item>
        <text:list-item>
          <text:p text:style-name="P294">Поддержан маппер <text:span text:style-name="T2">PS/2 </text:span>в <text:span text:style-name="T2">ZX </text:span>клавиатуру (пока без возможности редактирования)<text:span text:style-name="T2">.</text:span></text:p>
        </text:list-item>
        <text:list-item>
          <text:p text:style-name="P294">Реализованы расширения <text:span text:style-name="T2">nemo-ide.</text:span></text:p>
        </text:list-item>
      </text:list>
      <text:h text:style-name="Heading_20_2" text:outline-level="2"><text:bookmark-start text:name="__RefHeading__20539_459111283"/><text:soft-page-break/>Версия <text:span text:style-name="T2">30.03.2010</text:span><text:bookmark-end text:name="__RefHeading__20539_459111283"/></text:h>
      <text:list xml:id="list3188455457" text:style-name="L69">
        <text:list-item>
          <text:p text:style-name="P296">Исправлена ошибка загрузки <text:span text:style-name="T2">FPGA.</text:span></text:p>
        </text:list-item>
      </text:list>
      <text:h text:style-name="Heading_20_2" text:outline-level="2"><text:bookmark-start text:name="__RefHeading__20541_459111283"/>Версия <text:span text:style-name="T2">28.03.2010</text:span><text:bookmark-end text:name="__RefHeading__20541_459111283"/></text:h>
      <text:list xml:id="list232035084842267" text:continue-numbering="true" text:style-name="L69">
        <text:list-item>
          <text:p text:style-name="P296">Исправлена обработка ошибок <text:span text:style-name="T2">PS/2 </text:span>мыши. Реинициализация мыши в случае ошибок обмена.</text:p>
        </text:list-item>
        <text:list-item>
          <text:p text:style-name="P296">Поддержка получения версии базовой конфигурации и бутлоадера.</text:p>
        </text:list-item>
        <text:list-item>
          <text:p text:style-name="P297"><text:span text:style-name="T1">Исправлена обработка ошибок тайм аута обмена с </text:span><text:span text:style-name="T2">PS/2 </text:span><text:span text:style-name="T1">устройствами. </text:span></text:p>
        </text:list-item>
      </text:list>
      <text:h text:style-name="Heading_20_2" text:outline-level="2"><text:bookmark-start text:name="__RefHeading__20543_459111283"/>Версия <text:span text:style-name="T2">24.03.2010</text:span><text:bookmark-end text:name="__RefHeading__20543_459111283"/></text:h>
      <text:list text:continue-numbering="true" text:style-name="L69">
        <text:list-item>
          <text:p text:style-name="P296">Исправлено поведение светодиода питания (<text:span text:style-name="T2">Pwr Led), </text:span>теперь выключается если основное питание отключено.</text:p>
        </text:list-item>
        <text:list-item>
          <text:p text:style-name="P297">Управление сигналом <text:span text:style-name="T2">NMI </text:span><text:span text:style-name="T1">на </text:span><text:span text:style-name="T2">ZX </text:span><text:span text:style-name="T1">с помощью кнопки «</text:span><text:span text:style-name="T2">Print Screen</text:span><text:span text:style-name="T1">» </text:span><text:span text:style-name="T2">PS2 </text:span><text:span text:style-name="T1">клавиатуры.</text:span></text:p>
        </text:list-item>
        <text:list-item>
          <text:p text:style-name="P297"><text:span text:style-name="T1">Мягкий сброс компьютера </text:span><text:span text:style-name="T2">(</text:span><text:span text:style-name="T1">без перезагрузки </text:span><text:span text:style-name="T2">fpga)</text:span><text:span text:style-name="T1"> при замыкании контактов «</text:span><text:span text:style-name="T2">soft reset</text:span><text:span text:style-name="T1">» на плате. </text:span></text:p>
        </text:list-item>
      </text:list>
      <text:h text:style-name="Heading_20_2" text:outline-level="2"><text:bookmark-start text:name="__RefHeading__20545_459111283"/>Версия 10.03.2010<text:bookmark-end text:name="__RefHeading__20545_459111283"/></text:h>
      <text:list text:style-name="L70">
        <text:list-item>
          <text:p text:style-name="P298">Добавлена индикация режима <text:span text:style-name="T2">TV</text:span><text:span text:style-name="T1">/</text:span><text:span text:style-name="T2">VGA </text:span><text:span text:style-name="T1">на индикаторе «</text:span><text:span text:style-name="T2">Scroll Lock</text:span><text:span text:style-name="T1">» </text:span><text:span text:style-name="T2">PS2 </text:span><text:span text:style-name="T1">клавиатуры (горящий светодиод — </text:span><text:span text:style-name="T2">VGA, </text:span><text:span text:style-name="T1">не горящий </text:span><text:span text:style-name="T2">TV)</text:span><text:span text:style-name="T1">.</text:span></text:p>
        </text:list-item>
        <text:list-item>
          <text:p text:style-name="P299">Исправлена ошибка отображения <text:span text:style-name="T2">NVRAM, </text:span>используемой в <text:span text:style-name="T2">GLUK, </text:span>в <text:span text:style-name="T2">NVRAM PCF8583.</text:span></text:p>
        </text:list-item>
        <text:list-item>
          <text:p text:style-name="P299">Исправлена ошибка в<text:span text:style-name="T2"> </text:span>эмуляции часов <text:span text:style-name="T2">GLUK, </text:span>реализована эмуляция <text:span text:style-name="T2">Update flag </text:span>в регистре <text:span text:style-name="T2">C.</text:span></text:p>
        </text:list-item>
        <text:list-item>
          <text:p text:style-name="P299">Реализовано сохранение режима компьютера в <text:span text:style-name="T2">NVRAM.</text:span></text:p>
        </text:list-item>
        <text:list-item>
          <text:p text:style-name="P299">Добавлена поддержка механической <text:span text:style-name="T2">ZX </text:span>клавиатуры.</text:p>
        </text:list-item>
        <text:list-item>
          <text:p text:style-name="P299">Добавлена поддержка <text:span text:style-name="T2">Kempston </text:span>джойстика.</text:p>
        </text:list-item>
      </text:list>
      <text:h text:style-name="Heading_20_2" text:outline-level="2"><text:bookmark-start text:name="__RefHeading__20547_459111283"/>Версия 04.02.2010<text:bookmark-end text:name="__RefHeading__20547_459111283"/></text:h>
      <text:p text:style-name="Text_20_body">Базовая версия (1.00 в<text:span text:style-name="T2"> SV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face style:name="Tahoma" svg:font-family="Tahoma"/>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1" fo:font-size="12pt" fo:language="ru" fo:country="RU"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1" fo:font-size="12pt" fo:language="ru" fo:country="RU"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Title" style:next-style-name="Text_20_body" style:default-outline-level="1" style:class="chapter">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leader-style="dotted" style:leader-text="."/>
        </style:tab-stops>
      </style:paragraph-properties>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Title" style:next-style-name="Text_20_body" style:default-outline-level="3" style:class="chapter">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chapter">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Illustration" style:family="paragraph" style:parent-style-name="Caption" style:class="extra"/>
    <style:style style:name="Рис." style:family="paragraph" style:parent-style-name="Caption"/>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text-properties fo:background-color="transparent"/>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99ccff" fo:padding="0.0591in" fo:border="0.06pt solid #000000"/>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99ccff"/>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language="ru" fo:country="RU" fo:font-style="italic" style:font-style-asian="italic" style:font-style-complex="italic"/>
    </style:style>
    <style:style style:name="MP2"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Базовая конфигурация для <text:span text:style-name="MT1">ZX Evolution</text:span></text:p>
      </style:header>
      <style:footer>
        <text:p text:style-name="MP2"><text:page-number text:select-page="current">55</text:page-number></text:p>
      </style:footer>
    </style:master-page>
    <style:master-page style:name="First_20_Page" style:display-name="First Page" style:page-layout-name="Mpm2" draw:style-name="Mdp1" style:next-style-name="Standard"/>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CHRV </meta:initial-creator>
    <meta:creation-date>2010-01-05T22:44:39.75</meta:creation-date>
    <meta:generator>LibreOffice/25.2.7.2$Linux_X86_64 LibreOffice_project/520$Build-2</meta:generator>
    <dc:date>2026-01-01T23:20:33.618167798</dc:date>
    <meta:editing-duration>P5DT5H50M32S</meta:editing-duration>
    <meta:editing-cycles>452</meta:editing-cycles>
    <meta:document-statistic meta:table-count="55" meta:image-count="2" meta:object-count="0" meta:page-count="55" meta:paragraph-count="1534" meta:word-count="12664" meta:character-count="86593" meta:non-whitespace-character-count="74841"/>
    <meta:user-defined meta:name="Поле 1"/>
    <meta:user-defined meta:name="Поле 2"/>
    <meta:user-defined meta:name="Поле 3"/>
    <meta:user-defined meta:name="Поле 4"/>
  </office:meta>
</office:document-meta>
</file>