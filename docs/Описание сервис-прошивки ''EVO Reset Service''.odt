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F30000017D28346751.png" manifest:media-type="image/png"/>
  <manifest:file-entry manifest:full-path="Pictures/10000001000000C6000001056C9701AD.png" manifest:media-type="image/png"/>
  <manifest:file-entry manifest:full-path="Pictures/100000000000020B0000012E60E84E30.png" manifest:media-type="image/png"/>
  <manifest:file-entry manifest:full-path="Pictures/10000000000001690000001C92C45075.png" manifest:media-type="image/png"/>
  <manifest:file-entry manifest:full-path="Pictures/100000000000012800000107A175B74F.png" manifest:media-type="image/png"/>
  <manifest:file-entry manifest:full-path="Pictures/1000000100000153000000B2BB660F6E.png" manifest:media-type="image/png"/>
  <manifest:file-entry manifest:full-path="Pictures/10000001000000D200000082052B7BB9.png" manifest:media-type="image/png"/>
  <manifest:file-entry manifest:full-path="Pictures/10000000000000C600000086A67FD1D2.png" manifest:media-type="image/png"/>
  <manifest:file-entry manifest:full-path="Pictures/10000001000002810000018FC16A524A.png" manifest:media-type="image/png"/>
  <manifest:file-entry manifest:full-path="Pictures/10000001000001080000005718203E8C.png" manifest:media-type="image/png"/>
  <manifest:file-entry manifest:full-path="Pictures/100000010000008E000000CC7394CF41.png" manifest:media-type="image/png"/>
  <manifest:file-entry manifest:full-path="Pictures/100000010000010900000078283F2F11.png" manifest:media-type="image/png"/>
  <manifest:file-entry manifest:full-path="Pictures/100000010000028200000191E00675BF.png" manifest:media-type="image/png"/>
  <manifest:file-entry manifest:full-path="Pictures/1000000100000089000000894601DFDA.png" manifest:media-type="image/png"/>
  <manifest:file-entry manifest:full-path="Pictures/10000001000000F10000002881851138.png" manifest:media-type="image/png"/>
  <manifest:file-entry manifest:full-path="Pictures/10000001000001F500000182135C0BA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2"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3" style:family="paragraph" style:parent-style-name="Contents_20_1">
      <style:paragraph-properties>
        <style:tab-stops>
          <style:tab-stop style:position="16.997cm" style:type="right" style:leader-style="dotted" style:leader-text="."/>
        </style:tab-stops>
      </style:paragraph-properties>
    </style:style>
    <style:style style:name="P4" style:family="paragraph" style:parent-style-name="Contents_20_2">
      <style:paragraph-properties>
        <style:tab-stops>
          <style:tab-stop style:position="16.997cm" style:type="right" style:leader-style="dotted" style:leader-text="."/>
        </style:tab-stops>
      </style:paragraph-properties>
    </style:style>
    <style:style style:name="P5" style:family="paragraph" style:parent-style-name="Contents_20_3">
      <style:paragraph-properties>
        <style:tab-stops>
          <style:tab-stop style:position="16.997cm" style:type="right" style:leader-style="dotted" style:leader-text="."/>
        </style:tab-stops>
      </style:paragraph-properties>
    </style:style>
    <style:style style:name="P6" style:family="paragraph" style:parent-style-name="Contents_20_6">
      <style:paragraph-properties>
        <style:tab-stops>
          <style:tab-stop style:position="16.997cm" style:type="right" style:leader-style="dotted" style:leader-text="."/>
        </style:tab-stops>
      </style:paragraph-properties>
    </style:style>
    <style:style style:name="P7" style:family="paragraph" style:parent-style-name="Standard">
      <style:paragraph-properties fo:margin-left="0cm" fo:margin-right="0cm" fo:text-align="center" style:justify-single-word="false" fo:text-indent="0.594cm" style:auto-text-indent="false"/>
      <style:text-properties officeooo:paragraph-rsid="00718366"/>
    </style:style>
    <style:style style:name="P8" style:family="paragraph" style:parent-style-name="Heading_20_1" style:list-style-name="">
      <style:paragraph-properties fo:text-align="center" style:justify-single-word="false"/>
    </style:style>
    <style:style style:name="P9" style:family="paragraph" style:parent-style-name="Heading_20_1">
      <style:paragraph-properties fo:text-align="center" style:justify-single-word="false" fo:break-before="page"/>
    </style:style>
    <style:style style:name="P10" style:family="paragraph" style:parent-style-name="Heading_20_2">
      <style:paragraph-properties fo:text-align="center" style:justify-single-word="false"/>
      <style:text-properties officeooo:paragraph-rsid="008b08a5"/>
    </style:style>
    <style:style style:name="P11"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officeooo:rsid="008b08a5" officeooo:paragraph-rsid="008b08a5"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rsid="008b08a5" officeooo:paragraph-rsid="008b08a5"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rsid="008b08a5" officeooo:paragraph-rsid="00ea84da"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officeooo:rsid="009e4fe6" officeooo:paragraph-rsid="009e4fe6" style:font-size-asian="12pt" style:font-weight-asian="normal" style:font-size-complex="12pt" style:font-weight-complex="normal"/>
    </style:style>
    <style:style style:name="P15" style:family="paragraph" style:parent-style-name="Heading_20_2">
      <style:paragraph-properties fo:text-align="center" style:justify-single-word="false"/>
    </style:style>
    <style:style style:name="P16"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19"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en" fo:country="US" fo:font-weight="normal" style:font-size-asian="12pt" style:font-weight-asian="normal" style:font-size-complex="12pt" style:font-weight-complex="normal"/>
    </style:style>
    <style:style style:name="P20"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loext:opacity="100%" style:font-name="Times New Roman" fo:font-size="16pt" fo:language="ru" fo:country="RU" fo:font-weight="bold" style:font-size-asian="16pt" style:font-weight-asian="bold" style:font-size-complex="16pt" style:font-weight-complex="bold"/>
    </style:style>
    <style:style style:name="P21"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ru" fo:country="RU" fo:font-weight="normal" style:font-size-asian="12pt" style:font-weight-asian="normal" style:font-size-complex="12pt" style:font-weight-complex="normal"/>
    </style:style>
    <style:style style:name="P2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loext:opacity="100%" style:font-name="Times New Roman" fo:font-size="12pt" fo:language="ru" fo:country="RU" fo:font-weight="normal" style:font-size-asian="12pt" style:font-weight-asian="normal" style:font-size-complex="12pt" style:font-weight-complex="normal"/>
    </style:style>
    <style:style style:name="P23" style:family="paragraph" style:parent-style-name="Heading_20_3">
      <style:paragraph-properties fo:text-align="center" style:justify-single-word="false"/>
    </style:style>
    <style:style style:name="P2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2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2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27" style:family="paragraph" style:parent-style-name="Text_20_body">
      <style:paragraph-properties fo:text-align="center" style:justify-single-word="false"/>
    </style:style>
    <style:style style:name="P2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6d5e0" officeooo:paragraph-rsid="0076d5e0" style:font-weight-asian="bold" style:font-weight-complex="bold"/>
    </style:style>
    <style:style style:name="P2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b58744" style:font-weight-asian="normal" style:font-weight-complex="normal"/>
    </style:style>
    <style:style style:name="P3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f3828" officeooo:paragraph-rsid="006f3828" style:font-weight-asian="normal" style:font-weight-complex="normal"/>
    </style:style>
    <style:style style:name="P3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b58744" officeooo:paragraph-rsid="00b58744" style:font-weight-asian="normal" style:font-weight-complex="normal"/>
    </style:style>
    <style:style style:name="P3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a9f001" officeooo:paragraph-rsid="00a9f001" style:font-weight-asian="normal" style:font-weight-complex="normal"/>
    </style:style>
    <style:style style:name="P3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e41ef6" style:font-weight-asian="normal" style:font-weight-complex="normal"/>
    </style:style>
    <style:style style:name="P3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e5b81e" officeooo:paragraph-rsid="00e5b81e" style:font-weight-asian="normal" style:font-weight-complex="normal"/>
    </style:style>
    <style:style style:name="P3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36"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text-properties fo:language="ru" fo:country="RU"/>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8"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loext:opacity="100%" style:font-name="Times New Roman" fo:font-size="12pt" fo:language="ru" fo:country="RU" fo:font-weight="normal" fo:background-color="#ffffff" style:font-size-asian="12pt" style:font-weight-asian="normal" style:font-size-complex="12pt" style:font-weight-complex="normal"/>
    </style:style>
    <style:style style:name="P39" style:family="paragraph" style:parent-style-name="Heading_20_2">
      <style:paragraph-properties fo:text-align="center" style:justify-single-word="false"/>
      <style:text-properties fo:language="ru" fo:country="RU" officeooo:rsid="005aa1ac" officeooo:paragraph-rsid="005aa1ac"/>
    </style:style>
    <style:style style:name="P40"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text-indent="0.6cm" style:auto-text-indent="false" style:page-number="auto" fo:background-color="transparent"/>
    </style:style>
    <style:style style:name="P41" style:family="paragraph" style:parent-style-name="Text_20_body">
      <loext:graphic-properties draw:fill="none"/>
      <style:paragraph-properties fo:margin-left="0cm" fo:margin-right="0cm" fo:margin-top="0cm" fo:margin-bottom="0.212cm" style:contextual-spacing="false" fo:text-align="justify" style:justify-single-word="false" fo:text-indent="0.6cm" style:auto-text-indent="false" fo:background-color="transparent"/>
    </style:style>
    <style:style style:name="P4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f9bfcb" officeooo:paragraph-rsid="00f9bfcb" style:font-weight-asian="normal" style:font-weight-complex="normal"/>
    </style:style>
    <style:style style:name="P4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f9bfcb" style:font-weight-asian="normal" style:font-weight-complex="normal"/>
    </style:style>
    <style:style style:name="P4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fbb609" officeooo:paragraph-rsid="00fbb609" style:font-weight-asian="normal" style:font-weight-complex="normal"/>
    </style:style>
    <style:style style:name="P4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rsid="00fbb609" officeooo:paragraph-rsid="00fbb609" style:font-weight-asian="normal" style:font-weight-complex="normal"/>
    </style:style>
    <style:style style:name="P46" style:family="paragraph" style:parent-style-name="Heading_20_2">
      <style:paragraph-properties fo:text-align="center" style:justify-single-word="false"/>
      <style:text-properties fo:language="ru" fo:country="RU"/>
    </style:style>
    <style:style style:name="P47"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fo:language="ru" fo:country="RU" officeooo:rsid="01043171" officeooo:paragraph-rsid="01043171"/>
    </style:style>
    <style:style style:name="P48"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fo:language="ru" fo:country="RU" officeooo:rsid="010ea3ad" officeooo:paragraph-rsid="010ea3ad"/>
    </style:style>
    <style:style style:name="P49"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fo:language="en" fo:country="US" officeooo:rsid="010ea3ad" officeooo:paragraph-rsid="010ea3ad"/>
    </style:style>
    <style:style style:name="P5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style:style>
    <style:style style:name="P5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style>
    <style:style style:name="P5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officeooo:rsid="0061aa08" officeooo:paragraph-rsid="0061aa08"/>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1aa08" officeooo:paragraph-rsid="0061aa08" style:font-weight-asian="normal" style:font-weight-complex="normal"/>
    </style:style>
    <style:style style:name="P5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1aa08" officeooo:paragraph-rsid="0105f3a0" style:font-weight-asian="normal" style:font-weight-complex="normal"/>
    </style:style>
    <style:style style:name="P5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bee97e" style:font-weight-asian="normal" style:font-weight-complex="normal"/>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b8f851" officeooo:paragraph-rsid="00bee97e" style:font-weight-asian="normal" style:font-weight-complex="normal"/>
    </style:style>
    <style:style style:name="P5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105f3a0" style:font-weight-asian="normal" style:font-weight-complex="normal"/>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officeooo:paragraph-rsid="00956e77"/>
    </style:style>
    <style:style style:name="P59" style:family="paragraph" style:parent-style-name="Standard">
      <loext:graphic-properties draw:fill="solid" draw:fill-color="#ffffff" draw:opacity="100%"/>
      <style:paragraph-properties fo:margin-left="0cm" fo:margin-right="0cm" fo:text-align="justify" style:justify-single-word="false" fo:text-indent="0.557cm" style:auto-text-indent="false" fo:break-before="page" fo:background-color="#ffffff"/>
      <style:text-properties fo:language="ru" fo:country="RU" fo:font-weight="normal" style:font-weight-asian="normal" style:font-weight-complex="normal"/>
    </style:style>
    <style:style style:name="P60" style:family="paragraph" style:parent-style-name="Table_20_Contents">
      <style:paragraph-properties fo:text-align="center" style:justify-single-word="false"/>
      <style:text-properties fo:language="ru" fo:country="RU"/>
    </style:style>
    <style:style style:name="P61" style:family="paragraph" style:parent-style-name="Table_20_Contents">
      <style:paragraph-properties fo:text-align="center" style:justify-single-word="false"/>
    </style:style>
    <style:style style:name="P62"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6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64" style:family="paragraph" style:parent-style-name="Table_20_Contents">
      <style:paragraph-properties fo:text-align="center" style:justify-single-word="false"/>
      <style:text-properties fo:font-weight="normal" style:font-weight-asian="normal" style:font-weight-complex="normal"/>
    </style:style>
    <style:style style:name="P65"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66" style:family="paragraph" style:parent-style-name="Table_20_Contents">
      <style:paragraph-properties fo:text-align="center" style:justify-single-word="false"/>
      <style:text-properties fo:language="en" fo:country="US"/>
    </style:style>
    <style:style style:name="P67" style:family="paragraph" style:parent-style-name="Table_20_Contents">
      <style:paragraph-properties fo:text-align="justify" style:justify-single-word="false"/>
      <style:text-properties fo:language="ru" fo:country="RU"/>
    </style:style>
    <style:style style:name="P68" style:family="paragraph" style:parent-style-name="Standard">
      <style:paragraph-properties fo:margin-left="0cm" fo:margin-right="0cm" fo:text-indent="0.609cm" style:auto-text-indent="false"/>
    </style:style>
    <style:style style:name="P69" style:family="paragraph" style:parent-style-name="Text_20_body">
      <style:paragraph-properties fo:text-align="center" style:justify-single-word="false"/>
      <style:text-properties style:font-name="Arial" fo:font-size="16.1000003814697pt" fo:language="en" fo:country="US" fo:font-weight="bold" officeooo:rsid="00a9f001" style:font-name-asian="Lucida Sans Unicode" style:font-size-asian="16.1000003814697pt" style:font-weight-asian="bold" style:font-name-complex="Tahoma1" style:font-size-complex="16.1000003814697pt" style:font-weight-complex="bold"/>
    </style:style>
    <style:style style:name="P70"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c9502f" officeooo:paragraph-rsid="00c9502f" style:font-size-asian="10.5pt" style:font-weight-asian="normal" style:font-size-complex="12pt" style:font-weight-complex="normal"/>
    </style:style>
    <style:style style:name="P71" style:family="paragraph" style:parent-style-name="Heading_20_2">
      <style:paragraph-properties fo:text-align="center" style:justify-single-word="false"/>
      <style:text-properties officeooo:rsid="00c9502f" officeooo:paragraph-rsid="00c9502f"/>
    </style:style>
    <style:style style:name="P72"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text-indent="0.499cm" style:auto-text-indent="false" style:page-number="auto" fo:background-color="transparent"/>
      <style:text-properties officeooo:rsid="00c9502f" officeooo:paragraph-rsid="00c9502f"/>
    </style:style>
    <style:style style:name="P73" style:family="paragraph" style:parent-style-name="Text_20_body">
      <loext:graphic-properties draw:fill="none"/>
      <style:paragraph-properties fo:margin-left="0cm" fo:margin-right="0cm" fo:margin-top="0cm" fo:margin-bottom="0.212cm" style:contextual-spacing="false" fo:text-align="justify" style:justify-single-word="false" fo:text-indent="0.499cm" style:auto-text-indent="false" fo:background-color="transparent"/>
      <style:text-properties officeooo:rsid="00c9502f" officeooo:paragraph-rsid="00c9502f"/>
    </style:style>
    <style:style style:name="P74"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75"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77" style:family="paragraph" style:parent-style-name="Standard">
      <style:paragraph-properties fo:margin-left="0cm" fo:margin-right="0cm" fo:text-align="justify" style:justify-single-word="false" fo:text-indent="0.609cm" style:auto-text-indent="false"/>
      <style:text-properties fo:font-size="12pt" fo:language="ru" fo:country="RU" fo:font-weight="bold" officeooo:rsid="00ef9441" officeooo:paragraph-rsid="00ef9441" style:font-size-asian="12pt" style:font-weight-asian="bold" style:font-size-complex="12pt" style:font-weight-complex="bold"/>
    </style:style>
    <style:style style:name="P78"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ef9441" officeooo:paragraph-rsid="00ef9441" style:font-size-asian="10.5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80"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81" style:family="paragraph" style:parent-style-name="Heading_20_1">
      <style:paragraph-properties fo:text-align="center" style:justify-single-word="false"/>
    </style:style>
    <style:style style:name="P82" style:family="paragraph" style:parent-style-name="Standard">
      <style:paragraph-properties fo:margin-left="0cm" fo:margin-right="0cm" fo:text-align="justify" style:justify-single-word="false" fo:text-indent="0.594cm" style:auto-text-indent="false"/>
    </style:style>
    <style:style style:name="P8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5"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86"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87" style:family="paragraph" style:parent-style-name="Heading_20_6">
      <style:text-properties officeooo:paragraph-rsid="005653b3"/>
    </style:style>
    <style:style style:name="P88" style:family="paragraph" style:parent-style-name="Standard">
      <style:paragraph-properties fo:margin-left="0cm" fo:margin-right="0cm" fo:text-align="justify" style:justify-single-word="false" fo:text-indent="0.621cm" style:auto-text-indent="false"/>
      <style:text-properties fo:language="ru" fo:country="RU" officeooo:rsid="005653b3" officeooo:paragraph-rsid="005653b3"/>
    </style:style>
    <style:style style:name="P89" style:family="paragraph" style:parent-style-name="Standard">
      <style:paragraph-properties fo:margin-left="0cm" fo:margin-right="0cm" fo:text-align="justify" style:justify-single-word="false" fo:text-indent="0.621cm" style:auto-text-indent="false"/>
      <style:text-properties officeooo:paragraph-rsid="0062664c"/>
    </style:style>
    <style:style style:name="P90" style:family="paragraph" style:parent-style-name="Heading_20_6">
      <style:text-properties officeooo:rsid="00350ee7" officeooo:paragraph-rsid="00350ee7"/>
    </style:style>
    <style:style style:name="P91" style:family="paragraph" style:parent-style-name="Text_20_body">
      <style:text-properties officeooo:rsid="00350ee7" officeooo:paragraph-rsid="00350ee7"/>
    </style:style>
    <style:style style:name="P92" style:family="paragraph" style:parent-style-name="Text_20_body">
      <style:text-properties fo:language="en" fo:country="US" fo:font-weight="bold" officeooo:rsid="00350ee7" officeooo:paragraph-rsid="00350ee7" style:font-weight-asian="bold" style:font-weight-complex="bold"/>
    </style:style>
    <style:style style:name="P93" style:family="paragraph" style:parent-style-name="Text_20_body">
      <style:text-properties fo:language="ru" fo:country="RU" fo:font-weight="normal" officeooo:rsid="00350ee7" officeooo:paragraph-rsid="00350ee7" style:font-weight-asian="normal" style:font-weight-complex="normal"/>
    </style:style>
    <style:style style:name="P94" style:family="paragraph" style:parent-style-name="Text_20_body">
      <style:text-properties fo:language="ru" fo:country="RU" fo:font-weight="normal" officeooo:rsid="00350ee7" officeooo:paragraph-rsid="0036e132" style:font-weight-asian="normal" style:font-weight-complex="normal"/>
    </style:style>
    <style:style style:name="P95" style:family="paragraph" style:parent-style-name="Text_20_body">
      <style:text-properties fo:language="ru" fo:country="RU" fo:font-weight="normal" officeooo:rsid="00350ee7" officeooo:paragraph-rsid="0096c416" style:font-weight-asian="normal" style:font-weight-complex="normal"/>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99" style:family="paragraph" style:parent-style-name="Heading_20_6">
      <style:text-properties officeooo:rsid="00300220" officeooo:paragraph-rsid="00300220"/>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101"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105" style:family="paragraph" style:parent-style-name="Heading_20_6">
      <style:text-properties officeooo:rsid="00232982" officeooo:paragraph-rsid="00232982"/>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107" style:family="paragraph" style:parent-style-name="Heading_20_6">
      <style:text-properties officeooo:rsid="00234571" officeooo:paragraph-rsid="00234571"/>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109"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111" style:family="paragraph" style:parent-style-name="Heading_20_6">
      <style:text-properties officeooo:rsid="00245fd2" officeooo:paragraph-rsid="00245fd2"/>
    </style:style>
    <style:style style:name="P112" style:family="paragraph" style:parent-style-name="Text_20_body">
      <style:text-properties officeooo:paragraph-rsid="00245fd2"/>
    </style:style>
    <style:style style:name="P113"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11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115" style:family="paragraph" style:parent-style-name="Heading_20_6">
      <style:text-properties officeooo:rsid="0025a074" officeooo:paragraph-rsid="0025a074"/>
    </style:style>
    <style:style style:name="P116"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117"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11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119" style:family="paragraph" style:parent-style-name="Heading_20_2" style:list-style-name="">
      <style:paragraph-properties fo:text-align="center" style:justify-single-word="false"/>
    </style:style>
    <style:style style:name="P120" style:family="paragraph" style:parent-style-name="Heading_20_2">
      <style:paragraph-properties fo:text-align="center" style:justify-single-word="false" fo:break-before="page"/>
    </style:style>
    <style:style style:name="P121" style:family="paragraph" style:parent-style-name="Standard">
      <style:text-properties fo:font-size="12pt" fo:language="ru" fo:country="RU" fo:font-weight="normal" style:font-size-asian="10.5pt" style:font-weight-asian="normal" style:font-size-complex="12pt" style:font-weight-complex="normal"/>
    </style:style>
    <style:style style:name="P122"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23" style:family="paragraph" style:parent-style-name="Heading_20_6">
      <style:text-properties officeooo:rsid="0080bf80" officeooo:paragraph-rsid="0080bf80"/>
    </style:style>
    <style:style style:name="P124" style:family="paragraph" style:parent-style-name="Text_20_body">
      <style:text-properties officeooo:paragraph-rsid="0080bf80"/>
    </style:style>
    <style:style style:name="P125" style:family="paragraph" style:parent-style-name="Text_20_body">
      <style:text-properties fo:language="en" fo:country="US" fo:font-weight="bold" officeooo:rsid="0080bf80" officeooo:paragraph-rsid="0080bf80" style:font-weight-asian="bold" style:font-weight-complex="bold"/>
    </style:style>
    <style:style style:name="P126" style:family="paragraph" style:parent-style-name="Text_20_body">
      <style:text-properties officeooo:rsid="0080bf80" officeooo:paragraph-rsid="0080bf80"/>
    </style:style>
    <style:style style:name="P127" style:family="paragraph" style:parent-style-name="Text_20_body">
      <style:text-properties fo:language="en" fo:country="US" style:text-underline-style="solid" style:text-underline-width="auto" style:text-underline-color="font-color" fo:font-weight="bold" officeooo:rsid="008101c1" officeooo:paragraph-rsid="0080bf80" style:font-weight-asian="bold" style:font-weight-complex="bold"/>
    </style:style>
    <style:style style:name="P128" style:family="paragraph" style:parent-style-name="Heading_20_6">
      <style:text-properties officeooo:rsid="001f8665" officeooo:paragraph-rsid="001f8665"/>
    </style:style>
    <style:style style:name="P129" style:family="paragraph" style:parent-style-name="Text_20_body">
      <style:text-properties fo:language="ru" fo:country="RU" officeooo:rsid="001f8665" officeooo:paragraph-rsid="001f8665"/>
    </style:style>
    <style:style style:name="P13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13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13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13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13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135"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13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1267bb2" officeooo:paragraph-rsid="01267bb2" style:font-size-asian="12pt" style:font-weight-asian="normal" style:font-size-complex="12pt" style:font-weight-complex="normal"/>
    </style:style>
    <style:style style:name="P13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1255210" officeooo:paragraph-rsid="01255210" style:font-size-asian="12pt" style:font-weight-asian="normal" style:font-size-complex="12pt" style:font-weight-complex="normal"/>
    </style:style>
    <style:style style:name="P13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1255210" officeooo:paragraph-rsid="01255210" style:font-size-asian="12pt" style:font-weight-asian="normal" style:font-size-complex="12pt" style:font-weight-complex="normal"/>
    </style:style>
    <style:style style:name="P14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12197aa" officeooo:paragraph-rsid="012197aa" style:font-size-asian="12pt" style:font-weight-asian="normal" style:font-size-complex="12pt" style:font-weight-complex="normal"/>
    </style:style>
    <style:style style:name="P14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12197aa" officeooo:paragraph-rsid="012197aa" style:font-size-asian="12pt" style:font-weight-asian="normal" style:font-size-complex="12pt" style:font-weight-complex="normal"/>
    </style:style>
    <style:style style:name="P14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118a9f0" officeooo:paragraph-rsid="0118a9f0" style:font-size-asian="12pt" style:font-weight-asian="normal" style:font-size-complex="12pt" style:font-weight-complex="normal"/>
    </style:style>
    <style:style style:name="P14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118a9f0" officeooo:paragraph-rsid="0118a9f0" style:font-size-asian="12pt" style:font-weight-asian="normal" style:font-size-complex="12pt" style:font-weight-complex="normal"/>
    </style:style>
    <style:style style:name="P14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11201b2" officeooo:paragraph-rsid="011201b2" style:font-size-asian="12pt" style:font-weight-asian="normal" style:font-size-complex="12pt" style:font-weight-complex="normal"/>
    </style:style>
    <style:style style:name="P14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11201b2" officeooo:paragraph-rsid="011201b2" style:font-size-asian="12pt" style:font-weight-asian="normal" style:font-size-complex="12pt" style:font-weight-complex="normal"/>
    </style:style>
    <style:style style:name="P14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10ac6ca" officeooo:paragraph-rsid="010ac6ca" style:font-size-asian="12pt" style:font-weight-asian="normal" style:font-size-complex="12pt" style:font-weight-complex="normal"/>
    </style:style>
    <style:style style:name="P14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d394b" officeooo:paragraph-rsid="00ed394b" style:font-size-asian="12pt" style:font-weight-asian="normal" style:font-size-complex="12pt" style:font-weight-complex="normal"/>
    </style:style>
    <style:style style:name="P14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0ccfd" officeooo:paragraph-rsid="00e5a998" style:font-size-asian="12pt" style:font-weight-asian="normal" style:font-size-complex="12pt" style:font-weight-complex="normal"/>
    </style:style>
    <style:style style:name="P149" style:family="paragraph" style:parent-style-name="Standard">
      <style:paragraph-properties fo:margin-left="0cm" fo:margin-right="0cm" fo:text-align="justify" style:justify-single-word="false" fo:text-indent="0.594cm" style:auto-text-indent="false"/>
      <style:text-properties officeooo:paragraph-rsid="00e5a998"/>
    </style:style>
    <style:style style:name="P15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0ccfd" officeooo:paragraph-rsid="00e0ccfd" style:font-size-asian="12pt" style:font-weight-asian="normal" style:font-size-complex="12pt" style:font-weight-complex="normal"/>
    </style:style>
    <style:style style:name="P15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bd16a" officeooo:paragraph-rsid="00dbd16a" style:font-size-asian="12pt" style:font-weight-asian="normal" style:font-size-complex="12pt" style:font-weight-complex="normal"/>
    </style:style>
    <style:style style:name="P15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99739" officeooo:paragraph-rsid="00d99739" style:font-size-asian="12pt" style:font-weight-asian="normal" style:font-size-complex="12pt" style:font-weight-complex="normal"/>
    </style:style>
    <style:style style:name="P15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59ae1" officeooo:paragraph-rsid="00d59ae1" style:font-size-asian="12pt" style:font-weight-asian="normal" style:font-size-complex="12pt" style:font-weight-complex="normal"/>
    </style:style>
    <style:style style:name="P15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33941" officeooo:paragraph-rsid="00d33941" style:font-size-asian="12pt" style:font-weight-asian="normal" style:font-size-complex="12pt" style:font-weight-complex="normal"/>
    </style:style>
    <style:style style:name="P15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1c950" officeooo:paragraph-rsid="00d1c950" style:font-size-asian="12pt" style:font-weight-asian="normal" style:font-size-complex="12pt" style:font-weight-complex="normal"/>
    </style:style>
    <style:style style:name="P15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5717" officeooo:paragraph-rsid="00c55717" style:font-size-asian="12pt" style:font-weight-asian="normal" style:font-size-complex="12pt" style:font-weight-complex="normal"/>
    </style:style>
    <style:style style:name="P15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35bd0" officeooo:paragraph-rsid="00c35bd0" style:font-size-asian="12pt" style:font-weight-asian="normal" style:font-size-complex="12pt" style:font-weight-complex="normal"/>
    </style:style>
    <style:style style:name="P15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e97e" officeooo:paragraph-rsid="00bee97e" style:font-size-asian="12pt" style:font-weight-asian="normal" style:font-size-complex="12pt" style:font-weight-complex="normal"/>
    </style:style>
    <style:style style:name="P15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1d261" officeooo:paragraph-rsid="00b1d261" style:font-size-asian="12pt" style:font-weight-asian="normal" style:font-size-complex="12pt" style:font-weight-complex="normal"/>
    </style:style>
    <style:style style:name="P16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23748" officeooo:paragraph-rsid="00b23748" style:font-size-asian="12pt" style:font-weight-asian="normal" style:font-size-complex="12pt" style:font-weight-complex="normal"/>
    </style:style>
    <style:style style:name="P16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77c01" officeooo:paragraph-rsid="00a77c01" style:font-size-asian="12pt" style:font-weight-asian="normal" style:font-size-complex="12pt" style:font-weight-complex="normal"/>
    </style:style>
    <style:style style:name="P16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9d2bbb" officeooo:paragraph-rsid="009d2bbb" style:font-size-asian="12pt" style:font-weight-asian="normal" style:font-size-complex="12pt" style:font-weight-complex="normal"/>
    </style:style>
    <style:style style:name="P16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94c7fd" officeooo:paragraph-rsid="0094c7fd" style:font-size-asian="12pt" style:font-weight-asian="normal" style:font-size-complex="12pt" style:font-weight-complex="normal"/>
    </style:style>
    <style:style style:name="P164" style:family="paragraph" style:parent-style-name="Standard">
      <style:paragraph-properties fo:margin-left="0cm" fo:margin-right="0cm" fo:text-align="justify" style:justify-single-word="false" fo:text-indent="0.594cm" style:auto-text-indent="false"/>
      <style:text-properties officeooo:rsid="0090d024" officeooo:paragraph-rsid="0090d024"/>
    </style:style>
    <style:style style:name="P16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869e2c" officeooo:paragraph-rsid="008371ee" style:font-size-asian="12pt" style:font-weight-asian="normal" style:font-size-complex="12pt" style:font-weight-complex="normal"/>
    </style:style>
    <style:style style:name="P166" style:family="paragraph" style:parent-style-name="Standard">
      <style:paragraph-properties fo:margin-left="0cm" fo:margin-right="0cm" fo:text-align="justify" style:justify-single-word="false" fo:text-indent="0.594cm" style:auto-text-indent="false"/>
      <style:text-properties officeooo:rsid="008371ee" officeooo:paragraph-rsid="008371ee"/>
    </style:style>
    <style:style style:name="P16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e7d89" officeooo:paragraph-rsid="007c5f25" style:font-size-asian="12pt" style:font-weight-asian="normal" style:font-size-complex="12pt" style:font-weight-complex="normal"/>
    </style:style>
    <style:style style:name="P168" style:family="paragraph" style:parent-style-name="Standard">
      <style:paragraph-properties fo:margin-left="0cm" fo:margin-right="0cm" fo:text-align="justify" style:justify-single-word="false" fo:text-indent="0.594cm" style:auto-text-indent="false"/>
      <style:text-properties officeooo:paragraph-rsid="007c5f25"/>
    </style:style>
    <style:style style:name="P169" style:family="paragraph" style:parent-style-name="Standard">
      <style:paragraph-properties fo:margin-left="0cm" fo:margin-right="0cm" fo:text-align="justify" style:justify-single-word="false" fo:text-indent="0.594cm" style:auto-text-indent="false"/>
      <style:text-properties fo:language="en" fo:country="US" officeooo:rsid="007c5f25" officeooo:paragraph-rsid="007c5f25"/>
    </style:style>
    <style:style style:name="P17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74fd31" style:font-size-asian="12pt" style:font-weight-asian="normal" style:font-size-complex="12pt" style:font-weight-complex="normal"/>
    </style:style>
    <style:style style:name="P171" style:family="paragraph" style:parent-style-name="Standard">
      <style:paragraph-properties fo:margin-left="0cm" fo:margin-right="0cm" fo:text-align="justify" style:justify-single-word="false" fo:text-indent="0.594cm" style:auto-text-indent="false"/>
      <style:text-properties fo:language="en" fo:country="US" officeooo:rsid="0074fd31" officeooo:paragraph-rsid="0074fd31"/>
    </style:style>
    <style:style style:name="P17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4fd31" officeooo:paragraph-rsid="0074fd31" style:font-size-asian="12pt" style:font-weight-asian="normal" style:font-size-complex="12pt" style:font-weight-complex="normal"/>
    </style:style>
    <style:style style:name="P17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57546b" style:font-size-asian="12pt" style:font-weight-asian="normal" style:font-size-complex="12pt" style:font-weight-complex="normal"/>
    </style:style>
    <style:style style:name="P174" style:family="paragraph" style:parent-style-name="Standard">
      <style:paragraph-properties fo:margin-left="0cm" fo:margin-right="0cm" fo:text-align="justify" style:justify-single-word="false" fo:text-indent="0.594cm" style:auto-text-indent="false"/>
      <style:text-properties officeooo:paragraph-rsid="0057546b"/>
    </style:style>
    <style:style style:name="P175" style:family="paragraph" style:parent-style-name="Standard">
      <style:paragraph-properties fo:margin-left="0cm" fo:margin-right="0cm" fo:text-align="justify" style:justify-single-word="false" fo:text-indent="0.594cm" style:auto-text-indent="false"/>
      <style:text-properties officeooo:paragraph-rsid="00639f97"/>
    </style:style>
    <style:style style:name="P176" style:family="paragraph" style:parent-style-name="Standard">
      <style:paragraph-properties fo:margin-left="0cm" fo:margin-right="0cm" fo:text-align="justify" style:justify-single-word="false" fo:text-indent="0.594cm" style:auto-text-indent="false"/>
      <style:text-properties fo:language="en" fo:country="US" officeooo:rsid="0057546b" officeooo:paragraph-rsid="0057546b"/>
    </style:style>
    <style:style style:name="P17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46e7cd" style:font-size-asian="12pt" style:font-weight-asian="normal" style:font-size-complex="12pt" style:font-weight-complex="normal"/>
    </style:style>
    <style:style style:name="P178" style:family="paragraph" style:parent-style-name="Standard">
      <style:paragraph-properties fo:margin-left="0cm" fo:margin-right="0cm" fo:text-align="justify" style:justify-single-word="false" fo:text-indent="0.594cm" style:auto-text-indent="false"/>
      <style:text-properties officeooo:paragraph-rsid="0046e7cd"/>
    </style:style>
    <style:style style:name="P17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46e7cd" style:font-size-asian="12pt" style:font-weight-asian="normal" style:font-size-complex="12pt" style:font-weight-complex="normal"/>
    </style:style>
    <style:style style:name="P18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34d9c" officeooo:paragraph-rsid="00434d9c" style:font-size-asian="12pt" style:font-weight-asian="normal" style:font-size-complex="12pt" style:font-weight-complex="normal"/>
    </style:style>
    <style:style style:name="P18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34d9c" officeooo:paragraph-rsid="00434d9c" style:font-size-asian="12pt" style:font-weight-asian="normal" style:font-size-complex="12pt" style:font-weight-complex="normal"/>
    </style:style>
    <style:style style:name="P18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18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f716e" officeooo:paragraph-rsid="003f716e" style:font-size-asian="12pt" style:font-weight-asian="normal" style:font-size-complex="12pt" style:font-weight-complex="normal"/>
    </style:style>
    <style:style style:name="P18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18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18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18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188" style:family="paragraph" style:parent-style-name="Standard">
      <style:paragraph-properties fo:margin-left="0cm" fo:margin-right="0cm" fo:text-align="justify" style:justify-single-word="false" fo:text-indent="0.594cm" style:auto-text-indent="false"/>
      <style:text-properties fo:language="ru" fo:country="RU"/>
    </style:style>
    <style:style style:name="P189" style:family="paragraph" style:parent-style-name="Standard">
      <style:paragraph-properties fo:margin-left="0cm" fo:margin-right="0cm" fo:text-align="justify" style:justify-single-word="false" fo:text-indent="0.594cm" style:auto-text-indent="false"/>
      <style:text-properties fo:language="en" fo:country="US"/>
    </style:style>
    <style:style style:name="P190"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style>
    <style:style style:name="P19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116be14" officeooo:paragraph-rsid="0116be14" style:font-size-asian="12pt" style:font-weight-asian="normal" style:font-size-complex="12pt" style:font-weight-complex="normal"/>
    </style:style>
    <style:style style:name="P19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f6c441" officeooo:paragraph-rsid="00f6c441" style:font-size-asian="12pt" style:font-weight-asian="normal" style:font-size-complex="12pt" style:font-weight-complex="normal"/>
    </style:style>
    <style:style style:name="P19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f6c441" officeooo:paragraph-rsid="00f6c441" style:font-size-asian="12pt" style:font-weight-asian="normal" style:font-size-complex="12pt" style:font-weight-complex="normal"/>
    </style:style>
    <style:style style:name="P19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e59c9" officeooo:paragraph-rsid="00f10ae9" style:font-size-asian="12pt" style:font-weight-asian="normal" style:font-size-complex="12pt" style:font-weight-complex="normal"/>
    </style:style>
    <style:style style:name="P195" style:family="paragraph" style:parent-style-name="Standard">
      <style:paragraph-properties fo:margin-left="0cm" fo:margin-right="0cm" fo:text-align="justify" style:justify-single-word="false" fo:text-indent="0.594cm" style:auto-text-indent="false"/>
      <style:text-properties officeooo:rsid="00f10ae9" officeooo:paragraph-rsid="00f10ae9"/>
    </style:style>
    <style:style style:name="P196" style:family="paragraph" style:parent-style-name="Standard">
      <style:paragraph-properties fo:margin-left="0cm" fo:margin-right="0cm" fo:text-align="justify" style:justify-single-word="false" fo:text-indent="0.594cm" style:auto-text-indent="false"/>
      <style:text-properties officeooo:paragraph-rsid="00de59c9"/>
    </style:style>
    <style:style style:name="P19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de59c9" officeooo:paragraph-rsid="00de59c9" style:font-size-asian="12pt" style:font-weight-asian="normal" style:font-size-complex="12pt" style:font-weight-complex="normal"/>
    </style:style>
    <style:style style:name="P19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3c6ee" officeooo:paragraph-rsid="00d3c6ee" style:font-size-asian="12pt" style:font-weight-asian="normal" style:font-size-complex="12pt" style:font-weight-complex="normal"/>
    </style:style>
    <style:style style:name="P19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c6dae7" officeooo:paragraph-rsid="00c6dae7" style:font-size-asian="12pt" style:font-weight-asian="normal" style:font-size-complex="12pt" style:font-weight-complex="normal"/>
    </style:style>
    <style:style style:name="P20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984" officeooo:paragraph-rsid="00bf9984" style:font-size-asian="12pt" style:font-weight-asian="normal" style:font-size-complex="12pt" style:font-weight-complex="normal"/>
    </style:style>
    <style:style style:name="P20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2b1cd" officeooo:paragraph-rsid="00b2b1cd" style:font-size-asian="12pt" style:font-weight-asian="normal" style:font-size-complex="12pt" style:font-weight-complex="normal"/>
    </style:style>
    <style:style style:name="P20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5ab9d" officeooo:paragraph-rsid="00a5ab9d" style:font-size-asian="12pt" style:font-weight-asian="normal" style:font-size-complex="12pt" style:font-weight-complex="normal"/>
    </style:style>
    <style:style style:name="P20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77c01" officeooo:paragraph-rsid="00a5ab9d" style:font-size-asian="12pt" style:font-weight-asian="normal" style:font-size-complex="12pt" style:font-weight-complex="normal"/>
    </style:style>
    <style:style style:name="P20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d941a" officeooo:paragraph-rsid="006d941a" style:font-size-asian="12pt" style:font-weight-asian="normal" style:font-size-complex="12pt" style:font-weight-complex="normal"/>
    </style:style>
    <style:style style:name="P20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d941a" officeooo:paragraph-rsid="006d941a" style:font-size-asian="12pt" style:font-weight-asian="normal" style:font-size-complex="12pt" style:font-weight-complex="normal"/>
    </style:style>
    <style:style style:name="P20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60af" officeooo:paragraph-rsid="006960af" style:font-size-asian="12pt" style:font-weight-asian="normal" style:font-size-complex="12pt" style:font-weight-complex="normal"/>
    </style:style>
    <style:style style:name="P20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960af" officeooo:paragraph-rsid="006960af" style:font-size-asian="12pt" style:font-weight-asian="normal" style:font-size-complex="12pt" style:font-weight-complex="normal"/>
    </style:style>
    <style:style style:name="P20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5aa1ac" officeooo:paragraph-rsid="005aa1ac" style:font-size-asian="12pt" style:font-weight-asian="normal" style:font-size-complex="12pt" style:font-weight-complex="normal"/>
    </style:style>
    <style:style style:name="P20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5aa1ac" officeooo:paragraph-rsid="005aa1ac" style:font-size-asian="12pt" style:font-weight-asian="normal" style:font-size-complex="12pt" style:font-weight-complex="normal"/>
    </style:style>
    <style:style style:name="P2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9d219" officeooo:paragraph-rsid="0049d219" style:font-size-asian="12pt" style:font-weight-asian="normal" style:font-size-complex="12pt" style:font-weight-complex="normal"/>
    </style:style>
    <style:style style:name="P2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4aa6b" style:font-size-asian="12pt" style:font-weight-asian="normal" style:font-size-complex="12pt" style:font-weight-complex="normal"/>
    </style:style>
    <style:style style:name="P21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4aa6b" officeooo:paragraph-rsid="0044aa6b" style:font-size-asian="12pt" style:font-weight-asian="normal" style:font-size-complex="12pt" style:font-weight-complex="normal"/>
    </style:style>
    <style:style style:name="P2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f67fd" style:font-size-asian="12pt" style:font-weight-asian="normal" style:font-size-complex="12pt" style:font-weight-complex="normal"/>
    </style:style>
    <style:style style:name="P2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2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216"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17"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218"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219"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220"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221"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222"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T1" style:family="text">
      <style:text-properties fo:font-size="24pt" fo:language="ru" fo:country="RU" style:font-size-asian="24pt" style:font-size-complex="24pt"/>
    </style:style>
    <style:style style:name="T2" style:family="text">
      <style:text-properties fo:font-size="24pt" fo:language="en" fo:country="US" style:font-size-asian="24pt" style:font-size-complex="24pt"/>
    </style:style>
    <style:style style:name="T3" style:family="text">
      <style:text-properties fo:language="ru" fo:country="RU"/>
    </style:style>
    <style:style style:name="T4" style:family="text">
      <style:text-properties fo:language="en" fo:country="US"/>
    </style:style>
    <style:style style:name="T5" style:family="text">
      <style:text-properties style:font-name="Arial" fo:font-size="16.1000003814697pt" fo:language="en" fo:country="US" fo:font-weight="bold" officeooo:rsid="00f76497" style:font-name-asian="Lucida Sans Unicode" style:font-size-asian="16.1000003814697pt" style:font-weight-asian="bold" style:font-name-complex="Tahoma1" style:font-size-complex="16.1000003814697pt" style:font-weight-complex="bold"/>
    </style:style>
    <style:style style:name="T6" style:family="text">
      <style:text-properties style:font-name="Arial" fo:font-size="16.1000003814697pt" fo:language="en" fo:country="US" fo:font-weight="bold" officeooo:rsid="011201b2" style:font-name-asian="Lucida Sans Unicode" style:font-size-asian="16.1000003814697pt" style:font-weight-asian="bold" style:font-name-complex="Tahoma1" style:font-size-complex="16.1000003814697pt" style:font-weight-complex="bold"/>
    </style:style>
    <style:style style:name="T7" style:family="text">
      <style:text-properties style:font-name="Arial" fo:font-size="16.1000003814697pt" fo:language="en" fo:country="US" fo:font-weight="bold" officeooo:rsid="01267bb2" style:font-name-asian="Lucida Sans Unicode" style:font-size-asian="16.1000003814697pt" style:font-weight-asian="bold" style:font-name-complex="Tahoma1" style:font-size-complex="16.1000003814697pt" style:font-weight-complex="bold"/>
    </style:style>
    <style:style style:name="T8" style:family="text">
      <style:text-properties style:font-name="Arial" fo:font-size="16.1000003814697pt" fo:language="en" fo:country="US" fo:font-weight="bold" officeooo:rsid="00b1d261" style:font-name-asian="Lucida Sans Unicode" style:font-size-asian="16.1000003814697pt" style:font-weight-asian="bold" style:font-name-complex="Tahoma1" style:font-size-complex="16.1000003814697pt" style:font-weight-complex="bold"/>
    </style:style>
    <style:style style:name="T9" style:family="text">
      <style:text-properties style:font-name="Arial" fo:font-size="16.1000003814697pt" fo:language="ru" fo:country="RU" fo:font-weight="bold" officeooo:rsid="00b58744" style:font-name-asian="Lucida Sans Unicode" style:font-size-asian="16.1000003814697pt" style:font-weight-asian="bold" style:font-name-complex="Tahoma1" style:font-size-complex="16.1000003814697pt" style:font-weight-complex="bold"/>
    </style:style>
    <style:style style:name="T10" style:family="text">
      <style:text-properties officeooo:rsid="008b08a5"/>
    </style:style>
    <style:style style:name="T11" style:family="text">
      <style:text-properties officeooo:rsid="008cb194"/>
    </style:style>
    <style:style style:name="T12" style:family="text">
      <style:text-properties fo:language="en" fo:country="US" officeooo:rsid="008cb194"/>
    </style:style>
    <style:style style:name="T13" style:family="text">
      <style:text-properties fo:language="ru" fo:country="RU" officeooo:rsid="008cb194"/>
    </style:style>
    <style:style style:name="T14" style:family="text">
      <style:text-properties fo:language="ru" fo:country="RU" officeooo:rsid="009e4fe6"/>
    </style:style>
    <style:style style:name="T15" style:family="text">
      <style:text-properties fo:language="en" fo:country="US" officeooo:rsid="009e4fe6"/>
    </style:style>
    <style:style style:name="T16" style:family="text">
      <style:text-properties officeooo:rsid="00cb9df0"/>
    </style:style>
    <style:style style:name="T17" style:family="text">
      <style:text-properties officeooo:rsid="00cdd13d"/>
    </style:style>
    <style:style style:name="T18" style:family="text">
      <style:text-properties fo:language="ru" fo:country="RU" officeooo:rsid="00b58744"/>
    </style:style>
    <style:style style:name="T19" style:family="text">
      <style:text-properties fo:language="ru" fo:country="RU" officeooo:rsid="00c9502f"/>
    </style:style>
    <style:style style:name="T20" style:family="text">
      <style:text-properties officeooo:rsid="00c9502f"/>
    </style:style>
    <style:style style:name="T21" style:family="text">
      <style:text-properties fo:language="ru" fo:country="RU" officeooo:rsid="008bb6d8"/>
    </style:style>
    <style:style style:name="T22" style:family="text">
      <style:text-properties fo:language="ru" fo:country="RU" officeooo:rsid="009b345a"/>
    </style:style>
    <style:style style:name="T23" style:family="text">
      <style:text-properties officeooo:rsid="009b345a"/>
    </style:style>
    <style:style style:name="T24" style:family="text">
      <style:text-properties officeooo:rsid="00a22333"/>
    </style:style>
    <style:style style:name="T25" style:family="text">
      <style:text-properties fo:language="ru" fo:country="RU" officeooo:rsid="008deb73"/>
    </style:style>
    <style:style style:name="T26" style:family="text">
      <style:text-properties fo:language="ru" fo:country="RU" officeooo:rsid="00aea677"/>
    </style:style>
    <style:style style:name="T27" style:family="text">
      <style:text-properties officeooo:rsid="00aea677"/>
    </style:style>
    <style:style style:name="T28" style:family="text">
      <style:text-properties fo:language="en" fo:country="US" officeooo:rsid="008b08a5"/>
    </style:style>
    <style:style style:name="T29" style:family="text">
      <style:text-properties fo:color="#000000" loext:opacity="100%" style:font-name="Times New Roman" fo:font-size="12pt" fo:language="en" fo:country="US" style:font-size-asian="12pt" style:font-size-complex="12pt"/>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fo:language="ru" fo:country="RU" fo:font-weight="normal" style:font-weight-asian="normal" style:font-weight-complex="normal"/>
    </style:style>
    <style:style style:name="T33" style:family="text">
      <style:text-properties fo:language="en" fo:country="US" fo:font-weight="bold" style:font-weight-asian="bold" style:font-weight-complex="bold"/>
    </style:style>
    <style:style style:name="T34" style:family="text">
      <style:text-properties officeooo:rsid="00b8f851"/>
    </style:style>
    <style:style style:name="T35" style:family="text">
      <style:text-properties fo:language="en" fo:country="US" officeooo:rsid="00b8f851"/>
    </style:style>
    <style:style style:name="T36" style:family="text">
      <style:text-properties officeooo:rsid="00bee97e"/>
    </style:style>
    <style:style style:name="T37" style:family="text">
      <style:text-properties officeooo:rsid="00aeffd3"/>
    </style:style>
    <style:style style:name="T38" style:family="text">
      <style:text-properties fo:language="en" fo:country="US" officeooo:rsid="00aeffd3"/>
    </style:style>
    <style:style style:name="T39" style:family="text">
      <style:text-properties fo:font-weight="bold" officeooo:rsid="00e41ef6" style:font-weight-asian="bold" style:font-weight-complex="bold"/>
    </style:style>
    <style:style style:name="T40" style:family="text">
      <style:text-properties officeooo:rsid="00e41ef6"/>
    </style:style>
    <style:style style:name="T41" style:family="text">
      <style:text-properties style:text-underline-style="none" officeooo:rsid="00e41ef6"/>
    </style:style>
    <style:style style:name="T42" style:family="text">
      <style:text-properties style:text-underline-style="none" officeooo:rsid="00e36b7b"/>
    </style:style>
    <style:style style:name="T43" style:family="text">
      <style:text-properties fo:language="en" fo:country="US" style:text-underline-style="none"/>
    </style:style>
    <style:style style:name="T44" style:family="text">
      <style:text-properties style:text-underline-style="none"/>
    </style:style>
    <style:style style:name="T45" style:family="text">
      <style:text-properties fo:language="en" fo:country="US" style:text-underline-style="none" officeooo:rsid="00e36b7b"/>
    </style:style>
    <style:style style:name="T46" style:family="text">
      <style:text-properties officeooo:rsid="00e36b7b"/>
    </style:style>
    <style:style style:name="T47" style:family="text">
      <style:text-properties officeooo:rsid="00e5b81e"/>
    </style:style>
    <style:style style:name="T48" style:family="text">
      <style:text-properties fo:language="en" fo:country="US" officeooo:rsid="00e5b81e"/>
    </style:style>
    <style:style style:name="T49" style:family="text">
      <style:text-properties officeooo:rsid="00e5a998"/>
    </style:style>
    <style:style style:name="T50" style:family="text">
      <style:text-properties fo:language="en" fo:country="US" officeooo:rsid="00e41ef6"/>
    </style:style>
    <style:style style:name="T51" style:family="text">
      <style:text-properties fo:language="en" fo:country="US" fo:font-weight="normal" style:font-weight-asian="normal" style:font-weight-complex="normal"/>
    </style:style>
    <style:style style:name="T52" style:family="text">
      <style:text-properties fo:font-weight="normal" officeooo:rsid="00aeffd3" style:font-weight-asian="normal" style:font-weight-complex="normal"/>
    </style:style>
    <style:style style:name="T53" style:family="text">
      <style:text-properties fo:language="en" fo:country="US" fo:font-weight="normal" officeooo:rsid="00aeffd3" style:font-weight-asian="normal" style:font-weight-complex="normal"/>
    </style:style>
    <style:style style:name="T54" style:family="text">
      <style:text-properties fo:font-weight="normal" officeooo:rsid="00c0f211" style:font-weight-asian="normal" style:font-weight-complex="normal"/>
    </style:style>
    <style:style style:name="T55" style:family="text">
      <style:text-properties fo:language="ru" fo:country="RU" officeooo:rsid="005b24ed"/>
    </style:style>
    <style:style style:name="T56" style:family="text">
      <style:text-properties fo:language="en" fo:country="US" officeooo:rsid="005b24ed"/>
    </style:style>
    <style:style style:name="T57" style:family="text">
      <style:text-properties fo:language="ru" fo:country="RU" officeooo:rsid="0062664c"/>
    </style:style>
    <style:style style:name="T58" style:family="text">
      <style:text-properties officeooo:rsid="01050839"/>
    </style:style>
    <style:style style:name="T59" style:family="text">
      <style:text-properties officeooo:rsid="00f9bfcb"/>
    </style:style>
    <style:style style:name="T60" style:family="text">
      <style:text-properties fo:language="en" fo:country="US" officeooo:rsid="00f9bfcb"/>
    </style:style>
    <style:style style:name="T61" style:family="text">
      <style:text-properties officeooo:rsid="0100fd85"/>
    </style:style>
    <style:style style:name="T62" style:family="text">
      <style:text-properties officeooo:rsid="010b5a9f"/>
    </style:style>
    <style:style style:name="T63" style:family="text">
      <style:text-properties fo:language="en" fo:country="US" officeooo:rsid="0100fd85"/>
    </style:style>
    <style:style style:name="T64" style:family="text">
      <style:text-properties officeooo:rsid="0102f9be"/>
    </style:style>
    <style:style style:name="T65" style:family="text">
      <style:text-properties fo:language="en" fo:country="US" officeooo:rsid="0102f9be"/>
    </style:style>
    <style:style style:name="T66" style:family="text">
      <style:text-properties fo:language="en" fo:country="US" officeooo:rsid="01043171"/>
    </style:style>
    <style:style style:name="T67" style:family="text">
      <style:text-properties officeooo:rsid="01043171"/>
    </style:style>
    <style:style style:name="T68" style:family="text">
      <style:text-properties fo:language="en" fo:country="US" officeooo:rsid="0111522a"/>
    </style:style>
    <style:style style:name="T69" style:family="text">
      <style:text-properties fo:language="en" fo:country="US" fo:font-weight="normal" officeooo:rsid="01064488" style:font-weight-asian="normal" style:font-weight-complex="normal"/>
    </style:style>
    <style:style style:name="T70" style:family="text">
      <style:text-properties fo:language="en" fo:country="US" officeooo:rsid="0105f3a0"/>
    </style:style>
    <style:style style:name="T71" style:family="text">
      <style:text-properties fo:language="ru" fo:country="RU" officeooo:rsid="00b8f851"/>
    </style:style>
    <style:style style:name="T72" style:family="text">
      <style:text-properties fo:language="ru" fo:country="RU" officeooo:rsid="00bee97e"/>
    </style:style>
    <style:style style:name="T73" style:family="text">
      <style:text-properties officeooo:rsid="0085d4c9"/>
    </style:style>
    <style:style style:name="T74" style:family="text">
      <style:text-properties fo:language="ru" fo:country="RU" fo:font-weight="normal" officeooo:rsid="0061aa08" style:font-weight-asian="normal" style:font-weight-complex="normal"/>
    </style:style>
    <style:style style:name="T75" style:family="text">
      <style:text-properties fo:language="en" fo:country="US" officeooo:rsid="0107c83c"/>
    </style:style>
    <style:style style:name="T76" style:family="text">
      <style:text-properties officeooo:rsid="0107c83c"/>
    </style:style>
    <style:style style:name="T77" style:family="text">
      <style:text-properties fo:language="en" fo:country="US" officeooo:rsid="00c9502f"/>
    </style:style>
    <style:style style:name="T78" style:family="text">
      <style:text-properties style:font-name="Arial" fo:font-size="16.1000003814697pt" fo:language="ru" fo:country="RU" fo:font-weight="bold" officeooo:rsid="011c3419" style:font-name-asian="Lucida Sans Unicode" style:font-size-asian="16.1000003814697pt" style:font-weight-asian="bold" style:font-name-complex="Tahoma1" style:font-size-complex="16.1000003814697pt" style:font-weight-complex="bold"/>
    </style:style>
    <style:style style:name="T79" style:family="text">
      <style:text-properties fo:language="en" fo:country="US" officeooo:rsid="00bee97e"/>
    </style:style>
    <style:style style:name="T80" style:family="text">
      <style:text-properties fo:language="en" fo:country="US" officeooo:rsid="00cb34d8"/>
    </style:style>
    <style:style style:name="T81" style:family="text">
      <style:text-properties fo:language="ru" fo:country="RU" officeooo:rsid="00cb34d8"/>
    </style:style>
    <style:style style:name="T82" style:family="text">
      <style:text-properties fo:language="ru" fo:country="RU" officeooo:rsid="00ce3fc2"/>
    </style:style>
    <style:style style:name="T83" style:family="text">
      <style:text-properties fo:language="en" fo:country="US" officeooo:rsid="00ce3fc2"/>
    </style:style>
    <style:style style:name="T84" style:family="text">
      <style:text-properties fo:language="en" fo:country="US" officeooo:rsid="00d0ee09"/>
    </style:style>
    <style:style style:name="T85" style:family="text">
      <style:text-properties fo:language="ru" fo:country="RU" officeooo:rsid="00cb9df0"/>
    </style:style>
    <style:style style:name="T86" style:family="text">
      <style:text-properties fo:language="en" fo:country="US" officeooo:rsid="00cb9df0"/>
    </style:style>
    <style:style style:name="T87" style:family="text">
      <style:text-properties fo:font-size="12pt" fo:font-weight="normal" style:font-size-asian="10.5pt" style:font-weight-asian="normal" style:font-size-complex="12pt" style:font-weight-complex="normal"/>
    </style:style>
    <style:style style:name="T88" style:family="text">
      <style:text-properties fo:font-size="12pt" fo:language="en" fo:country="US" fo:font-weight="normal" style:font-size-asian="10.5pt" style:font-weight-asian="normal" style:font-size-complex="12pt" style:font-weight-complex="normal"/>
    </style:style>
    <style:style style:name="T89" style:family="text">
      <style:text-properties fo:font-size="12pt" fo:language="ru" fo:country="RU" fo:font-weight="normal" officeooo:rsid="005653b3" style:font-size-asian="10.5pt" style:font-weight-asian="normal" style:font-size-complex="12pt" style:font-weight-complex="normal"/>
    </style:style>
    <style:style style:name="T90" style:family="text">
      <style:text-properties fo:font-size="12pt" fo:language="en" fo:country="US" fo:font-weight="normal" officeooo:rsid="005653b3" style:font-size-asian="10.5pt" style:font-weight-asian="normal" style:font-size-complex="12pt" style:font-weight-complex="normal"/>
    </style:style>
    <style:style style:name="T91" style:family="text">
      <style:text-properties fo:font-size="12pt" fo:language="ru" fo:country="RU" fo:font-weight="normal" officeooo:rsid="0062664c" style:font-size-asian="10.5pt" style:font-weight-asian="normal" style:font-size-complex="12pt" style:font-weight-complex="normal"/>
    </style:style>
    <style:style style:name="T92" style:family="text">
      <style:text-properties officeooo:rsid="006f3828"/>
    </style:style>
    <style:style style:name="T93" style:family="text">
      <style:text-properties fo:language="ru" fo:country="RU" fo:font-weight="bold" style:font-weight-asian="bold" style:font-weight-complex="bold"/>
    </style:style>
    <style:style style:name="T94" style:family="text">
      <style:text-properties fo:language="en" fo:country="US" officeooo:rsid="003efd82"/>
    </style:style>
    <style:style style:name="T95" style:family="text">
      <style:text-properties fo:language="ru" fo:country="RU" officeooo:rsid="003efd82"/>
    </style:style>
    <style:style style:name="T96" style:family="text">
      <style:text-properties officeooo:rsid="003b59ed"/>
    </style:style>
    <style:style style:name="T97" style:family="text">
      <style:text-properties fo:language="en" fo:country="US" officeooo:rsid="0036e132"/>
    </style:style>
    <style:style style:name="T98" style:family="text">
      <style:text-properties officeooo:rsid="0036e132"/>
    </style:style>
    <style:style style:name="T99" style:family="text">
      <style:text-properties fo:language="en" fo:country="US" fo:font-weight="bold" officeooo:rsid="0096c416" style:font-weight-asian="bold" style:font-weight-complex="bold"/>
    </style:style>
    <style:style style:name="T100" style:family="text">
      <style:text-properties fo:language="en" fo:country="US" officeooo:rsid="0096c416"/>
    </style:style>
    <style:style style:name="T101" style:family="text">
      <style:text-properties style:font-name="Times New Roman" fo:font-size="12pt" fo:language="en" fo:country="US" officeooo:rsid="008b08a5" style:font-size-asian="12pt" style:font-size-complex="12pt"/>
    </style:style>
    <style:style style:name="T102" style:family="text">
      <style:text-properties style:font-name="Times New Roman" fo:font-size="12pt" officeooo:rsid="008b08a5" style:font-size-asian="12pt" style:font-size-complex="12pt"/>
    </style:style>
    <style:style style:name="T103" style:family="text">
      <style:text-properties style:font-name="Times New Roman" fo:font-size="12pt" officeooo:rsid="0096c416" style:font-size-asian="12pt" style:font-size-complex="12pt"/>
    </style:style>
    <style:style style:name="T104" style:family="text">
      <style:text-properties style:font-name="Times New Roman" fo:font-size="12pt" officeooo:rsid="008bb6d8" style:font-size-asian="12pt" style:font-size-complex="12pt"/>
    </style:style>
    <style:style style:name="T105" style:family="text">
      <style:text-properties style:font-name="Times New Roman" fo:font-size="12pt" officeooo:rsid="009ca516" style:font-size-asian="12pt" style:font-size-complex="12pt"/>
    </style:style>
    <style:style style:name="T106" style:family="text">
      <style:text-properties style:font-name="Times New Roman" fo:font-size="12pt" fo:language="en" fo:country="US" officeooo:rsid="009ca516" style:font-size-asian="12pt" style:font-size-complex="12pt"/>
    </style:style>
    <style:style style:name="T107" style:family="text">
      <style:text-properties officeooo:rsid="003cfb77"/>
    </style:style>
    <style:style style:name="T108" style:family="text">
      <style:text-properties officeooo:rsid="00711354"/>
    </style:style>
    <style:style style:name="T109" style:family="text">
      <style:text-properties officeooo:rsid="003173b7"/>
    </style:style>
    <style:style style:name="T110" style:family="text">
      <style:text-properties fo:font-size="12pt" fo:language="ru" fo:country="RU" fo:font-weight="bold" style:font-size-asian="10.5pt" style:font-weight-asian="bold" style:font-size-complex="12pt" style:font-weight-complex="bold"/>
    </style:style>
    <style:style style:name="T111" style:family="text">
      <style:text-properties fo:font-size="12pt" fo:language="en" fo:country="US" fo:font-weight="bold" style:font-size-asian="10.5pt" style:font-weight-asian="bold" style:font-size-complex="12pt" style:font-weight-complex="bold"/>
    </style:style>
    <style:style style:name="T112" style:family="text">
      <style:text-properties fo:language="ru" fo:country="RU" officeooo:rsid="00232982"/>
    </style:style>
    <style:style style:name="T113" style:family="text">
      <style:text-properties officeooo:rsid="00245fd2"/>
    </style:style>
    <style:style style:name="T114" style:family="text">
      <style:text-properties fo:language="ru" fo:country="RU" officeooo:rsid="00234571"/>
    </style:style>
    <style:style style:name="T115" style:family="text">
      <style:text-properties fo:language="ru" fo:country="RU" officeooo:rsid="00245fd2"/>
    </style:style>
    <style:style style:name="T116" style:family="text">
      <style:text-properties officeooo:rsid="0025a074"/>
    </style:style>
    <style:style style:name="T117" style:family="text">
      <style:text-properties fo:language="ru" fo:country="RU" officeooo:rsid="00545d64"/>
    </style:style>
    <style:style style:name="T118" style:family="text">
      <style:text-properties fo:font-size="12pt" fo:language="ru" fo:country="RU" fo:font-weight="normal" style:font-size-asian="10.5pt" style:font-weight-asian="normal" style:font-size-complex="12pt" style:font-weight-complex="normal"/>
    </style:style>
    <style:style style:name="T119" style:family="text">
      <style:text-properties fo:language="en" fo:country="US" fo:font-weight="bold" officeooo:rsid="0080bf80" style:font-weight-asian="bold" style:font-weight-complex="bold"/>
    </style:style>
    <style:style style:name="T120" style:family="text">
      <style:text-properties fo:language="en" fo:country="US" style:text-underline-style="none" fo:font-weight="bold" style:font-weight-asian="bold" style:font-weight-complex="bold"/>
    </style:style>
    <style:style style:name="T121" style:family="text">
      <style:text-properties fo:language="en" fo:country="US" style:text-underline-style="none" fo:font-weight="bold" officeooo:rsid="008101c1" style:font-weight-asian="bold" style:font-weight-complex="bold"/>
    </style:style>
    <style:style style:name="T122" style:family="text">
      <style:text-properties fo:language="ru" fo:country="RU" officeooo:rsid="0020f818"/>
    </style:style>
    <style:style style:name="T123" style:family="text">
      <style:text-properties fo:color="#ff0000" loext:opacity="100%"/>
    </style:style>
    <style:style style:name="T124" style:family="text">
      <style:text-properties fo:language="ru" fo:country="RU" officeooo:rsid="0075e81c"/>
    </style:style>
    <style:style style:name="T125" style:family="text">
      <style:text-properties fo:language="en" fo:country="US" officeooo:rsid="011f91c0"/>
    </style:style>
    <style:style style:name="T126" style:family="text">
      <style:text-properties fo:language="en" fo:country="US" officeooo:rsid="010b5a9f"/>
    </style:style>
    <style:style style:name="T127" style:family="text">
      <style:text-properties fo:language="ru" fo:country="RU" officeooo:rsid="00f3ad83"/>
    </style:style>
    <style:style style:name="T128" style:family="text">
      <style:text-properties officeooo:rsid="00f3ad83"/>
    </style:style>
    <style:style style:name="T129" style:family="text">
      <style:text-properties fo:language="ru" fo:country="RU" officeooo:rsid="00ee0195"/>
    </style:style>
    <style:style style:name="T130" style:family="text">
      <style:text-properties officeooo:rsid="00ee0195"/>
    </style:style>
    <style:style style:name="T131" style:family="text">
      <style:text-properties fo:language="ru" fo:country="RU" officeooo:rsid="00e5a998"/>
    </style:style>
    <style:style style:name="T132" style:family="text">
      <style:text-properties officeooo:rsid="00e1e6c1"/>
    </style:style>
    <style:style style:name="T133" style:family="text">
      <style:text-properties officeooo:rsid="00ed2306"/>
    </style:style>
    <style:style style:name="T134" style:family="text">
      <style:text-properties fo:font-size="12pt" fo:language="en" fo:country="US" fo:font-weight="normal" officeooo:rsid="00e0ccfd" style:font-size-asian="12pt" style:font-weight-asian="normal" style:font-size-complex="12pt" style:font-weight-complex="normal"/>
    </style:style>
    <style:style style:name="T135" style:family="text">
      <style:text-properties fo:language="ru" fo:country="RU" officeooo:rsid="00e1e6c1"/>
    </style:style>
    <style:style style:name="T136" style:family="text">
      <style:text-properties officeooo:rsid="00e30067"/>
    </style:style>
    <style:style style:name="T137" style:family="text">
      <style:text-properties officeooo:rsid="00c6e657"/>
    </style:style>
    <style:style style:name="T138" style:family="text">
      <style:text-properties fo:language="ru" fo:country="RU" officeooo:rsid="00d1c950"/>
    </style:style>
    <style:style style:name="T139" style:family="text">
      <style:text-properties fo:language="ru" fo:country="RU" officeooo:rsid="00c6dae7"/>
    </style:style>
    <style:style style:name="T140" style:family="text">
      <style:text-properties fo:language="ru" fo:country="RU" officeooo:rsid="00bf688b"/>
    </style:style>
    <style:style style:name="T141" style:family="text">
      <style:text-properties officeooo:rsid="00bf688b"/>
    </style:style>
    <style:style style:name="T142" style:family="text">
      <style:text-properties officeooo:rsid="00bf9984"/>
    </style:style>
    <style:style style:name="T143" style:family="text">
      <style:text-properties fo:language="ru" fo:country="RU" officeooo:rsid="00bf9984"/>
    </style:style>
    <style:style style:name="T144" style:family="text">
      <style:text-properties fo:language="ru" fo:country="RU" officeooo:rsid="00c0f211"/>
    </style:style>
    <style:style style:name="T145" style:family="text">
      <style:text-properties officeooo:rsid="00c0f211"/>
    </style:style>
    <style:style style:name="T146" style:family="text">
      <style:text-properties officeooo:rsid="00ad300d"/>
    </style:style>
    <style:style style:name="T147" style:family="text">
      <style:text-properties officeooo:rsid="00a82d9f"/>
    </style:style>
    <style:style style:name="T148" style:family="text">
      <style:text-properties fo:language="en" fo:country="US" officeooo:rsid="00a82d9f"/>
    </style:style>
    <style:style style:name="T149" style:family="text">
      <style:text-properties fo:language="en" fo:country="US" officeooo:rsid="00aea677"/>
    </style:style>
    <style:style style:name="T150" style:family="text">
      <style:text-properties officeooo:rsid="00a37521"/>
    </style:style>
    <style:style style:name="T151" style:family="text">
      <style:text-properties fo:font-size="12pt" fo:language="en" fo:country="US" fo:font-weight="normal" officeooo:rsid="00869e2c" style:font-size-asian="12pt" style:font-weight-asian="normal" style:font-size-complex="12pt" style:font-weight-complex="normal"/>
    </style:style>
    <style:style style:name="T152" style:family="text">
      <style:text-properties fo:font-size="12pt" fo:language="en" fo:country="US" fo:font-weight="normal" officeooo:rsid="0092c50b" style:font-size-asian="12pt" style:font-weight-asian="normal" style:font-size-complex="12pt" style:font-weight-complex="normal"/>
    </style:style>
    <style:style style:name="T153" style:family="text">
      <style:text-properties fo:font-size="12pt" fo:language="en" fo:country="US" fo:font-weight="normal" style:font-size-asian="12pt" style:font-weight-asian="normal" style:font-size-complex="12pt" style:font-weight-complex="normal"/>
    </style:style>
    <style:style style:name="T154" style:family="text">
      <style:text-properties fo:font-size="12pt" fo:language="ru" fo:country="RU" fo:font-weight="normal" style:font-size-asian="12pt" style:font-weight-asian="normal" style:font-size-complex="12pt" style:font-weight-complex="normal"/>
    </style:style>
    <style:style style:name="T155" style:family="text">
      <style:text-properties fo:font-size="12pt" fo:language="ru" fo:country="RU" fo:font-weight="normal" officeooo:rsid="0092c50b" style:font-size-asian="12pt" style:font-weight-asian="normal" style:font-size-complex="12pt" style:font-weight-complex="normal"/>
    </style:style>
    <style:style style:name="T156" style:family="text">
      <style:text-properties fo:font-size="12pt" fo:language="ru" fo:country="RU" fo:font-weight="normal" officeooo:rsid="008f4a85" style:font-size-asian="12pt" style:font-weight-asian="normal" style:font-size-complex="12pt" style:font-weight-complex="normal"/>
    </style:style>
    <style:style style:name="T157" style:family="text">
      <style:text-properties fo:font-size="12pt" fo:language="ru" fo:country="RU" fo:font-weight="normal" officeooo:rsid="0085d4c9" style:font-size-asian="12pt" style:font-weight-asian="normal" style:font-size-complex="12pt" style:font-weight-complex="normal"/>
    </style:style>
    <style:style style:name="T158" style:family="text">
      <style:text-properties fo:font-size="12pt" fo:language="en" fo:country="US" fo:font-weight="normal" officeooo:rsid="0085d4c9" style:font-size-asian="12pt" style:font-weight-asian="normal" style:font-size-complex="12pt" style:font-weight-complex="normal"/>
    </style:style>
    <style:style style:name="T159" style:family="text">
      <style:text-properties fo:font-size="12pt" fo:language="en" fo:country="US" fo:font-weight="normal" officeooo:rsid="00888d77" style:font-size-asian="12pt" style:font-weight-asian="normal" style:font-size-complex="12pt" style:font-weight-complex="normal"/>
    </style:style>
    <style:style style:name="T160" style:family="text">
      <style:text-properties fo:font-size="12pt" fo:language="ru" fo:country="RU" fo:font-weight="normal" officeooo:rsid="00888d77" style:font-size-asian="12pt" style:font-weight-asian="normal" style:font-size-complex="12pt" style:font-weight-complex="normal"/>
    </style:style>
    <style:style style:name="T161" style:family="text">
      <style:text-properties fo:font-size="12pt" fo:language="en" fo:country="US" fo:font-weight="normal" officeooo:rsid="007e7d89" style:font-size-asian="12pt" style:font-weight-asian="normal" style:font-size-complex="12pt" style:font-weight-complex="normal"/>
    </style:style>
    <style:style style:name="T162" style:family="text">
      <style:text-properties fo:font-size="12pt" fo:language="en" fo:country="US" fo:font-weight="normal" officeooo:rsid="007c5f25" style:font-size-asian="12pt" style:font-weight-asian="normal" style:font-size-complex="12pt" style:font-weight-complex="normal"/>
    </style:style>
    <style:style style:name="T163" style:family="text">
      <style:text-properties fo:font-size="12pt" fo:language="ru" fo:country="RU" fo:font-weight="normal" officeooo:rsid="007e7d89" style:font-size-asian="12pt" style:font-weight-asian="normal" style:font-size-complex="12pt" style:font-weight-complex="normal"/>
    </style:style>
    <style:style style:name="T164" style:family="text">
      <style:text-properties fo:font-size="12pt" fo:font-weight="normal" style:font-size-asian="12pt" style:font-weight-asian="normal" style:font-size-complex="12pt" style:font-weight-complex="normal"/>
    </style:style>
    <style:style style:name="T165" style:family="text">
      <style:text-properties fo:font-size="12pt" fo:language="ru" fo:country="RU" fo:font-weight="normal" officeooo:rsid="0074fd31" style:font-size-asian="12pt" style:font-weight-asian="normal" style:font-size-complex="12pt" style:font-weight-complex="normal"/>
    </style:style>
    <style:style style:name="T166" style:family="text">
      <style:text-properties fo:font-size="12pt" fo:font-weight="normal" officeooo:rsid="0074fd31" style:font-size-asian="12pt" style:font-weight-asian="normal" style:font-size-complex="12pt" style:font-weight-complex="normal"/>
    </style:style>
    <style:style style:name="T167" style:family="text">
      <style:text-properties fo:font-size="12pt" fo:font-weight="normal" officeooo:rsid="0046e7cd" style:font-size-asian="12pt" style:font-weight-asian="normal" style:font-size-complex="12pt" style:font-weight-complex="normal"/>
    </style:style>
    <style:style style:name="T168" style:family="text">
      <style:text-properties fo:font-size="12pt" fo:font-weight="normal" officeooo:rsid="00760aac" style:font-size-asian="12pt" style:font-weight-asian="normal" style:font-size-complex="12pt" style:font-weight-complex="normal"/>
    </style:style>
    <style:style style:name="T169" style:family="text">
      <style:text-properties fo:font-size="12pt" fo:language="ru" fo:country="RU" fo:font-weight="normal" officeooo:rsid="007c5f25" style:font-size-asian="12pt" style:font-weight-asian="normal" style:font-size-complex="12pt" style:font-weight-complex="normal"/>
    </style:style>
    <style:style style:name="T170" style:family="text">
      <style:text-properties fo:font-size="12pt" fo:font-weight="normal" officeooo:rsid="007c5f25" style:font-size-asian="12pt" style:font-weight-asian="normal" style:font-size-complex="12pt" style:font-weight-complex="normal"/>
    </style:style>
    <style:style style:name="T171" style:family="text">
      <style:text-properties officeooo:rsid="00760aac"/>
    </style:style>
    <style:style style:name="T172" style:family="text">
      <style:text-properties fo:language="en" fo:country="US" officeooo:rsid="00760aac"/>
    </style:style>
    <style:style style:name="T173" style:family="text">
      <style:text-properties officeooo:rsid="007a8357"/>
    </style:style>
    <style:style style:name="T174" style:family="text">
      <style:text-properties fo:font-size="12pt" fo:language="ru" fo:country="RU" fo:font-weight="normal" officeooo:rsid="0046e7cd" style:font-size-asian="12pt" style:font-weight-asian="normal" style:font-size-complex="12pt" style:font-weight-complex="normal"/>
    </style:style>
    <style:style style:name="T175" style:family="text">
      <style:text-properties fo:font-size="12pt" fo:language="ru" fo:country="RU" fo:font-weight="normal" officeooo:rsid="00639f97" style:font-size-asian="12pt" style:font-weight-asian="normal" style:font-size-complex="12pt" style:font-weight-complex="normal"/>
    </style:style>
    <style:style style:name="T176" style:family="text">
      <style:text-properties fo:font-size="12pt" fo:language="en" fo:country="US" fo:font-weight="normal" officeooo:rsid="0057546b" style:font-size-asian="12pt" style:font-weight-asian="normal" style:font-size-complex="12pt" style:font-weight-complex="normal"/>
    </style:style>
    <style:style style:name="T177" style:family="text">
      <style:text-properties fo:font-size="12pt" fo:language="ru" fo:country="RU" fo:font-weight="normal" officeooo:rsid="0057546b" style:font-size-asian="12pt" style:font-weight-asian="normal" style:font-size-complex="12pt" style:font-weight-complex="normal"/>
    </style:style>
    <style:style style:name="T178" style:family="text">
      <style:text-properties fo:font-size="12pt" fo:language="ru" fo:country="RU" fo:font-weight="normal" officeooo:rsid="005aa1ac" style:font-size-asian="12pt" style:font-weight-asian="normal" style:font-size-complex="12pt" style:font-weight-complex="normal"/>
    </style:style>
    <style:style style:name="T179" style:family="text">
      <style:text-properties fo:font-size="12pt" fo:language="en" fo:country="US" fo:font-weight="normal" officeooo:rsid="00639f97" style:font-size-asian="12pt" style:font-weight-asian="normal" style:font-size-complex="12pt" style:font-weight-complex="normal"/>
    </style:style>
    <style:style style:name="T180" style:family="text">
      <style:text-properties fo:font-size="12pt" fo:font-weight="normal" officeooo:rsid="0057eba2" style:font-size-asian="12pt" style:font-weight-asian="normal" style:font-size-complex="12pt" style:font-weight-complex="normal"/>
    </style:style>
    <style:style style:name="T181" style:family="text">
      <style:text-properties fo:font-size="12pt" fo:font-weight="normal" officeooo:rsid="005aa1ac" style:font-size-asian="12pt" style:font-weight-asian="normal" style:font-size-complex="12pt" style:font-weight-complex="normal"/>
    </style:style>
    <style:style style:name="T182" style:family="text">
      <style:text-properties fo:font-size="12pt" fo:language="ru" fo:country="RU" fo:font-weight="normal" officeooo:rsid="0068d55f" style:font-size-asian="12pt" style:font-weight-asian="normal" style:font-size-complex="12pt" style:font-weight-complex="normal"/>
    </style:style>
    <style:style style:name="T183" style:family="text">
      <style:text-properties fo:font-size="12pt" fo:font-weight="normal" officeooo:rsid="0068d55f" style:font-size-asian="12pt" style:font-weight-asian="normal" style:font-size-complex="12pt" style:font-weight-complex="normal"/>
    </style:style>
    <style:style style:name="T184" style:family="text">
      <style:text-properties fo:font-size="12pt" fo:language="ru" fo:country="RU" fo:font-weight="normal" officeooo:rsid="00676ef1" style:font-size-asian="12pt" style:font-weight-asian="normal" style:font-size-complex="12pt" style:font-weight-complex="normal"/>
    </style:style>
    <style:style style:name="T185" style:family="text">
      <style:text-properties fo:font-size="12pt" fo:font-weight="normal" officeooo:rsid="00676ef1" style:font-size-asian="12pt" style:font-weight-asian="normal" style:font-size-complex="12pt" style:font-weight-complex="normal"/>
    </style:style>
    <style:style style:name="T186" style:family="text">
      <style:text-properties fo:font-size="12pt" fo:language="en" fo:country="US" fo:font-weight="normal" officeooo:rsid="0046e7cd" style:font-size-asian="12pt" style:font-weight-asian="normal" style:font-size-complex="12pt" style:font-weight-complex="normal"/>
    </style:style>
    <style:style style:name="T187" style:family="text">
      <style:text-properties fo:language="ru" fo:country="RU" officeooo:rsid="004ba1d6"/>
    </style:style>
    <style:style style:name="T188" style:family="text">
      <style:text-properties fo:language="ru" fo:country="RU" officeooo:rsid="0050ad5a"/>
    </style:style>
    <style:style style:name="T189" style:family="text">
      <style:text-properties officeooo:rsid="0050ad5a"/>
    </style:style>
    <style:style style:name="T190" style:family="text">
      <style:text-properties officeooo:rsid="00324f7c"/>
    </style:style>
    <style:style style:name="T191" style:family="text">
      <style:text-properties fo:language="en" fo:country="US" officeooo:rsid="00324f7c"/>
    </style:style>
    <style:style style:name="T192" style:family="text">
      <style:text-properties officeooo:rsid="0038954a"/>
    </style:style>
    <style:style style:name="T193" style:family="text">
      <style:text-properties fo:language="en" fo:country="US" officeooo:rsid="002dd76c"/>
    </style:style>
    <style:style style:name="T194" style:family="text">
      <style:text-properties officeooo:rsid="00270c69"/>
    </style:style>
    <style:style style:name="T195" style:family="text">
      <style:text-properties fo:language="en" fo:country="US" officeooo:rsid="00270c69"/>
    </style:style>
    <style:style style:name="T196" style:family="text">
      <style:text-properties officeooo:rsid="00281f4e"/>
    </style:style>
    <style:style style:name="T197" style:family="text">
      <style:text-properties fo:language="ru" fo:country="RU" officeooo:rsid="00281f4e"/>
    </style:style>
    <style:style style:name="T198" style:family="text">
      <style:text-properties fo:language="en" fo:country="US" officeooo:rsid="00ba1ff1"/>
    </style:style>
    <style:style style:name="T199" style:family="text">
      <style:text-properties fo:language="ru" fo:country="RU" officeooo:rsid="00d3c6ee"/>
    </style:style>
    <style:style style:name="T200" style:family="text">
      <style:text-properties fo:language="en" fo:country="US" officeooo:rsid="00d3c6ee"/>
    </style:style>
    <style:style style:name="T201" style:family="text">
      <style:text-properties fo:language="ru" fo:country="RU" officeooo:rsid="0118a9f0"/>
    </style:style>
    <style:style style:name="T202" style:family="text">
      <style:text-properties fo:language="ru" fo:country="RU" officeooo:rsid="011adb2b"/>
    </style:style>
    <style:style style:name="T203" style:family="text">
      <style:text-properties officeooo:rsid="0109178a"/>
    </style:style>
    <style:style style:name="T204" style:family="text">
      <style:text-properties fo:font-size="12pt" fo:language="en" fo:country="US" fo:font-weight="normal" officeooo:rsid="00de59c9" style:font-size-asian="12pt" style:font-weight-asian="normal" style:font-size-complex="12pt" style:font-weight-complex="normal"/>
    </style:style>
    <style:style style:name="T205" style:family="text">
      <style:text-properties fo:font-size="12pt" fo:language="ru" fo:country="RU" fo:font-weight="normal" officeooo:rsid="00de59c9" style:font-size-asian="12pt" style:font-weight-asian="normal" style:font-size-complex="12pt" style:font-weight-complex="normal"/>
    </style:style>
    <style:style style:name="T206" style:family="text">
      <style:text-properties officeooo:rsid="00c845cb"/>
    </style:style>
    <style:style style:name="T207" style:family="text">
      <style:text-properties fo:language="ru" fo:country="RU" officeooo:rsid="00b46ad2"/>
    </style:style>
    <style:style style:name="T208" style:family="text">
      <style:text-properties fo:language="ru" fo:country="RU" officeooo:rsid="00a77c01"/>
    </style:style>
    <style:style style:name="T209" style:family="text">
      <style:text-properties fo:language="ru" fo:country="RU" officeooo:rsid="00acb594"/>
    </style:style>
    <style:style style:name="T210" style:family="text">
      <style:text-properties fo:language="ru" fo:country="RU" officeooo:rsid="00a82d9f"/>
    </style:style>
    <style:style style:name="T211" style:family="text">
      <style:text-properties fo:language="ru" fo:country="RU" officeooo:rsid="004f67fd"/>
    </style:style>
    <style:style style:name="T212" style:family="text">
      <style:text-properties officeooo:rsid="004f67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45">
      <number:day/>
      <number:text>. </number:text>
      <number:month number:textual="true"/>
      <number:text>. </number:text>
      <number:year number:style="long"/>
    </number:date-style>
  </office:automatic-styles>
  <office:body>
    <office:text text:use-soft-page-breaks="true">
      <office:forms form:automatic-focus="false" form:apply-design-mode="false">
        <form:form form:name="Форма"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Описание системного ПЗУ </text:span><text:span text:style-name="T2">ZX Evolution</text:span></text:p>
      <text:p text:style-name="P2"/>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Contents_20_Heading">Оглавление</text:p>
          </text:index-title>
          <text:p text:style-name="P3"><text:a xlink:type="simple" xlink:href="#__RefHeading__7496_2044125182" office:name="Описание сервис прошивки «EVO Reset Service» v 0.60.05 (FE)" text:style-name="Index_20_Link" text:visited-style-name="Index_20_Link">Описание сервис прошивки «EVO Reset Service» v 0.60.05 (FE)<text:tab/>4</text:a></text:p>
          <text:p text:style-name="P4"><text:a xlink:type="simple" xlink:href="#__RefHeading___Toc8940_2783560777" office:name="Версии прошивок (ROM файл zxevo.rom и zxevo_fe.rom)" text:style-name="Index_20_Link" text:visited-style-name="Index_20_Link">Версии прошивок (ROM файл zxevo.rom и zxevo_fe.rom)<text:tab/>4</text:a></text:p>
          <text:p text:style-name="P4"><text:a xlink:type="simple" xlink:href="#__RefHeading__7498_2044125182" office:name="Системные требования" text:style-name="Index_20_Link" text:visited-style-name="Index_20_Link">Системные требования<text:tab/>4</text:a></text:p>
          <text:p text:style-name="P4"><text:a xlink:type="simple" xlink:href="#__RefHeading__7500_2044125182" office:name="ПРЕДУПРЕЖДЕНИЯ" text:style-name="Index_20_Link" text:visited-style-name="Index_20_Link">ПРЕДУПРЕЖДЕНИЯ<text:tab/>4</text:a></text:p>
          <text:p text:style-name="P4"><text:a xlink:type="simple" xlink:href="#__RefHeading__7502_2044125182" office:name="Клавиши управления" text:style-name="Index_20_Link" text:visited-style-name="Index_20_Link">Клавиши управления<text:tab/>5</text:a></text:p>
          <text:p text:style-name="P5"><text:a xlink:type="simple" xlink:href="#__RefHeading__7504_2044125182" office:name="Кнопки клавиатуры+RESET" text:style-name="Index_20_Link" text:visited-style-name="Index_20_Link">Кнопки клавиатуры+RESET<text:tab/>5</text:a></text:p>
          <text:p text:style-name="P5"><text:a xlink:type="simple" xlink:href="#__RefHeading__7506_2044125182" office:name="Управление в главном меню" text:style-name="Index_20_Link" text:visited-style-name="Index_20_Link">Управление в главном меню<text:tab/>5</text:a></text:p>
          <text:p text:style-name="P5"><text:a xlink:type="simple" xlink:href="#__RefHeading__7508_2044125182" office:name="Горячие клавиши главного меню" text:style-name="Index_20_Link" text:visited-style-name="Index_20_Link">Горячие клавиши главного меню<text:tab/>5</text:a></text:p>
          <text:p text:style-name="P5"><text:a xlink:type="simple" xlink:href="#__RefHeading__7510_2044125182" office:name="Горячие клавиши меню Service" text:style-name="Index_20_Link" text:visited-style-name="Index_20_Link">Горячие клавиши меню Service<text:tab/>6</text:a></text:p>
          <text:p text:style-name="P4"><text:a xlink:type="simple" xlink:href="#__RefHeading__7549_2044125182" office:name="Setup" text:style-name="Index_20_Link" text:visited-style-name="Index_20_Link">Setup<text:tab/>7</text:a></text:p>
          <text:p text:style-name="P4"><text:a xlink:type="simple" xlink:href="#__RefHeading__7551_2044125182" office:name="File browser" text:style-name="Index_20_Link" text:visited-style-name="Index_20_Link">File browser<text:tab/>7</text:a></text:p>
          <text:p text:style-name="P4"><text:a xlink:type="simple" xlink:href="#__RefHeading__7512_2044125182" office:name="Просмотр SCL и TRD образов и запуск Basic файлов" text:style-name="Index_20_Link" text:visited-style-name="Index_20_Link">Просмотр SCL и TRD образов и запуск Basic файлов<text:tab/>7</text:a></text:p>
          <text:p text:style-name="P4"><text:a xlink:type="simple" xlink:href="#__RefHeading__7514_2044125182" office:name="Автомонтирование TRD образов" text:style-name="Index_20_Link" text:visited-style-name="Index_20_Link">Автомонтирование TRD образов<text:tab/>8</text:a></text:p>
          <text:p text:style-name="P4"><text:a xlink:type="simple" xlink:href="#__RefHeading__7516_2044125182" office:name="Загрузка IS-DOS с винчестера" text:style-name="Index_20_Link" text:visited-style-name="Index_20_Link">Загрузка IS-DOS с винчестера<text:tab/>9</text:a></text:p>
          <text:p text:style-name="P4"><text:a xlink:type="simple" xlink:href="#__RefHeading__7518_2044125182" office:name="Обновление FLASH ROM" text:style-name="Index_20_Link" text:visited-style-name="Index_20_Link">Обновление FLASH ROM<text:tab/>9</text:a></text:p>
          <text:p text:style-name="P4"><text:a xlink:type="simple" xlink:href="#__RefHeading__7520_2044125182" office:name="Изменение шрифта для текстового видео режима" text:style-name="Index_20_Link" text:visited-style-name="Index_20_Link">Изменение шрифта для текстового видео режима<text:tab/>9</text:a></text:p>
          <text:p text:style-name="P4"><text:a xlink:type="simple" xlink:href="#__RefHeading__7522_2044125182" office:name="Выбор альтернативных прошивок" text:style-name="Index_20_Link" text:visited-style-name="Index_20_Link">Выбор альтернативных прошивок<text:tab/>9</text:a></text:p>
          <text:p text:style-name="P4"><text:a xlink:type="simple" xlink:href="#__RefHeading__7524_2044125182" office:name="Выбор TRD, SCL и FDI образов" text:style-name="Index_20_Link" text:visited-style-name="Index_20_Link">Выбор TRD, SCL и FDI образов<text:tab/>10</text:a></text:p>
          <text:p text:style-name="P4"><text:a xlink:type="simple" xlink:href="#__RefHeading__7526_2044125182" office:name="Загрузка с ленты и ее эмуляция" text:style-name="Index_20_Link" text:visited-style-name="Index_20_Link">Загрузка с ленты и ее эмуляция<text:tab/>10</text:a></text:p>
          <text:p text:style-name="P4"><text:a xlink:type="simple" xlink:href="#__RefHeading__7350_855835153" office:name="Альтернативные Basic 48 и Basic 128" text:style-name="Index_20_Link" text:visited-style-name="Index_20_Link">Альтернативные Basic 48 и Basic 128<text:tab/>10</text:a></text:p>
          <text:p text:style-name="P4"><text:a xlink:type="simple" xlink:href="#__RefHeading__7352_855835153" office:name="Запуск HOBETA, SNA и SPG файлов" text:style-name="Index_20_Link" text:visited-style-name="Index_20_Link">Запуск HOBETA, SNA и SPG файлов<text:tab/>11</text:a></text:p>
          <text:p text:style-name="P5"><text:a xlink:type="simple" xlink:href="#__RefHeading__7530_2044125182" office:name="Состояние памяти при запуске HOBETA файлов" text:style-name="Index_20_Link" text:visited-style-name="Index_20_Link">Состояние памяти при запуске HOBETA файлов<text:tab/>11</text:a></text:p>
          <text:p text:style-name="P4"><text:a xlink:type="simple" xlink:href="#__RefHeading___Toc8370_3240954699" office:name="Просмотр подключенных устройств IDE" text:style-name="Index_20_Link" text:visited-style-name="Index_20_Link">Просмотр подключенных устройств IDE<text:tab/>11</text:a></text:p>
          <text:p text:style-name="P4"><text:a xlink:type="simple" xlink:href="#__RefHeading___Toc8636_4278257639" office:name="Резидент" text:style-name="Index_20_Link" text:visited-style-name="Index_20_Link">Резидент<text:tab/>11</text:a></text:p>
          <text:p text:style-name="P4"><text:a xlink:type="simple" xlink:href="#__RefHeading__7532_2044125182" office:name="Редактор ячеек CMOS" text:style-name="Index_20_Link" text:visited-style-name="Index_20_Link">Редактор ячеек CMOS<text:tab/>11</text:a></text:p>
          <text:p text:style-name="P4"><text:a xlink:type="simple" xlink:href="#__RefHeading__7534_2044125182" office:name="Тестирование PC клавиатуры" text:style-name="Index_20_Link" text:visited-style-name="Index_20_Link">Тестирование PC клавиатуры<text:tab/>12</text:a></text:p>
          <text:p text:style-name="P4"><text:a xlink:type="simple" xlink:href="#__RefHeading__7536_2044125182" office:name="Кнопка NMI" text:style-name="Index_20_Link" text:visited-style-name="Index_20_Link">Кнопка NMI<text:tab/>12</text:a></text:p>
          <text:p text:style-name="P4"><text:a xlink:type="simple" xlink:href="#__RefHeading__7538_2044125182" office:name="Режим ATM CP/M" text:style-name="Index_20_Link" text:visited-style-name="Index_20_Link">Режим ATM CP/M<text:tab/>13</text:a></text:p>
          <text:p text:style-name="P4"><text:a xlink:type="simple" xlink:href="#__RefHeading__7540_2044125182" office:name="Часы и CMOS" text:style-name="Index_20_Link" text:visited-style-name="Index_20_Link">Часы и CMOS<text:tab/>14</text:a></text:p>
          <text:p text:style-name="P4"><text:a xlink:type="simple" xlink:href="#__RefHeading__7542_2044125182" office:name="Формат RAM диска" text:style-name="Index_20_Link" text:visited-style-name="Index_20_Link">Формат RAM диска<text:tab/>15</text:a></text:p>
          <text:p text:style-name="P3"><text:a xlink:type="simple" xlink:href="#__RefHeading__7553_2044125182" office:name="Описание EVO-DOS и NEO-DOS v0.60" text:style-name="Index_20_Link" text:visited-style-name="Index_20_Link">Описание EVO-DOS и NEO-DOS v0.60<text:tab/>17</text:a></text:p>
          <text:p text:style-name="P4"><text:a xlink:type="simple" xlink:href="#__RefHeading___Toc9458_761554655" office:name="Различия версий DOS" text:style-name="Index_20_Link" text:visited-style-name="Index_20_Link">Различия версий DOS<text:tab/>17</text:a></text:p>
          <text:p text:style-name="P4"><text:a xlink:type="simple" xlink:href="#__RefHeading__7557_2044125182" office:name="Добавленные возможности" text:style-name="Index_20_Link" text:visited-style-name="Index_20_Link">Добавленные возможности<text:tab/>17</text:a></text:p>
          <text:p text:style-name="P3"><text:a xlink:type="simple" xlink:href="#__RefHeading__7559_2044125182" office:name="Внешняя утилита обновления FlashROM" text:style-name="Index_20_Link" text:visited-style-name="Index_20_Link">Внешняя утилита обновления FlashROM<text:tab/>19</text:a></text:p>
          <text:p text:style-name="P3"><text:a xlink:type="simple" xlink:href="#__RefHeading__7580_2044125182" office:name="Вызовы RST 8" text:style-name="Index_20_Link" text:visited-style-name="Index_20_Link">Вызовы RST 8<text:tab/>20</text:a></text:p>
          <text:p text:style-name="P4"><text:a xlink:type="simple" xlink:href="#__RefHeading__7582_2044125182" office:name="Основные вызовы" text:style-name="Index_20_Link" text:visited-style-name="Index_20_Link">Основные вызовы<text:tab/>20</text:a></text:p>
          <text:p text:style-name="P6"><text:a xlink:type="simple" xlink:href="#__RefHeading__6866_904266311" office:name="Инициализация принтера подключаемого через порты AY." text:style-name="Index_20_Link" text:visited-style-name="Index_20_Link">Инициализация принтера подключаемого через порты AY.<text:tab/>20</text:a></text:p>
          <text:p text:style-name="P6"><text:a xlink:type="simple" xlink:href="#__RefHeading__6868_904266311" office:name="Печать символа на AY принтере." text:style-name="Index_20_Link" text:visited-style-name="Index_20_Link">Печать символа на AY принтере.<text:tab/>20</text:a></text:p>
          <text:p text:style-name="P6"><text:a xlink:type="simple" xlink:href="#__RefHeading__6870_904266311" office:name="Печать токена Бейсика на AY принтере." text:style-name="Index_20_Link" text:visited-style-name="Index_20_Link">Печать токена Бейсика на AY принтере.<text:tab/>20</text:a></text:p>
          <text:p text:style-name="P6"><text:a xlink:type="simple" xlink:href="#__RefHeading__6872_904266311" office:name="Печать экранной области на AY принтере." text:style-name="Index_20_Link" text:visited-style-name="Index_20_Link">Печать экранной области на AY принтере.<text:tab/>20</text:a></text:p>
          <text:p text:style-name="P6"><text:a xlink:type="simple" xlink:href="#__RefHeading__6874_904266311" office:name="Инициализация эмуляции работы с лентой." text:style-name="Index_20_Link" text:visited-style-name="Index_20_Link">Инициализация эмуляции работы с лентой.<text:tab/>21</text:a></text:p>
          <text:p text:style-name="P6"><text:a xlink:type="simple" xlink:href="#__RefHeading__6876_904266311" office:name="Вызов эмуляции работы с лентой." text:style-name="Index_20_Link" text:visited-style-name="Index_20_Link">Вызов эмуляции работы с лентой.<text:tab/>21</text:a></text:p>
          <text:p text:style-name="P6"><text:a xlink:type="simple" xlink:href="#__RefHeading__6878_904266311" office:name="Рисование окна на экране." text:style-name="Index_20_Link" text:visited-style-name="Index_20_Link">Рисование окна на экране.<text:tab/>21</text:a></text:p>
          <text:p text:style-name="P6"><text:a xlink:type="simple" xlink:href="#__RefHeading__6880_904266311" office:name="Печать текстовой строки с управляющими кодами" text:style-name="Index_20_Link" text:visited-style-name="Index_20_Link">Печать текстовой строки с управляющими кодами<text:tab/>21</text:a></text:p>
          <text:p text:style-name="P6"><text:a xlink:type="simple" xlink:href="#__RefHeading__6882_904266311" office:name="Печать символа на экране" text:style-name="Index_20_Link" text:visited-style-name="Index_20_Link">Печать символа на экране<text:tab/>21</text:a></text:p>
          <text:p text:style-name="P6"><text:a xlink:type="simple" xlink:href="#__RefHeading__6884_904266311" office:name="Сдвиг окна вверх с цветом или без цвета." text:style-name="Index_20_Link" text:visited-style-name="Index_20_Link">Сдвиг окна вверх с цветом или без цвета.<text:tab/>22</text:a></text:p>
          <text:p text:style-name="P6"><text:a xlink:type="simple" xlink:href="#__RefHeading__6886_904266311" office:name="Сдвиг окна вниз с цветом или без цвета." text:style-name="Index_20_Link" text:visited-style-name="Index_20_Link"><text:soft-page-break/>Сдвиг окна вниз с цветом или без цвета.<text:tab/>22</text:a></text:p>
          <text:p text:style-name="P6"><text:a xlink:type="simple" xlink:href="#__RefHeading__6888_904266311" office:name="Установка частоты процессора, видеорежима и модели памяти." text:style-name="Index_20_Link" text:visited-style-name="Index_20_Link">Установка частоты процессора, видеорежима и модели памяти.<text:tab/>22</text:a></text:p>
          <text:p text:style-name="P6"><text:a xlink:type="simple" xlink:href="#__RefHeading___Toc7909_410474887" office:name="Математические функции" text:style-name="Index_20_Link" text:visited-style-name="Index_20_Link">Математические функции<text:tab/>22</text:a></text:p>
          <text:p text:style-name="P6"><text:a xlink:type="simple" xlink:href="#__RefHeading___Toc8323_2230053599" office:name="Получение номера версии прошивки." text:style-name="Index_20_Link" text:visited-style-name="Index_20_Link">Получение номера версии прошивки.<text:tab/>24</text:a></text:p>
          <text:p text:style-name="P6"><text:a xlink:type="simple" xlink:href="#__RefHeading__6890_904266311" office:name="Вызов менеджера устройств" text:style-name="Index_20_Link" text:visited-style-name="Index_20_Link">Вызов менеджера устройств<text:tab/>24</text:a></text:p>
          <text:p text:style-name="P6"><text:a xlink:type="simple" xlink:href="#__RefHeading__6892_904266311" office:name="Вызов FAT драйвера" text:style-name="Index_20_Link" text:visited-style-name="Index_20_Link">Вызов FAT драйвера<text:tab/>24</text:a></text:p>
          <text:p text:style-name="P6"><text:a xlink:type="simple" xlink:href="#__RefHeading__6894_904266311" office:name="Вызов сортировщика найденных файлов" text:style-name="Index_20_Link" text:visited-style-name="Index_20_Link">Вызов сортировщика найденных файлов<text:tab/>25</text:a></text:p>
          <text:p text:style-name="P6"><text:a xlink:type="simple" xlink:href="#__RefHeading__6896_904266311" office:name="Вызов подпрограмм работы с примонтированными образами." text:style-name="Index_20_Link" text:visited-style-name="Index_20_Link">Вызов подпрограмм работы с примонтированными образами.<text:tab/>25</text:a></text:p>
          <text:p text:style-name="P6"><text:a xlink:type="simple" xlink:href="#__RefHeading__6898_904266311" office:name="Монтирование образа." text:style-name="Index_20_Link" text:visited-style-name="Index_20_Link">Монтирование образа.<text:tab/>25</text:a></text:p>
          <text:p text:style-name="P6"><text:a xlink:type="simple" xlink:href="#__RefHeading__6900_904266311" office:name="Чтение/запись примонтированных образов." text:style-name="Index_20_Link" text:visited-style-name="Index_20_Link">Чтение/запись примонтированных образов.<text:tab/>25</text:a></text:p>
          <text:p text:style-name="P6"><text:a xlink:type="simple" xlink:href="#__RefHeading__6902_904266311" office:name="Поиск монтируемых образов прописанных в файле IMAGE.MNT" text:style-name="Index_20_Link" text:visited-style-name="Index_20_Link">Поиск монтируемых образов прописанных в файле IMAGE.MNT<text:tab/>25</text:a></text:p>
          <text:p text:style-name="P6"><text:a xlink:type="simple" xlink:href="#__RefHeading__6904_904266311" office:name="Получение описателей примонтированных образов" text:style-name="Index_20_Link" text:visited-style-name="Index_20_Link">Получение описателей примонтированных образов<text:tab/>26</text:a></text:p>
          <text:p text:style-name="P6"><text:a xlink:type="simple" xlink:href="#__RefHeading__6906_904266311" office:name="Демонтирование образов." text:style-name="Index_20_Link" text:visited-style-name="Index_20_Link">Демонтирование образов.<text:tab/>26</text:a></text:p>
          <text:p text:style-name="P6"><text:a xlink:type="simple" xlink:href="#__RefHeading__6908_904266311" office:name="Загрузка образа в рамдиск." text:style-name="Index_20_Link" text:visited-style-name="Index_20_Link">Загрузка образа в рамдиск.<text:tab/>26</text:a></text:p>
          <text:p text:style-name="P6"><text:a xlink:type="simple" xlink:href="#__RefHeading___Toc8144_2723042641" office:name="Функция отсутствует." text:style-name="Index_20_Link" text:visited-style-name="Index_20_Link">Функция отсутствует.<text:tab/>27</text:a></text:p>
          <text:p text:style-name="P6"><text:a xlink:type="simple" xlink:href="#__RefHeading___Toc8146_2723042641" office:name="Получение описателя файла загруженного в рамдиск." text:style-name="Index_20_Link" text:visited-style-name="Index_20_Link">Получение описателя файла загруженного в рамдиск.<text:tab/>27</text:a></text:p>
          <text:p text:style-name="P6"><text:a xlink:type="simple" xlink:href="#__RefHeading___Toc8148_2723042641" office:name="Проверка примонтированного образа на указанной букве." text:style-name="Index_20_Link" text:visited-style-name="Index_20_Link">Проверка примонтированного образа на указанной букве.<text:tab/>27</text:a></text:p>
          <text:p text:style-name="P6"><text:a xlink:type="simple" xlink:href="#__RefHeading___Toc8150_2723042641" office:name="Получение битов смонтированных дисков." text:style-name="Index_20_Link" text:visited-style-name="Index_20_Link">Получение битов смонтированных дисков.<text:tab/>27</text:a></text:p>
          <text:p text:style-name="P6"><text:a xlink:type="simple" xlink:href="#__RefHeading___Toc8152_2723042641" office:name="Монтирование рамдиска" text:style-name="Index_20_Link" text:visited-style-name="Index_20_Link">Монтирование рамдиска<text:tab/>27</text:a></text:p>
          <text:p text:style-name="P6"><text:a xlink:type="simple" xlink:href="#__RefHeading__6910_904266311" office:name="Установка загрузчика Hobeta и SPG файлов" text:style-name="Index_20_Link" text:visited-style-name="Index_20_Link">Установка загрузчика Hobeta и SPG файлов<text:tab/>27</text:a></text:p>
          <text:p text:style-name="P6"><text:a xlink:type="simple" xlink:href="#__RefHeading__6912_904266311" office:name="Работа с ячейками CMOS" text:style-name="Index_20_Link" text:visited-style-name="Index_20_Link">Работа с ячейками CMOS<text:tab/>28</text:a></text:p>
          <text:p text:style-name="P6"><text:a xlink:type="simple" xlink:href="#__RefHeading__6914_904266311" office:name="Проверка CRC CMOS" text:style-name="Index_20_Link" text:visited-style-name="Index_20_Link">Проверка CRC CMOS<text:tab/>28</text:a></text:p>
          <text:p text:style-name="P6"><text:a xlink:type="simple" xlink:href="#__RefHeading__6916_904266311" office:name="Чтение ячейки CMOS" text:style-name="Index_20_Link" text:visited-style-name="Index_20_Link">Чтение ячейки CMOS<text:tab/>28</text:a></text:p>
          <text:p text:style-name="P6"><text:a xlink:type="simple" xlink:href="#__RefHeading__6918_904266311" office:name="Запись ячейки CMOS." text:style-name="Index_20_Link" text:visited-style-name="Index_20_Link">Запись ячейки CMOS.<text:tab/>28</text:a></text:p>
          <text:p text:style-name="P6"><text:a xlink:type="simple" xlink:href="#__RefHeading__6920_904266311" office:name="Принудительный сброс настроек до дефолтных значений." text:style-name="Index_20_Link" text:visited-style-name="Index_20_Link">Принудительный сброс настроек до дефолтных значений.<text:tab/>28</text:a></text:p>
          <text:p text:style-name="P6"><text:a xlink:type="simple" xlink:href="#__RefHeading___Toc7911_410474887" office:name="Установка палитры." text:style-name="Index_20_Link" text:visited-style-name="Index_20_Link">Установка палитры.<text:tab/>29</text:a></text:p>
          <text:p text:style-name="P6"><text:a xlink:type="simple" xlink:href="#__RefHeading___Toc7913_410474887" office:name="Установка шрифта." text:style-name="Index_20_Link" text:visited-style-name="Index_20_Link">Установка шрифта.<text:tab/>29</text:a></text:p>
          <text:p text:style-name="P4"><text:a xlink:type="simple" xlink:href="#__RefHeading__7584_2044125182" office:name="Функции менеджера устройств" text:style-name="Index_20_Link" text:visited-style-name="Index_20_Link">Функции менеджера устройств<text:tab/>30</text:a></text:p>
          <text:p text:style-name="P6"><text:a xlink:type="simple" xlink:href="#__RefHeading__6922_904266311" office:name="Поиск и инициализация драйверов устройств." text:style-name="Index_20_Link" text:visited-style-name="Index_20_Link">Поиск и инициализация драйверов устройств.<text:tab/>30</text:a></text:p>
          <text:p text:style-name="P6"><text:a xlink:type="simple" xlink:href="#__RefHeading__6924_904266311" office:name="Выбор раздела." text:style-name="Index_20_Link" text:visited-style-name="Index_20_Link">Выбор раздела.<text:tab/>30</text:a></text:p>
          <text:p text:style-name="P6"><text:a xlink:type="simple" xlink:href="#__RefHeading___Toc7915_410474887" office:name="Получение количества найденных разделов, номер текущего и его тип." text:style-name="Index_20_Link" text:visited-style-name="Index_20_Link">Получение количества найденных разделов, номер текущего и его тип.<text:tab/>30</text:a></text:p>
          <text:p text:style-name="P6"><text:a xlink:type="simple" xlink:href="#__RefHeading__6928_904266311" office:name="Получить таблицу найденных разделов." text:style-name="Index_20_Link" text:visited-style-name="Index_20_Link">Получить таблицу найденных разделов.<text:tab/>30</text:a></text:p>
          <text:p text:style-name="P6"><text:a xlink:type="simple" xlink:href="#__RefHeading___Toc7917_410474887" office:name="Вызов драйвера выбранного устройства." text:style-name="Index_20_Link" text:visited-style-name="Index_20_Link">Вызов драйвера выбранного устройства.<text:tab/>31</text:a></text:p>
          <text:p text:style-name="P6"><text:a xlink:type="simple" xlink:href="#__RefHeading___Toc7919_410474887" office:name="Установка битов устройства для вызова драйвера HDD." text:style-name="Index_20_Link" text:visited-style-name="Index_20_Link">Установка битов устройства для вызова драйвера HDD.<text:tab/>31</text:a></text:p>
          <text:p text:style-name="P6"><text:a xlink:type="simple" xlink:href="#__RefHeading__6934_904266311" office:name="Контроль наличия SD карт." text:style-name="Index_20_Link" text:visited-style-name="Index_20_Link">Контроль наличия SD карт.<text:tab/>31</text:a></text:p>
          <text:p text:style-name="P6"><text:a xlink:type="simple" xlink:href="#__RefHeading__6936_904266311" office:name="Прямой вызов драйвера HDD." text:style-name="Index_20_Link" text:visited-style-name="Index_20_Link">Прямой вызов драйвера HDD.<text:tab/>31</text:a></text:p>
          <text:p text:style-name="P6"><text:a xlink:type="simple" xlink:href="#__RefHeading___Toc7921_410474887" office:name="Полная переинициализация раздела." text:style-name="Index_20_Link" text:visited-style-name="Index_20_Link">Полная переинициализация раздела.<text:tab/>32</text:a></text:p>
          <text:p text:style-name="P6"><text:a xlink:type="simple" xlink:href="#__RefHeading___Toc8865_3384946529" office:name="Установка номера сектора для чтения/записи" text:style-name="Index_20_Link" text:visited-style-name="Index_20_Link">Установка номера сектора для чтения/записи<text:tab/>32</text:a></text:p>
          <text:p text:style-name="P4"><text:a xlink:type="simple" xlink:href="#__RefHeading__7586_2044125182" office:name="Функции FAT драйвера" text:style-name="Index_20_Link" text:visited-style-name="Index_20_Link">Функции FAT драйвера<text:tab/>33</text:a></text:p>
          <text:p text:style-name="P6"><text:a xlink:type="simple" xlink:href="#__RefHeading__6938_904266311" office:name="Инициализация переменных текущего выбранного раздела." text:style-name="Index_20_Link" text:visited-style-name="Index_20_Link">Инициализация переменных текущего выбранного раздела.<text:tab/>33</text:a></text:p>
          <text:p text:style-name="P6"><text:a xlink:type="simple" xlink:href="#__RefHeading__6940_904266311" office:name="Получение описателя файла." text:style-name="Index_20_Link" text:visited-style-name="Index_20_Link">Получение описателя файла.<text:tab/>33</text:a></text:p>
          <text:p text:style-name="P6"><text:a xlink:type="simple" xlink:href="#__RefHeading__6942_904266311" office:name="Вход в директорию/выход в предыдущую директорию." text:style-name="Index_20_Link" text:visited-style-name="Index_20_Link">Вход в директорию/выход в предыдущую директорию.<text:tab/>33</text:a></text:p>
          <text:p text:style-name="P6"><text:a xlink:type="simple" xlink:href="#__RefHeading___Toc8348_1791399199" office:name="Получение текущего пути." text:style-name="Index_20_Link" text:visited-style-name="Index_20_Link">Получение текущего пути.<text:tab/>33</text:a></text:p>
          <text:p text:style-name="P6"><text:a xlink:type="simple" xlink:href="#__RefHeading__6944_904266311" office:name="Получение длинного имени файла." text:style-name="Index_20_Link" text:visited-style-name="Index_20_Link">Получение длинного имени файла.<text:tab/>33</text:a></text:p>
          <text:p text:style-name="P6"><text:a xlink:type="simple" xlink:href="#__RefHeading__6946_904266311" office:name="Поиск файла/директории по имени." text:style-name="Index_20_Link" text:visited-style-name="Index_20_Link">Поиск файла/директории по имени.<text:tab/>34</text:a></text:p>
          <text:p text:style-name="P6"><text:a xlink:type="simple" xlink:href="#__RefHeading__6948_904266311" office:name="Поиск всех файлов и директорий в текущей директории." text:style-name="Index_20_Link" text:visited-style-name="Index_20_Link">Поиск всех файлов и директорий в текущей директории.<text:tab/>34</text:a></text:p>
          <text:p text:style-name="P6"><text:a xlink:type="simple" xlink:href="#__RefHeading__6950_904266311" office:name="Установка расширений файла для поиска (до 16 расширений)." text:style-name="Index_20_Link" text:visited-style-name="Index_20_Link">Установка расширений файла для поиска (до 16 расширений).<text:tab/>34</text:a></text:p>
          <text:p text:style-name="P6"><text:a xlink:type="simple" xlink:href="#__RefHeading__6952_904266311" office:name="Открытие файла." text:style-name="Index_20_Link" text:visited-style-name="Index_20_Link">Открытие файла.<text:tab/>34</text:a></text:p>
          <text:p text:style-name="P6"><text:a xlink:type="simple" xlink:href="#__RefHeading__6954_904266311" office:name="Последовательное чтение открытого файла." text:style-name="Index_20_Link" text:visited-style-name="Index_20_Link">Последовательное чтение открытого файла.<text:tab/>35</text:a></text:p>
          <text:p text:style-name="P6"><text:a xlink:type="simple" xlink:href="#__RefHeading__6956_904266311" office:name="Создание таблицы кластеров текущей директории." text:style-name="Index_20_Link" text:visited-style-name="Index_20_Link">Создание таблицы кластеров текущей директории.<text:tab/>35</text:a></text:p>
          <text:p text:style-name="P6"><text:a xlink:type="simple" xlink:href="#__RefHeading__6958_904266311" office:name="Работа с текущей позицией в текущей директории." text:style-name="Index_20_Link" text:visited-style-name="Index_20_Link">Работа с текущей позицией в текущей директории.<text:tab/>35</text:a></text:p>
          <text:p text:style-name="P4"><text:a xlink:type="simple" xlink:href="#__RefHeading__7588_2044125182" office:name="Рисование окна по описателю" text:style-name="Index_20_Link" text:visited-style-name="Index_20_Link">Рисование окна по описателю<text:tab/>36</text:a></text:p>
          <text:p text:style-name="P4"><text:a xlink:type="simple" xlink:href="#__RefHeading__7590_2044125182" office:name="Печать текстовой строки" text:style-name="Index_20_Link" text:visited-style-name="Index_20_Link">Печать текстовой строки<text:tab/>36</text:a></text:p>
          <text:p text:style-name="P3"><text:a xlink:type="simple" xlink:href="#__RefHeading__7561_2044125182" office:name="История версий EVO Reset Service" text:style-name="Index_20_Link" text:visited-style-name="Index_20_Link">История версий EVO Reset Service<text:tab/>38</text:a></text:p>
          <text:p text:style-name="P3"><text:a xlink:type="simple" xlink:href="#__RefHeading__7563_2044125182" office:name="История версий EVO-DOS, NEO-DOS" text:style-name="Index_20_Link" text:visited-style-name="Index_20_Link"><text:soft-page-break/>История версий EVO-DOS, NEO-DOS<text:tab/>53</text:a></text:p>
          <text:p text:style-name="P3"><text:a xlink:type="simple" xlink:href="#__RefHeading__7565_2044125182" office:name="История версий ProfROM v4" text:style-name="Index_20_Link" text:visited-style-name="Index_20_Link">История версий ProfROM v4<text:tab/>59</text:a></text:p>
        </text:index-body>
      </text:table-of-content>
      <text:p text:style-name="P7"/>
      <text:p text:style-name="P7"/>
      <text:p text:style-name="P7"/>
      <text:p text:style-name="P7"><text:date style:data-style-name="N45" text:date-value="2026-01-07T12:32:48.745788931">7. янв. 2026</text:date></text:p>
      <text:h text:style-name="P8" text:outline-level="1"/>
      <text:h text:style-name="P9" text:outline-level="1"><text:bookmark-start text:name="Описание сервис прошивки «EVO Reset Service»"/><text:bookmark-start text:name="__RefHeading__7496_2044125182"/>Описание сервис прошивки <text:span text:style-name="T3">«</text:span><text:span text:style-name="T4">EVO Reset Service</text:span><text:span text:style-name="T3">»</text:span><text:bookmark-end text:name="Описание сервис прошивки «EVO Reset Service»"/><text:span text:style-name="T3"> </text:span><text:span text:style-name="T4">v 0.</text:span><text:span text:style-name="T5">60.</text:span><text:span text:style-name="T6">0</text:span><text:span text:style-name="T7">5</text:span><text:span text:style-name="T8"> </text:span><text:span text:style-name="T9">(</text:span><text:span text:style-name="T8">FE</text:span><text:span text:style-name="T9">)</text:span><text:bookmark-end text:name="__RefHeading__7496_2044125182"/></text:h>
      <text:h text:style-name="P10" text:outline-level="2"><text:bookmark-start text:name="__RefHeading___Toc8940_2783560777"/><text:span text:style-name="T10">Версии прошивок </text:span><text:span text:style-name="T11">(</text:span><text:span text:style-name="T12">ROM </text:span><text:span text:style-name="T13">файл zxevo.rom </text:span><text:span text:style-name="T14">и </text:span><text:span text:style-name="T15">zxevo_fe.rom</text:span><text:span text:style-name="T13">)</text:span><text:bookmark-end text:name="__RefHeading___Toc8940_2783560777"/></text:h>
      <text:p text:style-name="P11">Начиная с версии 0.58.17 прошивка существует в двух вариантах <text:span text:style-name="T16">(</text:span><text:a xlink:type="simple" xlink:href="#2.1.Различия версий DOS|outline" text:style-name="Internet_20_link" text:visited-style-name="Visited_20_Internet_20_Link"><text:span text:style-name="T16">Различия версий DOS</text:span></text:a><text:span text:style-name="T17">)</text:span>:</text:p>
      <text:p text:style-name="P12">zxevo.rom – <text:span text:style-name="T18">полностью программный эмулятор ВГ с пропатченным ПЗУ, предназначен для работы на любой версии прошивки ФПГА, </text:span><text:span text:style-name="T19">укомлектован </text:span><text:span text:style-name="T20">EVO-DOS (</text:span><text:span text:style-name="T19">номер версии </text:span><text:span text:style-name="T3">;</text:span></text:p>
      <text:p text:style-name="P13">zxevo_fe.rom –<text:span text:style-name="T3"> эмуляция программно-аппаратная и требующая соответствующей прошивки </text:span>FPGA <text:span text:style-name="T21">(файл zxevo_fw.bin </text:span><text:span text:style-name="T22">из папки </text:span><text:span text:style-name="T23">cfgs/</text:span><text:span text:style-name="T22">standalone_base_trdemu/</text:span><text:span text:style-name="T24">trunk</text:span><text:span text:style-name="T21">)</text:span>. <text:span text:style-name="T3">Не требует специально пропатченной прошивки </text:span>TR-DOS, <text:span text:style-name="T3">возможно использование любой </text:span><text:span text:style-name="T25">версии</text:span><text:span text:style-name="T3"> </text:span>TR-DOS.<text:span text:style-name="T3"> </text:span><text:span text:style-name="T26">В данной версии используется версия на базе</text:span><text:span text:style-name="T27"> TR-DOS 5.03</text:span><text:span text:style-name="T26"> с патчами исправления ошибок, </text:span><text:span text:style-name="T18">поддержкой резидента</text:span><text:span text:style-name="T26"> и расширенными командами в командной строке.</text:span></text:p>
      <text:p text:style-name="P14">При не соответствии прошивке <text:span text:style-name="T28">zxevo_fe.rom </text:span>версии <text:span text:style-name="T4">FPGA </text:span>на экран будет выводится строка:</text:p>
      <text:p text:style-name="P14"><draw:frame draw:style-name="fr1" draw:name="Изображение6" text:anchor-type="char" svg:x="4.533cm" svg:y="0.312cm" svg:width="9.551cm" svg:height="0.741cm" draw:z-index="5"><draw:image xlink:href="Pictures/10000000000001690000001C92C45075.png" xlink:type="simple" xlink:show="embed" xlink:actuate="onLoad" draw:mime-type="image/png"/></draw:frame></text:p>
      <text:h text:style-name="P15" text:outline-level="2"><text:bookmark-start text:name="__RefHeading__7498_2044125182"/>Системные требования<text:bookmark-end text:name="__RefHeading__7498_2044125182"/></text:h>
      <text:p text:style-name="P16"><text:span text:style-name="T3">Только</text:span> <text:bookmark-start text:name="Системные требования"/>P<text:bookmark-end text:name="Системные требования"/>entEvo <text:span text:style-name="T3">4Мб с прошивкой </text:span>FPGA Baseconf <text:span text:style-name="T22">(standalone_baseconf </text:span><text:span text:style-name="T18">или </text:span><text:span text:style-name="T22">standalone_base_trdemu)</text:span>;</text:p>
      <text:p text:style-name="P17">контроллер <text:span text:style-name="T4">TR-DOS;</text:span></text:p>
      <text:p text:style-name="P18">поддерживается загрузка с:</text:p>
      <text:p text:style-name="P18"><text:tab/>дисковода с дискетой в формате <text:span text:style-name="T4">TR-DOS</text:span>;</text:p>
      <text:p text:style-name="P18"><text:tab/><text:span text:style-name="T4">c SD </text:span>карты <text:span text:style-name="T4">NeoGS </text:span>отформатированная в <text:span text:style-name="T4">FAT;</text:span></text:p>
      <text:p text:style-name="P16"><text:span text:style-name="T3"><text:tab/>с </text:span>SD <text:span text:style-name="T3">карты </text:span>Z-контроллера <text:span text:style-name="T3">(на </text:span>PentEvo <text:span text:style-name="T3">интегрирована</text:span>) <text:span text:style-name="T3">отформатированная в </text:span>FAT;</text:p>
      <text:p text:style-name="P16"><text:tab/><text:span text:style-name="T3">с винчестера подключенного </text:span>по схеме Nemo отформатированн<text:span text:style-name="T3">ый в </text:span>FAT<text:span text:style-name="T3">.</text:span> <text:span text:style-name="T3">Поддерживаются только основные (</text:span>Primary<text:span text:style-name="T3">) разделы.</text:span></text:p>
      <text:h text:style-name="P15"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19">----------------------------------------------------------------<text:span text:style-name="T3">----------------------</text:span>---------------<text:span text:style-name="T3">------------------------</text:span></text:p>
      <text:p text:style-name="P19"/>
      <text:p text:style-name="P20">Для возврата к основной прошивке необходимо нажать и удерживать клавишу «0» и произвести сброс (клавишей <text:span text:style-name="T4">F12)</text:span>, после чего отпустить клавишу «0».</text:p>
      <text:p text:style-name="P19"/>
      <text:p text:style-name="P19">TR-DOS 6.12E <text:span text:style-name="T3">входящий в состав </text:span>Gluk Reset Service <text:span text:style-name="T3">начиная с версии </text:span>EVO Reset Service 0.54 <text:span text:style-name="T3">имеет доступ рамдиску основной прошивки </text:span>(<text:span text:style-name="T3">не к примонтированным образам).</text:span></text:p>
      <text:p text:style-name="P21">Для загрузки и запуска кодовых блоков с <text:span text:style-name="T4">FAT </text:span>файлы должны быть сохранены в <text:span text:style-name="T4">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4">#6000-#FFFF </text:span>с размером кодового блока не выходящего за пределы ОЗУ (сумма адреса загрузки и размера не должны превышать <text:span text:style-name="T4">#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19">File browser <text:span text:style-name="T3">показывает только найденные директории и файлы </text:span>c <text:span text:style-name="T3">расширениями </text:span>TRD, SCL, FDI, TAP, $C, SPG<text:span text:style-name="T3">, </text:span>FNT <text:span text:style-name="T3">и количеством не более 2048 штук. При большем количестве будут показаны только первые 2048 директорий/файлов.</text:span></text:p>
      <text:p text:style-name="P19"><text:span text:style-name="T3">Образы </text:span>TRD <text:span text:style-name="T3">могут быть загружены в рамдиск или примонтированы, образы </text:span>FDI <text:span text:style-name="T3">и</text:span> SCL <text:span text:style-name="T3">всегда только загружаются в рам диск.</text:span></text:p>
      <text:p text:style-name="P22">После обновления содержимого <text:span text:style-name="T4">FlashROM </text:span>рекомендуется нажать кнопку сброс!</text:p>
      <text:p text:style-name="P22"/>
      <text:p text:style-name="P19">-----------------------------------------------------------------------------------------------------------------------------</text:p>
      <text:h text:style-name="P15" text:outline-level="2"><text:bookmark-start text:name="Клавиши управления"/><text:bookmark-start text:name="__RefHeading__7502_2044125182"/><text:soft-page-break/>Клавиши управления<text:bookmark-end text:name="Клавиши управления"/><text:bookmark-end text:name="__RefHeading__7502_2044125182"/></text:h>
      <text:h text:style-name="P23" text:outline-level="3"><text:bookmark-start text:name="Кнопки клавиатуры+RESET"/><text:bookmark-start text:name="__RefHeading__7504_2044125182"/><text:span text:style-name="T29">Кнопки клавиатуры+</text:span><text:span text:style-name="T4">RESET</text:span><text:bookmark-end text:name="Кнопки клавиатуры+RESET"/><text:bookmark-end text:name="__RefHeading__7504_2044125182"/></text:h>
      <text:p text:style-name="P24">Любая буквенная клавиша (кроме ниже описанных<text:span text:style-name="T4">)</text:span>-выводит на экран краткую помощь.</text:p>
      <text:p text:style-name="P25"><text:span text:style-name="T30">CS</text:span>-<text:span text:style-name="T3">перезапуск страницы </text:span>ROM<text:span text:style-name="T3"> </text:span>Basic 128.</text:p>
      <text:p text:style-name="P25"><text:span text:style-name="T30">SS</text:span><text:span text:style-name="T3">-перезапуск страницы </text:span>ROM<text:span text:style-name="T3"> </text:span>Basic<text:span text:style-name="T3"> </text:span>48<text:span text:style-name="T3">.</text:span></text:p>
      <text:p text:style-name="P25"><text:span text:style-name="T30">D</text:span>-<text:span text:style-name="T3">запуск </text:span>DEMO “GRASS” by PSB^Hallowen.</text:p>
      <text:p text:style-name="P25"><text:span text:style-name="T30">C</text:span>-<text:span text:style-name="T3">таблица цветов (клавиши </text:span>SPACE <text:span text:style-name="T3">или </text:span>ENTER <text:span text:style-name="T3">изменение цвета бордюра.</text:span></text:p>
      <text:p text:style-name="P26">H<text:span text:style-name="T31">-</text:span><text:span text:style-name="T32">вывод на экран странички помощи.</text:span></text:p>
      <text:p text:style-name="P25"><text:span text:style-name="T30">S</text:span>-CMOS Setup.</text:p>
      <text:p text:style-name="P25"><text:span text:style-name="T30">0</text:span>-<text:span text:style-name="T3">возврат в </text:span>EVO Reset Service <text:span text:style-name="T3">из дополнительных прошивок.</text:span></text:p>
      <text:p text:style-name="P24">Любые 2 и более нажатых клавиш запускают проверку нажатых клавиш.</text:p>
      <text:h text:style-name="P23" text:outline-level="3"><text:bookmark-start text:name="Управление в основном меню"/><text:bookmark-start text:name="__RefHeading__7506_2044125182"/>Управление в главном меню<text:bookmark-end text:name="Управление в основном меню"/><text:bookmark-end text:name="__RefHeading__7506_2044125182"/></text:h>
      <text:p text:style-name="P25"><text:span text:style-name="T3">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3">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23"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27"><draw:frame draw:style-name="fr2" draw:name="Изображение4" text:anchor-type="paragraph" svg:width="11.37cm" style:rel-width="60%" svg:height="6.65cm" style:rel-height="25%" draw:z-index="1"><draw:image xlink:href="Pictures/100000000000020B0000012E60E84E30.png" xlink:type="simple" xlink:show="embed" xlink:actuate="onLoad" draw:mime-type="image/png"/></draw:frame></text:p>
      <text:p text:style-name="P25"><text:span text:style-name="T30">1...4</text:span>-<text:span text:style-name="T3">выбор дисковода;</text:span></text:p>
      <text:p text:style-name="P25"><text:span text:style-name="T30">V</text:span>-<text:span text:style-name="T3">перебирает по кругу все реальные дисководы;</text:span></text:p>
      <text:p text:style-name="P26">Y-<text:span text:style-name="T32">перебирает по кругу все виртуальные дисководы;</text:span></text:p>
      <text:p text:style-name="P25"><text:span text:style-name="T30">W</text:span><text:span text:style-name="T3">-перебирает режимы </text:span>TURBO 3,5-7-14 <text:span text:style-name="T3">МГц;</text:span></text:p>
      <text:p text:style-name="P26">L<text:span text:style-name="T3">-</text:span><text:span text:style-name="T32">переключение загрузки с магнитофонного входа или эмуляция загрузки;</text:span></text:p>
      <text:p text:style-name="P26">G<text:span text:style-name="T31">-</text:span><text:span text:style-name="T32">выбор куда будет производиться переход по нажатию </text:span><text:span text:style-name="T31">RESET;</text:span></text:p>
      <text:p text:style-name="P26">E<text:span text:style-name="T31">-</text:span><text:span text:style-name="T32">разрешение перезагрузки шрифта для текстмода из ПЗУ;</text:span></text:p>
      <text:p text:style-name="P26">J<text:span text:style-name="T31">-</text:span><text:span text:style-name="T32">выбор типа шрифта из ПЗУ;</text:span></text:p>
      <text:p text:style-name="P26">M<text:span text:style-name="T32">-перебирает по кругу переключение режимов памяти </text:span><text:span text:style-name="T31">ALL/128/48;</text:span></text:p>
      <text:p text:style-name="P25"><text:span text:style-name="T30">Z</text:span>-<text:span text:style-name="T3">вызов загрузчика с </text:span>TR-DOS <text:span text:style-name="T3">дискеты;</text:span></text:p>
      <text:p text:style-name="P25"><text:span text:style-name="T30">F</text:span><text:span text:style-name="T3">-вызов выбора файлов с </text:span>FAT <text:span text:style-name="T3">устройства;</text:span></text:p>
      <text:p text:style-name="P25"><text:span text:style-name="T30">T</text:span><text:span text:style-name="T3">-вызов загрузки с ленты (имитация команды </text:span>LOAD “”)<text:span text:style-name="T3">;</text:span></text:p>
      <text:p text:style-name="P25"><text:span text:style-name="T30">B</text:span><text:span text:style-name="T3">-вызов загрузчика с </text:span>CD <text:span text:style-name="T3">диска (старая функция оставшаяся от </text:span>GLUK<text:span text:style-name="T3">а);</text:span></text:p>
      <text:p text:style-name="P25"><text:span text:style-name="T30">D</text:span><text:span text:style-name="T3">-вызов загрузчика с </text:span>HDD;</text:p>
      <text:p text:style-name="P28">5-<text:span text:style-name="T32">запуск </text:span><text:span text:style-name="T31">HoBeta </text:span><text:span text:style-name="T32">файла с фиксированным именем «</text:span><text:span text:style-name="T31">sd_boot.$C</text:span><text:span text:style-name="T32">» </text:span><text:span text:style-name="T31">c SD </text:span><text:span text:style-name="T32">карты (файл должен находиться в корне карточки);</text:span></text:p>
      <text:p text:style-name="P25"><text:span text:style-name="T30">X-</text:span><text:span text:style-name="T3">запуск </text:span>Perfect commander;</text:p>
      <text:p text:style-name="P25"><text:soft-page-break/><text:span text:style-name="T30">S</text:span><text:span text:style-name="T3">-сброс в </text:span>TR-DOS<text:span text:style-name="T3">;</text:span></text:p>
      <text:p text:style-name="P25"><text:span text:style-name="T30">I</text:span><text:span text:style-name="T3">-сброс в </text:span>Basic <text:span text:style-name="T3">48;</text:span></text:p>
      <text:p text:style-name="P25"><text:span text:style-name="T30">U</text:span><text:span text:style-name="T3">-сброс в </text:span>Basic <text:span text:style-name="T3">128;</text:span></text:p>
      <text:p text:style-name="P25"><text:span text:style-name="T30">R</text:span><text:span text:style-name="T3">-переход в меню </text:span>Service;</text:p>
      <text:p text:style-name="P25"><text:span text:style-name="T30">H</text:span>-<text:span text:style-name="T3">вызов страницы помощи;</text:span></text:p>
      <text:p text:style-name="P24"><text:span text:style-name="T30">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24"><text:span text:style-name="T30">9</text:span>-включение/выключение отображения времени, даты.</text:p>
      <text:p text:style-name="P24"/>
      <text:p text:style-name="P24">Режим памяти и частоту процессора можно поменять в любой момент из любой программы нажав кнопку <text:span text:style-name="T4">NMI </text:span>и выбрав пункт <text:span text:style-name="T4">Setup</text:span> главного меню <text:span text:style-name="T4">Magic </text:span>режима. </text:p>
      <text:p text:style-name="P24">При помощи мыши можно выбирать пункты меню, менять дисковод нажатием на любое место текстовой строки <text:span text:style-name="T33">«TR-DOS Drive: A»</text:span><text:span text:style-name="T4"> (</text:span>перебираются по кругу буквы <text:span text:style-name="T4">A-D);</text:span></text:p>
      <text:p text:style-name="P24">менять режим менеджера памяти компьютера нажатием на любое место текстовой строки <text:span text:style-name="T33">«Memory Lock: off»</text:span><text:span text:style-name="T4"> (</text:span>принимает значения 48/128/<text:span text:style-name="T4">off);</text:span></text:p>
      <text:p text:style-name="P24">менять быстродействие нажатием на любое место текстовой строки <text:span text:style-name="T33">«Turbo Mode: </text:span><text:span text:style-name="T30">7.0</text:span><text:span text:style-name="T33">»</text:span> (принимает значение 3,5/7,0/14,0 мгц);</text:p>
      <text:p text:style-name="P24">менять имя виртуального дисковода нажатием на любое место текстовой строки <text:span text:style-name="T33">«Virtual Drive: A»</text:span><text:span text:style-name="T4"> (</text:span>перебирает по кругу буквы <text:span text:style-name="T4">A-D);</text:span></text:p>
      <text:p text:style-name="P24">запускать файлы найденные на дискетах <text:span text:style-name="T4">TR-DOS </text:span>или на <text:span text:style-name="T4">FAT </text:span>устройствах.</text:p>
      <text:p text:style-name="P24"/>
      <text:h text:style-name="P23" text:outline-level="3"><text:bookmark-start text:name="Горячие клавиши меню «Service»"/><text:bookmark-start text:name="__RefHeading__7510_2044125182"/>Горячие клавиши меню <text:span text:style-name="T4">Service</text:span><text:bookmark-end text:name="Горячие клавиши меню «Service»"/><text:bookmark-end text:name="__RefHeading__7510_2044125182"/></text:h>
      <text:p text:style-name="P24"><draw:frame draw:style-name="fr3" draw:name="Изображение1" text:anchor-type="paragraph" svg:width="6.632cm" style:rel-width="35%" svg:height="5.853cm" style:rel-height="22%" draw:z-index="0"><draw:image xlink:href="Pictures/100000000000012800000107A175B74F.png" xlink:type="simple" xlink:show="embed" xlink:actuate="onLoad" draw:mime-type="image/png"/></draw:frame></text:p>
      <text:p text:style-name="P24"><text:span text:style-name="T33">R</text:span>-сброс <text:span text:style-name="T4">NeoGS </text:span>записью числа 128 в порт 51;</text:p>
      <text:p text:style-name="P25"><text:span text:style-name="T30">E</text:span>-<text:span text:style-name="T3">сброс содержимого </text:span>CMOS;</text:p>
      <text:p text:style-name="P24"><text:span text:style-name="T33">K</text:span>-форматирование виртуального<text:span text:style-name="T4"> </text:span>диска на 640 килобайт;</text:p>
      <text:p text:style-name="P26">V-<text:span text:style-name="T32">сброс в </text:span><text:span text:style-name="T31">Basic </text:span><text:span text:style-name="T32">48 с «оригинальным» (не патченным) ПЗУ</text:span><text:span text:style-name="T31">;</text:span></text:p>
      <text:p text:style-name="P26">B-<text:span text:style-name="T32">сброс в </text:span><text:span text:style-name="T31">Basic 128 </text:span><text:span text:style-name="T32">с «оригинальным» (не патченным) ПЗУ; </text:span></text:p>
      <text:p text:style-name="P24"><text:span text:style-name="T33">I</text:span>-форматирование виртуального<text:span text:style-name="T4"> </text:span>диска на 896 килобайт;</text:p>
      <text:p text:style-name="P25"><text:span text:style-name="T30">M</text:span>-<text:span text:style-name="T3">редактор </text:span>CMOS;</text:p>
      <text:p text:style-name="P25"><text:span text:style-name="T30">S</text:span><text:span text:style-name="T3">-тестер </text:span>PC <text:span text:style-name="T3">клавиатуры;</text:span></text:p>
      <text:p text:style-name="P26">D-<text:span text:style-name="T32">просмотр подключенных устройств </text:span><text:span text:style-name="T31">IDE;</text:span></text:p>
      <text:p text:style-name="P25"><text:span text:style-name="T30">C</text:span>-<text:span text:style-name="T3">вход в режим </text:span>ATM CP/M;</text:p>
      <text:p text:style-name="P26">T-<text:span text:style-name="T32">загрузка </text:span><text:span text:style-name="T31">IS-DOS </text:span><text:span text:style-name="T32">с винчестера;</text:span></text:p>
      <text:p text:style-name="P25"><text:span text:style-name="T30">F</text:span>-<text:span text:style-name="T3">загрузка и обновление </text:span>ROM<text:span text:style-name="T3"> (512 Кб);</text:span></text:p>
      <text:p text:style-name="P25"><text:span text:style-name="T30">U</text:span>-<text:span text:style-name="T3">загрузка и обновление </text:span>ROM <text:span text:style-name="T3">пользователя (64Кб);</text:span></text:p>
      <text:p text:style-name="P25"><text:span text:style-name="T30">N</text:span>-<text:span text:style-name="T3">демонтирование примонтированных </text:span>TRD <text:span text:style-name="T3">образов.</text:span></text:p>
      <text:p text:style-name="P25"><text:span text:style-name="T30">X</text:span>-<text:span text:style-name="T3">выход в основное меню.</text:span></text:p>
      <text:h text:style-name="P15" text:outline-level="2"><text:bookmark-start text:name="Setup"/><text:bookmark-start text:name="__RefHeading__7549_2044125182"/><text:soft-page-break/>Setup<text:bookmark-end text:name="Setup"/><text:bookmark-end text:name="__RefHeading__7549_2044125182"/></text:h>
      <text:p text:style-name="P27"><draw:frame draw:style-name="fr4" draw:name="Изображение2" text:anchor-type="paragraph" svg:width="6.632cm" style:rel-width="35%" svg:height="3.459cm" style:rel-height="13%" draw:z-index="3"><draw:image xlink:href="Pictures/1000000100000153000000B2BB660F6E.png" xlink:type="simple" xlink:show="embed" xlink:actuate="onLoad" draw:mime-type="image/png"/></draw:frame></text:p>
      <text:p text:style-name="P24">В этом меню доступно следующие настройки: </text:p>
      <text:p text:style-name="P29">включение/выключение звука при нажатии на клавиши (начинает работать сразу после выбора);</text:p>
      <text:p text:style-name="P24">включение/выключение доступа к <text:span text:style-name="T4">SD </text:span>карте расположенной на <text:span text:style-name="T4">NeoGS. </text:span>Начинает работать только после сброса или сразу, если разрешен автодетект наличия карточек;</text:p>
      <text:p text:style-name="P24">включение/выключение драйвера принтера для печати из <text:span text:style-name="T4">Basic;</text:span></text:p>
      <text:p text:style-name="P30">включение/отключение резидента для быстрого возврата по сбросу в программу сохранившую свое состояние в верхней памяти;</text:p>
      <text:p text:style-name="P30">включение/выключение порчи резидента для обеспечения однократного возврата в программу сохраненную в верхней памяти;</text:p>
      <text:p text:style-name="P24">включение/выключение автозапуска <text:span text:style-name="T4">TAP </text:span>файлов при выборе в <text:span text:style-name="T4">File browser;</text:span></text:p>
      <text:p text:style-name="P24">установка паузы определения наличия <text:span text:style-name="T4">HDD </text:span>после включения питания, от 0 (пауза выключена) до 9 секунд). Задержка выполняется: после включения питания, при сбросе и занятости <text:span text:style-name="T4">HDD, </text:span>при сбросе с полной инициализацией (0+<text:span text:style-name="T4">F12);</text:span></text:p>
      <text:p text:style-name="P31">установка времени срабатывания скринсейвера, от 0 (выключен) до 9 минут.</text:p>
      <text:h text:style-name="P15" text:outline-level="2"><text:bookmark-start text:name="File browser"/><text:bookmark-start text:name="__RefHeading__7551_2044125182"/>File browser<text:bookmark-end text:name="File browser"/><text:bookmark-end text:name="__RefHeading__7551_2044125182"/></text:h>
      <text:p text:style-name="P24">Начиная с версии 0.5 опция <text:span text:style-name="T4">FAT boot </text:span>переименована в <text:span text:style-name="T4">File browser, </text:span>при ее выборе отображаются все директории и файлы с расширениями <text:span text:style-name="T4">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4">TRD </text:span>будет предложено дополнительное меню, для остальных файлов будет произведены действия в соответствии с выбранным расширением.</text:p>
      <text:p text:style-name="P24">Начиная с версии 0.<text:span text:style-name="T4">52b </text:span>добавлена возможность просмотра картинок в формате <text:span text:style-name="T4">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4">File browser </text:span>для дальнейшего выбора файла.</text:p>
      <text:p text:style-name="P24">Инициализация <text:span text:style-name="T4">FAT </text:span>устройств производится при каждом сбросе. Распределение букв устройств начинается с буквы <text:span text:style-name="T4">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4">SD card</text:span> <text:span text:style-name="T4">NeoGS, </text:span>если в меню <text:span text:style-name="T4">Setup </text:span>к ней разрешен доступ. Последней опрашивается наличие интегрированная <text:span text:style-name="T4">SD </text:span>карта<text:span text:style-name="T4">, </text:span>она же становится выбранной по умолчанию при первом обращении к <text:span text:style-name="T4">FAT </text:span>устройствам<text:span text:style-name="T4">. </text:span>При смене/удалении <text:span text:style-name="T4">SD </text:span>карта<text:span text:style-name="T4"> </text:span>необходимо обязательно производить сброс.</text:p>
      <text:p text:style-name="P24">После вызова <text:span text:style-name="T4">«File browser» </text:span>всегда выводится содержимое раздела к которому было последнее обращение, после сброса это всегда интегрированная <text:span text:style-name="T4">SD </text:span>карта. Клавишей «<text:span text:style-name="T4">D</text:span>»<text:span text:style-name="T4"> </text:span>можно поменять текущее <text:span text:style-name="T4">FAT </text:span>устройство, клавиша «<text:span text:style-name="T4">ENTER</text:span>»<text:span text:style-name="T4"> </text:span>запускает действие в соответствии с расширением файла. <text:span text:style-name="T4">«CS+1» </text:span>или <text:span text:style-name="T4"><text:s/>«BREAK</text:span>»<text:span text:style-name="T4"> - </text:span>возврат в основное меню. </text:p>
      <text:p text:style-name="P24">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4">FAT </text:span>устройство только одно, то меню выбора устройства выдаваться не будет.</text:p>
      <text:h text:style-name="P15" text:outline-level="2"><text:bookmark-start text:name="Просмотр SCL и TRD образов и запуск Basic файлов"/><text:bookmark-start text:name="__RefHeading__7512_2044125182"/>Просмотр <text:span text:style-name="T4">SCL </text:span>и <text:span text:style-name="T4">TRD </text:span>образов и запуск <text:span text:style-name="T4">Basic </text:span>файлов<text:bookmark-end text:name="Просмотр SCL и TRD образов и запуск Basic файлов"/><text:bookmark-end text:name="__RefHeading__7512_2044125182"/></text:h>
      <text:p text:style-name="P24">Начиная с версии 0.55 добавлена возможность просмотра содержимого <text:span text:style-name="T4">SCL </text:span>и <text:span text:style-name="T4">TRD </text:span>образов с возможностью запуска выбранного <text:span text:style-name="T4">Basic </text:span>файла. Для просмотра содержимого образа вместо нажатия «<text:span text:style-name="T4">Enter</text:span>»<text:span text:style-name="T4"> </text:span>необходимо нажать клавишу «<text:span text:style-name="T4">V</text:span>». После нажатия выводится окно аналогичное загрузчику <text:span text:style-name="T4">TR-</text:span><text:soft-page-break/><text:span text:style-name="T4">DOS </text:span>в котором можно выбрать любой файл (показываются только <text:span text:style-name="T4">Basic </text:span>файлы) и запустить его нажатием «<text:span text:style-name="T4">Enter</text:span>». После чего (для <text:span text:style-name="T4">SCL </text:span>образа)<text:span text:style-name="T4"> </text:span>будет произведена загрузка<text:span text:style-name="T4"> </text:span>образа в рамдиск и запуск выбранного файла или предложено (для <text:span text:style-name="T4">TRD </text:span>образа) меню выбора загружать этот образ или монтировать. Из меню выбора (для <text:span text:style-name="T4">TRD </text:span>образа) по клавише «<text:span text:style-name="T4">X</text:span>» можно вернуться в <text:span text:style-name="T4">File browser </text:span>для выбора другого файла.</text:p>
      <text:p text:style-name="P24">Для <text:span text:style-name="T4">SCL </text:span>образов (всегда загружаются в рамдиск) и при выборе загрузки в рамдиск <text:span text:style-name="T4">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4">CMOS </text:span>для дальнейшего использования. Если на букве виртуального дисковода уже смонтирован <text:span text:style-name="T4">TRD </text:span>образ, то будет произведено его демонтирование и все дальнейшие обращения к дисководу будет направлены к рамдиску. </text:p>
      <text:p text:style-name="P24"><draw:frame draw:style-name="fr5" draw:name="Изображение5" text:anchor-type="paragraph" svg:x="3.3cm" svg:y="0.15cm" svg:width="4.738cm" style:rel-width="25%" svg:height="6.119cm" style:rel-height="23%" draw:z-index="4"><draw:image xlink:href="Pictures/10000001000000C6000001056C9701AD.png" xlink:type="simple" xlink:show="embed" xlink:actuate="onLoad" draw:mime-type="image/png"/></draw:frame><draw:frame draw:style-name="fr6" draw:name="Изображение7" text:anchor-type="char" svg:x="10.111cm" svg:y="0.741cm" svg:width="4.738cm" style:rel-width="25%" svg:height="3.193cm" style:rel-height="12%" draw:z-index="6"><draw:image xlink:href="Pictures/10000000000000C600000086A67FD1D2.png" xlink:type="simple" xlink:show="embed" xlink:actuate="onLoad" draw:mime-type="image/png"/></draw:frame></text:p>
      <text:p text:style-name="P32">Выбранный образ можно загрузить без изменения букв реального/виртуального дисковода, загрузить в рамдиск с переключением реального и виртуального дисковода на указанную букву, смонтировать.</text:p>
      <text:p text:style-name="P32">При выборе монтирования для <text:span text:style-name="T4">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4">CMOS.</text:span> <text:span text:style-name="T34">При выборе копирования будет образ </text:span><text:span text:style-name="T35">TRD </text:span><text:span text:style-name="T34">будет только скопирован на указанный диск. Диск должен быть предварительно отформатирован, </text:span><text:span text:style-name="T36">если этот диск не виртуальный</text:span><text:span text:style-name="T34">.</text:span></text:p>
      <text:p text:style-name="P24"/>
      <text:p text:style-name="P24">Примеры:</text:p>
      <text:p text:style-name="P24">просмотр и запуск из <text:span text:style-name="T4">SCL </text:span>файла <text:span text:style-name="T4">(</text:span>также и для <text:span text:style-name="T4">TRD </text:span>образа при выборе загрузки в рамдиск) - виртуальный диск <text:span text:style-name="T4">A:, </text:span>реальный диск <text:span text:style-name="T4">C:. </text:span>После запуска <text:span text:style-name="T4">Basic </text:span>файла и реальный и виртуальный (у виртуального более высокий приоритет перед реальным диском) будут А: что будет видно после сброса.</text:p>
      <text:p text:style-name="P24">просмотр и запуск из <text:span text:style-name="T4">TRD </text:span>с выбором монтирования — выбрано монтирование на букву <text:span text:style-name="T4">D: </text:span>реальный и виртуальный диск станет <text:span text:style-name="T4">D: </text:span>что также будет видно после сброса<text:span text:style-name="T4">.</text:span></text:p>
      <text:h text:style-name="P15" text:outline-level="2"><text:bookmark-start text:name="Автомонтирование TRD образов"/><text:bookmark-start text:name="__RefHeading__7514_2044125182"/>Автомонтирование <text:span text:style-name="T4">TRD </text:span>образов<text:bookmark-end text:name="Автомонтирование TRD образов"/><text:bookmark-end text:name="__RefHeading__7514_2044125182"/></text:h>
      <text:p text:style-name="P24">После сброса по умолчанию в окно <text:span text:style-name="T4">«File browser»</text:span> выводится содержимое последнего найденного раздела<text:span text:style-name="T4">. </text:span>На этом же разделе производится поиск файла <text:span text:style-name="T4">IMAGE.MNT </text:span>для принудительного монтирования <text:span text:style-name="T4">TRD </text:span>образов при разрешенной опции <text:span text:style-name="T4">«Automount TRD». </text:span>Для выполнения возможности автомонтирования инициализация <text:span text:style-name="T4">FAT </text:span>устройств выполняется при сбросе. Пока не выполнен сброс пути для всех устройств запоминаются. Если зайти в любую директорию в <text:span text:style-name="T4">«File browser», </text:span>например смонтировать образ, потом перейти любым способом в командную строку (кроме сброса) <text:span text:style-name="T37">N</text:span><text:span text:style-name="T38">EO</text:span><text:span text:style-name="T4">-DOS </text:span>выбранный путь будет доступен для команды <text:span text:style-name="T4">dir.</text:span></text:p>
      <text:p text:style-name="P24">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24">Буквы <text:span text:style-name="T4">A...D зарезервированы</text:span> за дисководами на место которых будет производиться монтирование образов, <text:span text:style-name="T4">FAT </text:span>устройства начинаются с буквы <text:span text:style-name="T4">E.</text:span> Пример содержимого файла <text:span text:style-name="T4">IMAGE.MNT</text:span>:</text:p>
      <text:p text:style-name="P24"/>
      <text:p text:style-name="P25">e<text:a xlink:type="simple" xlink:href="file:///E:/dir1/dir2/filename.ext" text:style-name="Internet_20_link" text:visited-style-name="Visited_20_Internet_20_Link">:/dir1/dir2/filename.ext</text:a> a:</text:p>
      <text:p text:style-name="P25"><text:a xlink:type="simple" xlink:href="file:///f:/dir3/filename.ext" text:style-name="Internet_20_link" text:visited-style-name="Visited_20_Internet_20_Link">f:/dir3/filename.ext</text:a> b:</text:p>
      <text:p text:style-name="P25"><text:a xlink:type="simple" xlink:href="file:///g:/filename.ext" text:style-name="Internet_20_link" text:visited-style-name="Visited_20_Internet_20_Link"><text:soft-page-break/>g:/filename.ext</text:a> c:</text:p>
      <text:p text:style-name="P25"><text:a xlink:type="simple" xlink:href="file:///f:/dir4/filename.ext" text:style-name="Internet_20_link" text:visited-style-name="Visited_20_Internet_20_Link">f:/dir4/filename.ext</text:a> d:</text:p>
      <text:p text:style-name="P24"/>
      <text:p text:style-name="P24">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4">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4">File browser </text:span>образы можно монтировать из командной строки <text:span text:style-name="T37">N</text:span><text:span text:style-name="T38">EO</text:span><text:span text:style-name="T4">-DOS (</text:span>смотреть описание на <text:span text:style-name="T37">N</text:span><text:span text:style-name="T38">EO</text:span><text:span text:style-name="T4">-DOS).</text:span></text:p>
      <text:p text:style-name="P24">Примонтированные образы имеют приоритет перед рамдиском, после монтирования на ту же букву рам диск принимает значение <text:span text:style-name="T4">off </text:span>и все обращения идут к примонтированному образу вместо обращений к рам диску. Демонтировать любой диск можно через меню <text:span text:style-name="T4">Service-&gt;Dismount image.</text:span></text:p>
      <text:h text:style-name="P15" text:outline-level="2"><text:bookmark-start text:name="Загрузка IS-DOS с винчестера"/><text:bookmark-start text:name="__RefHeading__7516_2044125182"/>Загрузка <text:span text:style-name="T4">IS-DOS </text:span>с винчестера<text:bookmark-end text:name="Загрузка IS-DOS с винчестера"/><text:bookmark-end text:name="__RefHeading__7516_2044125182"/></text:h>
      <text:p text:style-name="P24">Начиная с версии 0.54<text:span text:style-name="T4">b </text:span>в подменю <text:span text:style-name="T4">Service </text:span>добавлен загрузчик <text:span text:style-name="T4">IS-DOS </text:span>с винчестера. Код загрузчика позаимствован из прошивки компьютера <text:span text:style-name="T4">KAY </text:span>без изменений самого загрузчика. Сам загрузчик привязан только к винчестеру подключенному по стандарту <text:span text:style-name="T4">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4">IS-DOS.</text:span></text:p>
      <text:h text:style-name="P15" text:outline-level="2"><text:bookmark-start text:name="Обновление FLASH ROM"/><text:bookmark-start text:name="__RefHeading__7518_2044125182"/>Обновление <text:span text:style-name="T4">FLASH ROM</text:span><text:bookmark-end text:name="Обновление FLASH ROM"/><text:bookmark-end text:name="__RefHeading__7518_2044125182"/></text:h>
      <text:p text:style-name="P24">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24">Прошивание производится для всего <text:span text:style-name="T4">ROM</text:span> все 512 килобайт (64 килобайта для прошивки пользователя). В файловом окне будут отображаться только файлы размером 512<text:span text:style-name="T4"> </text:span>Кб (64 килобайта) и с расширением *<text:span text:style-name="T4">.ROM</text:span>.</text:p>
      <text:p text:style-name="P24">Начиная с версии 0.46 добавлена возможность обновления прошивки пользователя размером 64 Кб. Обязательное условие наличие 2 байт с кодами <text:span text:style-name="T4">#00</text:span>,<text:span text:style-name="T4">#C9 </text:span>по смещению <text:span text:style-name="T4">#3D2F </text:span>в сервисной странице куда производится сброс при выборе соответствующей опции. Расположение страниц в прошивке пользователя: <text:span text:style-name="T4">Basic48, TR-DOS, Basic128, Service.</text:span></text:p>
      <text:p text:style-name="P24">При обновлении полного <text:span text:style-name="T4">ROM </text:span>прошивка пользователя будет стерта. После полного обновления <text:span text:style-name="T4">ROM </text:span>необходимо будет произвести перепрошивание прошивки пользователя в случае надобности.</text:p>
      <text:p text:style-name="P24"/>
      <text:p text:style-name="P33"><text:span text:style-name="T39">Внимание!</text:span><text:span text:style-name="T40"> Особенности прошивки микросхем ПЗУ</text:span><text:span text:style-name="T41"> </text:span><text:span text:style-name="T42">отличных от рекоменд</text:span><text:span text:style-name="T41">ованных</text:span><text:span text:style-name="T42">:</text:span></text:p>
      <text:p text:style-name="P34"><text:span text:style-name="T42">В </text:span><text:span text:style-name="T43">ZX Evolution</text:span><text:span text:style-name="T44"> рекомендуется использовать микросхемы <text:s/>ПЗУ </text:span><text:span text:style-name="T42">ST M29F040 или </text:span><text:span text:style-name="T45">A</text:span><text:span text:style-name="T42">MD Am29F040B.</text:span></text:p>
      <text:p text:style-name="P33"><text:span text:style-name="T46">П</text:span>ри <text:span text:style-name="T46">прошивании прошивки пользователя</text:span><text:span text:style-name="T47">(</text:span><text:span text:style-name="T48">Custom ROM</text:span><text:span text:style-name="T47">)</text:span><text:span text:style-name="T46"> </text:span><text:span text:style-name="T49">в </text:span><text:span text:style-name="T47">не рекомендованные</text:span><text:span text:style-name="T49"> чипы</text:span> не подается команда стирания. <text:span text:style-name="T46">Соответственно </text:span><text:span text:style-name="T47">в этом случае</text:span><text:span text:style-name="T46"> необходимо сначала прошить </text:span><text:span text:style-name="T40">полную прошивку с очищенными(заполненными байтом </text:span><text:span text:style-name="T50">0xFF</text:span><text:span text:style-name="T40">) первыми 64килобайтами.</text:span></text:p>
      <text:h text:style-name="P15"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24">Начиная с версии 0.39а сделана возможность загружать набор символов для отображения текста в текстовом видеорежиме с любого <text:span text:style-name="T4">FAT </text:span>устройства. Для загрузки шрифта необходимо выбрать файл с расширением *.<text:span text:style-name="T4">FNT</text:span>.</text:p>
      <text:p text:style-name="P24">Начиная с версии 0.4 сделана возможность обновлять или не обновлять шрифт из ПЗУ каждый раз при нажатии сброса, опция <text:span text:style-name="T30">"E.Reload FONT"</text:span> <text:span text:style-name="T33">on</text:span><text:span text:style-name="T4"> </text:span>или <text:span text:style-name="T30">off</text:span>. И можно выбирать каким шрифтом можно обновлять из ПЗУ стандартный <text:span text:style-name="T4">ATM (KOI8) </text:span>или <text:span text:style-name="T4">CP866, </text:span>опция <text:span text:style-name="T30">"J.Type FONT"</text:span> <text:span text:style-name="T33">ATM</text:span><text:span text:style-name="T4"> </text:span>или <text:span text:style-name="T33">CP866</text:span><text:span text:style-name="T4">. </text:span>При переключении типа шрифта производится его принудительная загрузка.</text:p>
      <text:h text:style-name="P15"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24">Начиная с версии 0.39 можно использовать кроме основной прошивки альтернативные. Для выбора альтернативной необходимо клавишей <text:span text:style-name="T4">«G» </text:span>перевести соответствующую опцию в положение с <text:soft-page-break/>названием альтернативной прошивке<text:span text:style-name="T4"> </text:span>и при следующем сбросе выбранная прошивка будет доступна для использования.</text:p>
      <text:p text:style-name="P24">Начиная с версии 0.46 добавлена возможность использования прошивки пользователя (<text:span text:style-name="T4">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4">Basic48, TR-DOS, Basic128, Service.</text:span> Сброс производится включением соответствующей страницы <text:span text:style-name="T4">ROM </text:span>и переходом на адрес <text:span text:style-name="T4">#3D2F </text:span>в котором обязательно наличие команд процессора <text:span text:style-name="T4">NOP:RET (</text:span>коды <text:span text:style-name="T4">#</text:span>00,<text:span text:style-name="T4">#C9) </text:span>с дальнейшим переходом на адрес 0<text:span text:style-name="T4">.</text:span></text:p>
      <text:p text:style-name="P24">Для возврата к основной прошивке необходимо нажать и удерживать клавишу «0» и произвести сброс, после чего отпустить клавишу «0».</text:p>
      <text:h text:style-name="P15" text:outline-level="2"><text:bookmark-start text:name="Выбор TRD"/><text:bookmark-start text:name="__RefHeading__7524_2044125182"/>Выбор <text:span text:style-name="T4">TRD</text:span><text:bookmark-end text:name="Выбор TRD"/><text:span text:style-name="T4">,</text:span> <text:span text:style-name="T4">SCL </text:span>и <text:span text:style-name="T4">FDI </text:span>образов<text:bookmark-end text:name="__RefHeading__7524_2044125182"/></text:h>
      <text:p text:style-name="P35"><text:span text:style-name="T31">Начиная с версии 0.21 добавлена загрузка образов (раскрытие образов) </text:span><text:span text:style-name="T51">TRD </text:span><text:span text:style-name="T31">и </text:span><text:span text:style-name="T51">SCL</text:span><text:span text:style-name="T31"> в память для виртуального дисковода для прошивки </text:span><text:span text:style-name="T52">N</text:span><text:span text:style-name="T53">EO</text:span><text:span text:style-name="T51">-DOS</text:span><text:span text:style-name="T31">. Начиная с версии 0.27 добавлена загрузка </text:span><text:span text:style-name="T51">FDI </text:span><text:span text:style-name="T31">образов. Предварительное форматирование рам диска для загрузки образов не требуется.</text:span></text:p>
      <text:p text:style-name="P35"><text:span text:style-name="T31">Начиная с версии 0.5 добавлена возможность монтировать образы </text:span><text:span text:style-name="T51">TRD </text:span><text:span text:style-name="T31">непосредственно с </text:span><text:span text:style-name="T51">FAT </text:span><text:span text:style-name="T31">устройств.</text:span></text:p>
      <text:p text:style-name="P35"><text:span text:style-name="T31">При выборе файлов с расширением </text:span><text:span text:style-name="T51">FDI </text:span><text:span text:style-name="T31">и </text:span><text:span text:style-name="T51">SCL </text:span><text:span text:style-name="T31">всегда производится загрузка образа в область рам диска (возможность монтирования не предусмотрена), при выборе файла с расширением </text:span><text:span text:style-name="T51">TRD </text:span><text:span text:style-name="T31">будет предложена возможность примонтировать образ к букве дисковода или загрузить образ в рам диск. Для обрезанных</text:span><text:span text:style-name="T51"> TRD</text:span><text:span text:style-name="T31">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51">Z.TR-DOS boot</text:span></text:p>
      <text:p text:style-name="P24"><text:s/></text:p>
      <text:p text:style-name="P24"><draw:frame draw:style-name="fr7" draw:name="Изображение3" text:anchor-type="paragraph" svg:width="4.738cm" style:rel-width="25%" svg:height="2.926cm" style:rel-height="11%" draw:z-index="2"><draw:image xlink:href="Pictures/10000001000000D200000082052B7BB9.png" xlink:type="simple" xlink:show="embed" xlink:actuate="onLoad" draw:mime-type="image/png"/></draw:frame></text:p>
      <text:p text:style-name="P35"><text:span text:style-name="T31">Формат </text:span><text:span text:style-name="T51">RAM </text:span><text:span text:style-name="T31">диска описан </text:span><text:a xlink:type="simple" xlink:href="#1.24.Формат RAM диска|outline" text:style-name="Internet_20_link" text:visited-style-name="Visited_20_Internet_20_Link"><text:span text:style-name="T54">тут</text:span></text:a><text:span text:style-name="T31">.</text:span></text:p>
      <text:h text:style-name="P15"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24">Начиная с версии 0.18 добавлена возможность загрузки с кассеты. Вызываемая опция полностью аналогична переходе в Бейсик и подаче команды <text:span text:style-name="T4">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4">EVO Service </text:span>по <text:span text:style-name="T4">BREAK, </text:span>пока не загружен загрузчик с ленты и не произведена перенастройка переменных Бейсика и стека.</text:p>
      <text:p text:style-name="P24">Начиная с версии 0.38 добавлена возможность эмуляции загрузки перехватом стандартной точки <text:span text:style-name="T4">#0556 </text:span>и загрузки <text:span text:style-name="T4">TAP </text:span>файлов с <text:span text:style-name="T4">FAT </text:span>устройств. Для перехвата загрузки опция «<text:span text:style-name="T4">Emu tape load</text:span>» должна быть в положении <text:span text:style-name="T4">«on».</text:span></text:p>
      <text:p text:style-name="P24">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4">LOAD “” </text:span>или из меню Бейсика 128 опцией <text:span text:style-name="T4">«Tape loader». </text:span>При выборе для загрузки принудительно включается опция эмуляции перехвата загрузки с ленты.</text:p>
      <text:h text:style-name="P15" text:outline-level="2"><text:bookmark-start text:name="__RefHeading__7350_855835153"/>Альтернативные <text:span text:style-name="T4">Basic 48 </text:span><text:span text:style-name="T3">и </text:span><text:span text:style-name="T4">Basic 128</text:span><text:bookmark-end text:name="__RefHeading__7350_855835153"/></text:h>
      <text:p text:style-name="P36">Начиная с версии 0.56<text:span text:style-name="T4">c </text:span>предусмотрен сброс в не измененные прошивки <text:span text:style-name="T4">Basic 48 </text:span>и <text:span text:style-name="T4">Basic 128 </text:span>для запуска стандартного <text:span text:style-name="T4">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text:soft-page-break/>выбранным ПЗУ. Выбор с каким ПЗУ производить сброс выбирать в подменю <text:span text:style-name="T4">Service.</text:span></text:p>
      <text:p text:style-name="P37">Для загрузки <text:span text:style-name="T4">TAP </text:span>файлов с магнитофонного входа или с эмуляцией выбирать соответствующие опции в главном меню <text:span text:style-name="T4">ERS </text:span>(<text:span text:style-name="T4">L.Emu tape load: on/off) </text:span>и подменю <text:span text:style-name="T4">Setup (T.Autostart tape: on/off). </text:span>Для сброса в не измененное ПЗУ опцию <text:span text:style-name="T4">Autostart </text:span>рекомендуется выключать.<text:span text:style-name="T4"> </text:span>При включенной опции эмуляции загрузки из <text:span text:style-name="T4">TAP </text:span>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 text:style-name="T4">TAP.</text:span></text:p>
      <text:h text:style-name="P15" text:outline-level="2"><text:bookmark-start text:name="__RefHeading__7352_855835153"/><text:bookmark-start text:name="Запуск HOBETA и SPG файлов"/>Запуск <text:span text:style-name="T4">HOBETA, SNA </text:span>и <text:span text:style-name="T4">SPG </text:span>файлов<text:bookmark-end text:name="__RefHeading__7352_855835153"/><text:bookmark-end text:name="Запуск HOBETA и SPG файлов"/></text:h>
      <text:p text:style-name="P24">При выборе файлов с расширениями <text:span text:style-name="T4">$C </text:span>и <text:span text:style-name="T4">SPG </text:span>будет произведен их запуск.</text:p>
      <text:p text:style-name="P24">Минимальный адрес загрузки/запуска 24576, максимальная длина самого кодового блока 40960 байт (соответственно размер <text:span text:style-name="T4">HOBETA </text:span>файла составит 40977 байт). Адрес загрузки является и адресом запуска. Стек при запуске выставляется в адрес 24575.</text:p>
      <text:p text:style-name="P24">Начиная с версии 0.47 сделана возможность запускать <text:span text:style-name="T4">SPG </text:span>файлы, об особенностях этого формата смотреть соответствующую документацию.</text:p>
      <text:p text:style-name="P24">Начиная с версии <text:span text:style-name="T4">0.57b</text:span> сделана возможность запускать S<text:span text:style-name="T4">NA </text:span>файлы. При запуске 128к <text:span text:style-name="T4">SNA-</text:span>файлов порт<text:span text:style-name="T4">я</text:span>тся два байта на стеке(по адресам SP - 1<text:span text:style-name="T4"> </text:span>и SP - 2), в 48к <text:span text:style-name="T4">SNA </text:span>не портятся.</text:p>
      <text:h text:style-name="P23" text:outline-level="3"><text:bookmark-start text:name="Состояние памяти при запуске HOBETA файлов"/><text:bookmark-start text:name="__RefHeading__7530_2044125182"/>Состояние памяти при запуске <text:span text:style-name="T4">HOBETA </text:span>файлов<text:bookmark-end text:name="Состояние памяти при запуске HOBETA файлов"/><text:bookmark-end text:name="__RefHeading__7530_2044125182"/></text:h>
      <text:p text:style-name="P24">При запуске кодовых блоков из <text:span text:style-name="T4">HOBETA </text:span>файлов переменные Бейсика выставляются стандартным образом, переменные <text:span text:style-name="T4">TR-DOS инициализированы.</text:span> Стек выставляется в адрес <text:span text:style-name="T4">#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38">Очистка экрана не производится!!! Область атрибутов заполняется байтом 0 для маскировки загрузчика работающего в экранной области.</text:p>
      <text:h text:style-name="P15" text:outline-level="2"><text:bookmark-start text:name="__RefHeading___Toc8370_3240954699"/>Просмотр подключенных устройств <text:span text:style-name="T4">IDE</text:span><text:bookmark-end text:name="__RefHeading___Toc8370_3240954699"/></text:h>
      <text:p text:style-name="P38">Начиная с версии 0.58 сделан показ подключенных устройств <text:span text:style-name="T4">IDE. </text:span>Показываются:</text:p>
      <text:p text:style-name="P38">- способ подключения <text:span text:style-name="T4">Master/Slave</text:span></text:p>
      <text:p text:style-name="P38"><text:span text:style-name="T4">- </text:span>имя устройства взятое из сектора идентификации</text:p>
      <text:p text:style-name="P38"><text:span text:style-name="T4">- </text:span>размер устройства в мегабайтах</text:p>
      <text:p text:style-name="P38">Подключенные устройства определяются при каждом входе в просмотрщик. </text:p>
      <text:h text:style-name="P39" text:outline-level="2"><text:bookmark-start text:name="__RefHeading___Toc8636_4278257639"/>Резидент<text:bookmark-end text:name="__RefHeading___Toc8636_4278257639"/></text:h>
      <text:p text:style-name="P40"><text:span text:style-name="T3">Начиная с версии 0.58.13 добавлен резидент позаимствованный из прошивки </text:span><text:span text:style-name="T4">ATM Turbo </text:span><text:span text:style-name="T3">и предназначенный передаче управления на специальный код размещаемый в странице </text:span><text:span text:style-name="T4">0x1F. </text:span></text:p>
      <text:p text:style-name="P41"><text:span text:style-name="T55">Работа резидента зависит от настроек в меню </text:span><text:span text:style-name="T56">Setup. <text:s/></text:span><text:span text:style-name="T55">Пункт «</text:span><text:span text:style-name="T56">Rezident Honey Cmd</text:span><text:span text:style-name="T55">» включает/выключает запуск резидента. Пункт «</text:span><text:span text:style-name="T56">Kill rezident</text:span><text:span text:style-name="T55">» предназначен для порчи резидента и обеспечения о</text:span><text:span text:style-name="T57">днократности</text:span><text:span text:style-name="T55"> его запуска. Принудительное отключение резидента также возможно при сбросе комбинацией 0+</text:span><text:span text:style-name="T56">F12 </text:span><text:span text:style-name="T55">с сохранением выключенного состояния в </text:span><text:span text:style-name="T56">CMOS.</text:span></text:p>
      <text:h text:style-name="P15" text:outline-level="2"><text:bookmark-start text:name="__RefHeading__7532_2044125182"/><text:bookmark-start text:name="Редактор ячеек CMOS"/>Редактор ячеек <text:span text:style-name="T4">CMOS</text:span><text:bookmark-end text:name="__RefHeading__7532_2044125182"/><text:bookmark-end text:name="Редактор ячеек CMOS"/></text:h>
      <text:p text:style-name="P24">Начиная с версии 0.34 сделан редактор ячеек <text:span text:style-name="T4">CMOS </text:span>с добавлением соответствующего пункта в меню <text:span text:style-name="T4">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4">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4">CMOS </text:span>сразу после ввода.</text:p>
      <text:h text:style-name="P15" text:outline-level="2"><text:bookmark-start text:name="Тестирование PC клавиатуры"/><text:bookmark-start text:name="__RefHeading__7534_2044125182"/><text:soft-page-break/>Тестирование <text:span text:style-name="T4">PC </text:span>клавиатуры<text:bookmark-end text:name="Тестирование PC клавиатуры"/><text:bookmark-end text:name="__RefHeading__7534_2044125182"/></text:h>
      <text:p text:style-name="P24">Начиная с версии 0.46 добавлен тестер <text:span text:style-name="T4">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4">F12, Print Screen, Scroll Lock, Pause </text:span>выделенные фиолетовым цветом нажимать не рекомендуется. Выход из режима тестера <text:span text:style-name="T4">ALT+F4 </text:span>или <text:span text:style-name="T4">CTRL+X.</text:span></text:p>
      <text:h text:style-name="P15" text:outline-level="2"><text:bookmark-start text:name="Кнопка Magic"/><text:bookmark-start text:name="__RefHeading__7536_2044125182"/><text:span text:style-name="T3">Кнопка </text:span><text:bookmark-end text:name="Кнопка Magic"/><text:span text:style-name="T4">NMI</text:span><text:bookmark-end text:name="__RefHeading__7536_2044125182"/></text:h>
      <text:p text:style-name="P24">Начиная с версии 0.49 добавлена поддержка волшебной кнопки <text:span text:style-name="T4">Magic</text:span> со своим меню. Пока возможностей немного, по нажатию <text:span text:style-name="T4">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4">R не соответств</text:span>ует действительности), содержимое <text:span text:style-name="T58">всех </text:span>портов <text:span text:style-name="T58">конфигурации</text:span> на момент нажатия <text:span text:style-name="T4">NMI.</text:span> </text:p>
      <text:p text:style-name="P24"/>
      <text:p text:style-name="P42"><draw:frame draw:style-name="fr8" draw:name="Изображение10" text:anchor-type="char" svg:width="16.962cm" svg:height="10.559cm" draw:z-index="9"><draw:image xlink:href="Pictures/10000001000002810000018FC16A524A.png" xlink:type="simple" xlink:show="embed" xlink:actuate="onLoad" draw:mime-type="image/png"/></draw:frame></text:p>
      <text:p text:style-name="P43">В правом верхнем углу отображаются текущее время и дата.</text:p>
      <text:p text:style-name="P43">В меню <text:span text:style-name="T4">Setup </text:span>продублирована возможность изменения режима памяти, частоты процессора <text:span text:style-name="T59">и установки для резидента </text:span><text:span text:style-name="T60">Honey Commander</text:span>. </text:p>
      <text:p text:style-name="P24"><draw:frame draw:style-name="fr1" draw:name="Изображение11" text:anchor-type="char" svg:x="1.438cm" svg:y="0cm" svg:width="6.985cm" svg:height="2.302cm" draw:z-index="10"><draw:image xlink:href="Pictures/10000001000001080000005718203E8C.png" xlink:type="simple" xlink:show="embed" xlink:actuate="onLoad" draw:mime-type="image/png"/></draw:frame><draw:frame draw:style-name="fr1" draw:name="Изображение12" text:anchor-type="char" svg:x="9.167cm" svg:y="0cm" svg:width="7.011cm" svg:height="3.175cm" draw:z-index="11"><draw:image xlink:href="Pictures/100000010000010900000078283F2F11.png" xlink:type="simple" xlink:show="embed" xlink:actuate="onLoad" draw:mime-type="image/png"/></draw:frame></text:p>
      <text:p text:style-name="P44">Начиная с версии 0.60 добавлен <text:span text:style-name="T4">File browser </text:span><text:span text:style-name="T61">частично дублирующ</text:span><text:span text:style-name="T62">ий</text:span><text:span text:style-name="T61"> функционал </text:span><text:span text:style-name="T63">File browser </text:span><text:span text:style-name="T61">из главного меню. </text:span><text:span text:style-name="T64">В этой версии доступна</text:span><text:span text:style-name="T65"> </text:span><text:span text:style-name="T66">р</text:span><text:span text:style-name="T67">абота с</text:span><text:span text:style-name="T65"> </text:span><text:span text:style-name="T68">TAP</text:span><text:span text:style-name="T66">, </text:span><text:span text:style-name="T68">SCL</text:span><text:span text:style-name="T66">, </text:span><text:span text:style-name="T68">FDI</text:span><text:span text:style-name="T66">, </text:span><text:span text:style-name="T68">TRD</text:span><text:span text:style-name="T66">. </text:span><text:span text:style-name="T67">Справа выводится окно </text:span><text:span text:style-name="T58">цветами подсветки файлов.</text:span></text:p>
      <text:p text:style-name="P45"/>
      <text:h text:style-name="P46" text:outline-level="2"><draw:frame draw:style-name="fr1" draw:name="Изображение13" text:anchor-type="char" svg:x="0.982cm" svg:y="0.259cm" svg:width="16.988cm" svg:height="10.612cm" draw:z-index="12"><draw:image xlink:href="Pictures/100000010000028200000191E00675BF.png" xlink:type="simple" xlink:show="embed" xlink:actuate="onLoad" draw:mime-type="image/png"/></draw:frame><text:soft-page-break/></text:h>
      <text:p text:style-name="P47">Файлы T<text:span text:style-name="T4">AP </text:span>всегда загружаются в память. Для файлов <text:span text:style-name="T4">SCL </text:span>и <text:span text:style-name="T4">FDI </text:span>выводится меню выбора действий: только загрузка в рамдиск или загрузка в рамдиск и переключение реального и виртуального дисковода на указанную букву. Для файлов <text:span text:style-name="T4">TRD </text:span>к предыдущем возможностям добавляется возможность монтирования.</text:p>
      <text:p text:style-name="P48"><draw:frame draw:style-name="fr1" draw:name="Изображение14" text:anchor-type="char" svg:x="5.115cm" svg:y="0.097cm" svg:width="3.625cm" svg:height="3.625cm" draw:z-index="13"><draw:image xlink:href="Pictures/1000000100000089000000894601DFDA.png" xlink:type="simple" xlink:show="embed" xlink:actuate="onLoad" draw:mime-type="image/png"/></draw:frame><draw:frame draw:style-name="fr1" draw:name="Изображение15" text:anchor-type="char" svg:x="10.724cm" svg:y="0cm" svg:width="3.757cm" svg:height="5.398cm" draw:z-index="14"><draw:image xlink:href="Pictures/100000010000008E000000CC7394CF41.png" xlink:type="simple" xlink:show="embed" xlink:actuate="onLoad" draw:mime-type="image/png"/></draw:frame>Если в главном меню <text:span text:style-name="T4">ERS </text:span>открыто окно <text:span text:style-name="T4">File browser </text:span>пункт в<text:span text:style-name="T4"> NMI </text:span>меню будет заблокирован, о чем будет выведена надпись внизу экрана при входе по <text:span text:style-name="T4">NMI.</text:span></text:p>
      <text:p text:style-name="P49"><draw:frame draw:style-name="fr8" draw:name="Изображение16" text:anchor-type="char" svg:width="6.376cm" svg:height="1.058cm" draw:z-index="15"><draw:image xlink:href="Pictures/10000001000000F10000002881851138.png" xlink:type="simple" xlink:show="embed" xlink:actuate="onLoad" draw:mime-type="image/png"/></draw:frame></text:p>
      <text:h text:style-name="P15" text:outline-level="2"><text:bookmark-start text:name="Режим ATM CPM"/><text:bookmark-start text:name="__RefHeading__7538_2044125182"/><text:span text:style-name="T3">Режим </text:span>ATM CP/M<text:bookmark-end text:name="Режим ATM CPM"/><text:bookmark-end text:name="__RefHeading__7538_2044125182"/></text:h>
      <text:p text:style-name="P24">Начиная с версии <text:span text:style-name="T4">0.</text:span>54 добавлен <text:span text:style-name="T4">CP/M </text:span>реализованный на компьютере <text:span text:style-name="T4">ATM Turbo 2+. </text:span>Разница в реализации только в доступе к винчестеру, доступ осуществляется через порты контроллера <text:span text:style-name="T4">Nemo. </text:span>Для тех кто захочет разметить/переразметить винчестер<text:span text:style-name="T4">: </text:span>программа <text:span text:style-name="T4">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4">FDISK </text:span>(для версии из стандартной дискеты <text:span text:style-name="T4">ATM Turbo 2+) </text:span>ввести нужные параметры в появившемся окне или воспользоваться модифицированным <text:span text:style-name="T4">FDISK </text:span>в составе стандартной загрузочной дискеты, которая считает необходимые <text:soft-page-break/>параметры.</text:p>
      <text:p text:style-name="P50"><text:span text:style-name="T31">В целях совместимости с </text:span><text:span text:style-name="T51">ERS-</text:span><text:span text:style-name="T31">рамдиском, начиная с версии </text:span><text:span text:style-name="T51">0.56e, </text:span><text:span text:style-name="T31">изменён формат рамдиска в </text:span><text:span text:style-name="T51">CP/M.</text:span><text:span text:style-name="T31"> Старый(</text:span><text:span text:style-name="T51">ATM</text:span><text:span text:style-name="T31">-рамдиск) формат не поддерживается. Образы с программами в форматах </text:span><text:span text:style-name="T51">TRD </text:span><text:span text:style-name="T31">и </text:span><text:span text:style-name="T51">FDI </text:span><text:span text:style-name="T31">можно загружать в рамдиск из </text:span><text:span text:style-name="T51">File browser. </text:span><text:span text:style-name="T31">При переходе в </text:span><text:span text:style-name="T51">ATM CP/M </text:span><text:span text:style-name="T31">файлы из загруженного образа будут доступны на диске </text:span><text:span text:style-name="T51">A:.</text:span><text:span text:style-name="T31"> При перезагрузке компьютера, </text:span><text:span text:style-name="T51">RAM-</text:span><text:span text:style-name="T31">диск не портится, поэтому его можно сохранить воспользовавшись утилитой </text:span><text:span text:style-name="T51">rdsav.$c</text:span><text:span text:style-name="T31"> (путь утилиты в репозитории pentevo/zx_soft/ram_disk_saver/</text:span><text:span text:style-name="T51">rdsav.$c</text:span><text:span text:style-name="T31">).</text:span></text:p>
      <text:h text:style-name="P15" text:outline-level="2"><text:bookmark-start text:name="Часы и CMOS"/><text:bookmark-start text:name="__RefHeading__7540_2044125182"/><text:span text:style-name="T3">Часы и </text:span>CMOS<text:bookmark-end text:name="Часы и CMOS"/><text:bookmark-end text:name="__RefHeading__7540_2044125182"/></text:h>
      <text:p text:style-name="P24">При работе сервис прошивки в правом верхнем углу экрана отображается время и дата считываемые из микросхемы часов подключенных по схеме <text:span text:style-name="T4">Gluk. </text:span>Помимо отображения времени и даты используются ячейки памяти <text:span text:style-name="T4">CMOS </text:span>содержащейся в часах для хранения некоторых настроек.</text:p>
      <text:p text:style-name="P24">Используемые ячейки <text:span text:style-name="T4">CMOS:</text:span></text:p>
      <text:p text:style-name="P25"/>
      <text:p text:style-name="P24">- 0<text:span text:style-name="T4">x00...</text:span></text:p>
      <text:p text:style-name="P24"><text:span text:style-name="T4">...0x0D<text:tab/></text:span>используются часами и не могут быть использованы для хранения параметров.</text:p>
      <text:p text:style-name="P24"><text:span text:style-name="T4">- 0x0E...<text:tab/>\ </text:span>доступно и используется для </text:p>
      <text:p text:style-name="P25">...0x3F<text:tab/>/ <text:span text:style-name="T3">хранения настроек </text:span>GLUK Reset Service</text:p>
      <text:p text:style-name="P25">- 0x40...<text:tab/>\ <text:span text:style-name="T3">64 байта</text:span></text:p>
      <text:p text:style-name="P25">...0x7F<text:tab/>/ <text:span text:style-name="T3">используется </text:span>ProfROM <text:span text:style-name="T3">для хранения настроек.</text:span></text:p>
      <text:p text:style-name="P25"><text:span text:style-name="T3">- </text:span>0x80...<text:tab/>\ <text:span text:style-name="T3">на данный момент</text:span></text:p>
      <text:p text:style-name="P51"><text:span text:style-name="T51">...0xE</text:span><text:span text:style-name="T69">8</text:span><text:span text:style-name="T51"><text:tab/>/ </text:span><text:span text:style-name="T32">свободны</text:span></text:p>
      <text:p text:style-name="P52"><text:span text:style-name="T31">- 0xE9<text:tab/></text:span><text:span text:style-name="T32">хранит следующие значения, биты:</text:span></text:p>
      <text:p text:style-name="P53"><text:tab/><text:tab/>7 - 1=включение порчи резидента для однократного запуска по сбросу</text:p>
      <text:p text:style-name="P53"><text:tab/><text:tab/>6 -</text:p>
      <text:p text:style-name="P53"><text:tab/><text:tab/>5 -</text:p>
      <text:p text:style-name="P53"><text:tab/><text:tab/>4 -</text:p>
      <text:p text:style-name="P53"><text:tab/><text:tab/>3 -</text:p>
      <text:p text:style-name="P53"><text:tab/><text:tab/>2 -</text:p>
      <text:p text:style-name="P53"><text:tab/><text:tab/>1 -</text:p>
      <text:p text:style-name="P53"><text:tab/><text:tab/>0 -</text:p>
      <text:p text:style-name="P54"><text:tab/><text:tab/>по умолчанию %<text:span text:style-name="T70">00000000</text:span></text:p>
      <text:p text:style-name="P55"><text:span text:style-name="T3">- </text:span>0xEA<text:tab/><text:span text:style-name="T71">7 - </text:span><text:span text:style-name="T72">\</text:span></text:p>
      <text:p text:style-name="P55"><text:span text:style-name="T72"><text:tab/><text:tab/>6 - <text:s/>\</text:span><text:span text:style-name="T71"> пауза до запуска скринсейвера в минутах (0...9 минут, 0 — отключен),</text:span></text:p>
      <text:p text:style-name="P55"><text:span text:style-name="T71"><text:tab/><text:tab/></text:span><text:span text:style-name="T72">5 - <text:s/>/</text:span><text:span text:style-name="T71"> по умолчанию 0.</text:span></text:p>
      <text:p text:style-name="P56"><text:tab/><text:tab/>4 - /</text:p>
      <text:p text:style-name="P55"><text:span text:style-name="T71"><text:tab/><text:tab/></text:span><text:span text:style-name="T72">3 - \</text:span></text:p>
      <text:p text:style-name="P55"><text:span text:style-name="T72"><text:tab/><text:tab/>2 - <text:s/>\</text:span><text:span text:style-name="T71"> </text:span><text:span text:style-name="T3">пауза определения наличия </text:span>HDD <text:span text:style-name="T3">после включения питания в секундах</text:span></text:p>
      <text:p text:style-name="P55"><text:span text:style-name="T3"><text:tab/><text:tab/></text:span><text:span text:style-name="T72">1 - <text:s/>/</text:span><text:span text:style-name="T3"> (</text:span>0<text:span text:style-name="T3">..</text:span>9 <text:span text:style-name="T3">секунд, 0 - пауза выключена), по умолчанию </text:span>0.</text:p>
      <text:p text:style-name="P55"><text:tab/><text:tab/><text:span text:style-name="T72">0 - /</text:span></text:p>
      <text:p text:style-name="P57"><text:tab/><text:tab/>по умолчанию %<text:span text:style-name="T70">00000000</text:span></text:p>
      <text:p text:style-name="P25">- 0xEB<text:tab/><text:span text:style-name="T3">хранит следующие значения, биты:</text:span></text:p>
      <text:p text:style-name="P25"><text:span text:style-name="T3"><text:tab/><text:tab/></text:span>7 - \</text:p>
      <text:p text:style-name="P25"><text:tab/><text:tab/>6 - <text:s/>\</text:p>
      <text:p text:style-name="P25"><text:tab/><text:tab/>5 - <text:s/>/</text:p>
      <text:p text:style-name="P25"><text:tab/><text:tab/>4 - /</text:p>
      <text:p text:style-name="P25"><text:tab/><text:tab/>3 - \ <text:span text:style-name="T3">номер реального</text:span></text:p>
      <text:p text:style-name="P25"><text:tab/><text:tab/>2 - / <text:span text:style-name="T3">дисковода</text:span></text:p>
      <text:p text:style-name="P25"><text:tab/><text:tab/>1 - \ <text:span text:style-name="T3">номер виртуального</text:span></text:p>
      <text:p text:style-name="P25"><text:tab/><text:tab/>0 - / <text:span text:style-name="T3">дисковода</text:span></text:p>
      <text:p text:style-name="P24"><text:tab/><text:tab/>по умолчанию %00000000</text:p>
      <text:p text:style-name="P25">- 0xEC<text:tab/><text:span text:style-name="T3">хранит следующие значения, биты:</text:span></text:p>
      <text:p text:style-name="P25"><text:span text:style-name="T3"><text:tab/><text:tab/></text:span>7 <text:span text:style-name="T3">- 1=</text:span>TURBO OFF <text:span text:style-name="T3">(3,5МГц)</text:span>, 0=TURBO ON <text:span text:style-name="T3">(7МГц)</text:span></text:p>
      <text:p text:style-name="P25"><text:tab/><text:tab/>6 <text:span text:style-name="T3">-</text:span> <text:span text:style-name="T3">1=доступ к </text:span>SD NeoGS <text:span text:style-name="T3">есть</text:span>, 0=<text:span text:style-name="T3">нет</text:span></text:p>
      <text:p text:style-name="P25"><text:soft-page-break/><text:tab/><text:tab/>5 - 1=<text:span text:style-name="T3">поиск файла </text:span>IMAGE.MNT <text:span text:style-name="T3">и монтирование образов если найден</text:span>, 0=<text:span text:style-name="T3">не искать</text:span></text:p>
      <text:p text:style-name="P25"><text:tab/><text:tab/>4 <text:span text:style-name="T3">- </text:span>1=<text:span text:style-name="T3">не отображать, 0=отображать время/дату</text:span></text:p>
      <text:p text:style-name="P25"><text:tab/><text:tab/>3 - 1=<text:span text:style-name="T3">при нажатии клавиш озвучивания не будет, 0=будет</text:span> </text:p>
      <text:p text:style-name="P25"><text:tab/><text:tab/>2 - 1=<text:span text:style-name="T3">включена проверка наличия резидента, 0=не проверяется</text:span></text:p>
      <text:p text:style-name="P25"><text:tab/><text:tab/>1 - \ <text:span text:style-name="T3">2=128Кб, 1=48Кб,</text:span></text:p>
      <text:p text:style-name="P25"><text:tab/><text:tab/>0 - / <text:span text:style-name="T3">0=1Мб по стандарту Пентагона</text:span></text:p>
      <text:p text:style-name="P25"><text:span text:style-name="T3"><text:tab/><text:tab/>по умолчанию %</text:span><text:span text:style-name="T73">1</text:span>0000010</text:p>
      <text:p text:style-name="P24">- <text:span text:style-name="T4">0xED<text:tab/></text:span>хранит следующие значения, биты:</text:p>
      <text:p text:style-name="P24"><text:tab/><text:tab/>7 - 1=<text:span text:style-name="T4">TURBO</text:span> 14МГц, 0=<text:span text:style-name="T4">TURBO</text:span> 3,5/7МГц, зависит от состояния бита 7 в ячейке <text:span text:style-name="T4">0xEC</text:span></text:p>
      <text:p text:style-name="P24"><text:tab/><text:tab/>6 <text:span text:style-name="T4">-</text:span> <text:span text:style-name="T4">1=</text:span>эмуляция загрузки с кассеты, 0=загрузка с магнитофонного входа</text:p>
      <text:p text:style-name="P24"><text:tab/><text:tab/><text:span text:style-name="T4">5 </text:span>-<text:span text:style-name="T4"> 1=</text:span>принтер через <text:span text:style-name="T4">AY, </text:span>0=стандартный принтер <text:span text:style-name="T4">Basic 48</text:span></text:p>
      <text:p text:style-name="P25"><text:tab/><text:tab/>4 <text:span text:style-name="T3">-</text:span> 1=<text:span text:style-name="T3">не загружать шрифт из ПЗУ по сбросу, 0=загружать</text:span></text:p>
      <text:p text:style-name="P25"><text:span text:style-name="T3"><text:tab/><text:tab/>3 - 1=загружать из ПЗУ шрифт </text:span>CP866, 0=<text:span text:style-name="T3">загружать из ПЗУ шрифт АТМ</text:span></text:p>
      <text:p text:style-name="P24"><text:tab/><text:tab/>2 - <text:span text:style-name="T4">1=</text:span>автозапуск <text:span text:style-name="T4">TAP </text:span>файла включен, 0=выключен</text:p>
      <text:p text:style-name="P24"><text:tab/><text:tab/>1 <text:span text:style-name="T4">- \ </text:span>номер сброса: 0 <text:span text:style-name="T4">- Evo Service, 1-GLUK Service</text:span></text:p>
      <text:p text:style-name="P24"><text:tab/><text:tab/>0 <text:span text:style-name="T4">- / 2 - ProfROM, 3 - Custom ROM</text:span></text:p>
      <text:p text:style-name="P24"><text:span text:style-name="T4"><text:tab/><text:tab/></text:span>по умолчанию %<text:span text:style-name="T4">00000100</text:span></text:p>
      <text:p text:style-name="P58"><text:span text:style-name="T51">- 0xEE...<text:tab/> \ </text:span><text:span text:style-name="T32">содержит </text:span><text:span text:style-name="T51">CRC16 </text:span><text:span text:style-name="T32">для ячеек </text:span><text:span text:style-name="T51">0xE</text:span><text:span text:style-name="T74">9</text:span><text:span text:style-name="T51">...0xED. </text:span><text:span text:style-name="T32">При несовпадении </text:span><text:span text:style-name="T51">CRC16 </text:span><text:span text:style-name="T32">записанной в этих</text:span></text:p>
      <text:p text:style-name="P25">...0xEF<text:tab/> /<text:span text:style-name="T3"> ячейках</text:span> <text:span text:style-name="T3">и рассчитанной производится принудительный сброс до исходных значений.</text:span></text:p>
      <text:h text:style-name="P15" text:outline-level="2"><text:bookmark-start text:name="Формат RAM диска"/><text:bookmark-start text:name="__RefHeading__7542_2044125182"/>Формат <text:span text:style-name="T4">RAM </text:span>диска<text:bookmark-end text:name="Формат RAM диска"/><text:bookmark-end text:name="__RefHeading__7542_2044125182"/></text:h>
      <text:p text:style-name="P24">Формат <text:span text:style-name="T4">RAM </text:span>диска похож на формат <text:span text:style-name="T4">TRD </text:span>образа, то есть представляет собой последовательность секторов расположенный в верхней памяти. <text:span text:style-name="T4">RAM </text:span>диск начинается с <text:span text:style-name="T4">10</text:span>-й страницы от конца памяти (номер страницы начала <text:span text:style-name="T4">RAM </text:span>диска может быть изменен в любой из последующих версий) и растет вниз. </text:p>
      <text:p text:style-name="P24">Для универсальной поддержки <text:span text:style-name="T4">SCL, TRD </text:span>и <text:span text:style-name="T4">FDI </text:span>образов самая первая страница от начала <text:span text:style-name="T4">RAM </text:span>диска (полностью 16Кб страница) содержит описатель нахождения секторов/дорожек в страницах памяти. Определить страницу начала <text:span text:style-name="T4">RAM </text:span>диска можно по байтам «<text:span text:style-name="T4">RD</text:span>» расположенным в первой странице от начала <text:span text:style-name="T4">RAM </text:span>диска по смещениям <text:span text:style-name="T4">#3FFF (</text:span>байт <text:span text:style-name="T4">«R») </text:span>и <text:span text:style-name="T4">#3EFF (</text:span>байт <text:span text:style-name="T4">«D»), </text:span>по этим байтам определяется отформатирован ли <text:span text:style-name="T4">RAM </text:span>диск. При отсутствии этих байт производится принудительно форматирование <text:span text:style-name="T4">RAM </text:span>диска на размер стандартной <text:span text:style-name="T4">TR-DOS </text:span>дискеты, то есть на 2544 сектора. </text:p>
      <text:p text:style-name="P24">Заголовок <text:span text:style-name="T4">FDI </text:span>образа преобразовывается при загрузке в память, заголовок для образов <text:span text:style-name="T4">SCL </text:span>и <text:span text:style-name="T4">TRD </text:span>создается принудительно после загрузки. При форматировании заголовки также создаются принудительно.</text:p>
      <text:p text:style-name="P24"/>
      <text:p text:style-name="P24"/>
      <text:p text:style-name="P59">Формат описателей секторов/дорожек <text:span text:style-name="T4">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60">Смещение в байтах от начала страницы</text:p>
          </table:table-cell>
          <table:table-cell table:style-name="Таблица1.B1" office:value-type="string">
            <text:p text:style-name="P61">Описание</text:p>
          </table:table-cell>
        </table:table-row>
        <table:table-row>
          <table:table-cell table:style-name="Таблица1.A2" office:value-type="string">
            <text:p text:style-name="P62">+<text:span text:style-name="T75">0x</text:span>000</text:p>
          </table:table-cell>
          <table:table-cell table:style-name="Таблица1.B2" office:value-type="string">
            <text:p text:style-name="P63">смещение в блоках (по 256 байт) дорожки от начала страницы</text:p>
          </table:table-cell>
        </table:table-row>
        <table:table-row>
          <table:table-cell table:style-name="Таблица1.A2" office:value-type="string">
            <text:p text:style-name="P64">+<text:span text:style-name="T75">0x</text:span><text:span text:style-name="T4">100</text:span></text:p>
          </table:table-cell>
          <table:table-cell table:style-name="Таблица1.B2" office:value-type="string">
            <text:p text:style-name="P63">смещение в страницах (по 16Кб) дорожки от начала <text:span text:style-name="T4">RAM </text:span>диска +1. То есть если <text:span text:style-name="T4">RAM </text:span>диска начинается с 3-ей страницы, то счет идет со страницы 4</text:p>
          </table:table-cell>
        </table:table-row>
        <table:table-row>
          <table:table-cell table:style-name="Таблица1.A2" office:value-type="string">
            <text:p text:style-name="P65">+<text:span text:style-name="T76">0x</text:span>200</text:p>
          </table:table-cell>
          <table:table-cell table:style-name="Таблица1.B2" office:value-type="string">
            <text:p text:style-name="P63">номер сектора на дорожке</text:p>
          </table:table-cell>
        </table:table-row>
        <table:table-row>
          <table:table-cell table:style-name="Таблица1.A2" office:value-type="string">
            <text:p text:style-name="P65">+<text:span text:style-name="T76">0x</text:span>300</text:p>
          </table:table-cell>
          <table:table-cell table:style-name="Таблица1.B2" office:value-type="string">
            <text:p text:style-name="P63">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2" office:value-type="string">
            <text:p text:style-name="P65">+<text:span text:style-name="T76">0x</text:span>400</text:p>
          </table:table-cell>
          <table:table-cell table:style-name="Таблица1.B2" office:value-type="string">
            <text:p text:style-name="P63">номер сектора на дорожке</text:p>
          </table:table-cell>
        </table:table-row>
        <table:table-row>
          <table:table-cell table:style-name="Таблица1.A2" office:value-type="string">
            <text:p text:style-name="P65">+<text:span text:style-name="T76">0x</text:span>500</text:p>
          </table:table-cell>
          <table:table-cell table:style-name="Таблица1.B2" office:value-type="string">
            <text:p text:style-name="P63">размер сектора *2</text:p>
          </table:table-cell>
        </table:table-row>
        <table:table-row>
          <table:table-cell table:style-name="Таблица1.A2" office:value-type="string">
            <text:p text:style-name="P65"/>
          </table:table-cell>
          <table:table-cell table:style-name="Таблица1.B2" office:value-type="string">
            <text:p text:style-name="P63">и так далее пока не закончатся все сектора дорожки.</text:p>
          </table:table-cell>
        </table:table-row>
        <table:table-row>
          <table:table-cell table:style-name="Таблица1.A2" office:value-type="string">
            <text:p text:style-name="P66">+<text:span text:style-name="T76">0x</text:span>001</text:p>
          </table:table-cell>
          <table:table-cell table:style-name="Таблица1.B2" office:value-type="string">
            <text:p text:style-name="P67">Начало описателей следующей дорожки</text:p>
          </table:table-cell>
        </table:table-row>
      </table:table>
      <text:p text:style-name="P24"/>
      <text:p text:style-name="P68"/>
      <text:h text:style-name="P9" text:outline-level="1"><text:bookmark-start text:name="__RefHeading__7553_2044125182"/><text:bookmark-start text:name="Описание EVO-DOS"/>Описание <text:span text:style-name="T35">EVO</text:span><text:span text:style-name="T4">-DOS</text:span><text:bookmark-end text:name="Описание EVO-DOS"/><text:span text:style-name="T3"> </text:span><text:span text:style-name="T19">и</text:span><text:span text:style-name="T77"> NEO-DOS</text:span><text:span text:style-name="T4"> v</text:span>0.<text:span text:style-name="T78">60</text:span><text:bookmark-end text:name="__RefHeading__7553_2044125182"/></text:h>
      <text:p text:style-name="P69"><draw:frame draw:style-name="fr6" draw:name="Изображение8" text:anchor-type="char" svg:x="0.344cm" svg:y="0.041cm" svg:width="8.528cm" style:rel-width="45%" svg:height="6.384cm" style:rel-height="24%" draw:z-index="7"><draw:image xlink:href="Pictures/10000001000001F30000017D28346751.png" xlink:type="simple" xlink:show="embed" xlink:actuate="onLoad" draw:mime-type="image/png"/></draw:frame><draw:frame draw:style-name="fr6" draw:name="Изображение9" text:anchor-type="char" svg:x="9.343cm" svg:y="0.06cm" svg:width="8.528cm" style:rel-width="45%" svg:height="6.384cm" style:rel-height="24%" draw:z-index="8"><draw:image xlink:href="Pictures/10000001000001F500000182135C0BA6.png" xlink:type="simple" xlink:show="embed" xlink:actuate="onLoad" draw:mime-type="image/png"/></draw:frame></text:p>
      <text:p text:style-name="P70">В связи с тем что основой <text:span text:style-name="T79">EVO</text:span><text:span text:style-name="T4">-DOS </text:span>послужила прошивка <text:span text:style-name="T4">TR-DOS 5.03 </text:span>полное описание можно прочитать именно на этот <text:span text:style-name="T4">TR-DOS. </text:span>Здесь будет описано отличия и дополнительные возможности. </text:p>
      <text:h text:style-name="P71" text:outline-level="2"><text:bookmark-start text:name="__RefHeading___Toc9458_761554655"/>Различия версий <text:span text:style-name="T80">DOS</text:span><text:bookmark-end text:name="__RefHeading___Toc9458_761554655"/></text:h>
      <text:p text:style-name="P72"><text:span text:style-name="T4">EVO-DOS </text:span><text:span text:style-name="T3">использует 2 пропатченных прошивки</text:span><text:span text:style-name="T4"> ROM </text:span><text:span text:style-name="T3">и страницу ОЗУ для работы.</text:span></text:p>
      <text:p text:style-name="P73"><text:span text:style-name="T4">NEO-DOS</text:span><text:span text:style-name="T3"> использует одну страницу</text:span><text:span text:style-name="T4"> ROM (</text:span><text:span text:style-name="T3">возможна замена на любую или почти любую версию</text:span><text:span text:style-name="T4"> TR-DOS</text:span><text:span text:style-name="T3"> без нарушения работы эмуляции</text:span><text:span text:style-name="T81">) для</text:span><text:span text:style-name="T3"> работы с диском, </text:span><text:span text:style-name="T81">образом или рамдиском</text:span><text:span text:style-name="T3">. </text:span><text:span text:style-name="T81">Основное отличие от обычных версий </text:span><text:span text:style-name="T80">TR-DOS </text:span><text:span text:style-name="T81">исправления ошибок, поддержка резидента </text:span><text:span text:style-name="T80">(Honey Commander), </text:span><text:span text:style-name="T82">расширенные команды для работы с </text:span><text:span text:style-name="T83">FAT </text:span><text:span text:style-name="T82">(монтирование/демонтирование образов и прочее</text:span><text:span text:style-name="T84">)</text:span><text:span text:style-name="T80">. </text:span><text:span text:style-name="T81">Код эмуляции работает только в ОЗУ (страница 0</text:span><text:span text:style-name="T80">xFE </text:span><text:span text:style-name="T81">откуда и взята приставка в названии прошивки </text:span><text:span text:style-name="T80">zxevo_fe.rom </text:span><text:span text:style-name="T85">и в названии</text:span><text:span text:style-name="T86"> </text:span><text:span text:style-name="T85">показываемой при старте компьютера</text:span><text:span text:style-name="T80">)</text:span><text:span text:style-name="T81"> и связано с</text:span><text:span text:style-name="T80"> ROM</text:span><text:span text:style-name="T81"> доса только адресами перехвата обращений к портам контроллера дисковода.</text:span></text:p>
      <text:h text:style-name="P15" text:outline-level="2"><text:bookmark-start text:name="__RefHeading__7557_2044125182"/><text:span text:style-name="T3">Добавленные</text:span><text:span text:style-name="T32"> </text:span><text:span text:style-name="T3">возможности</text:span><text:bookmark-end text:name="__RefHeading__7557_2044125182"/></text:h>
      <text:p text:style-name="P74"><text:span text:style-name="T32">Добавлено несколько новых команд, ввод новых команд посимвольный. Команды начинаются с ввода символа «.» чтобы изменить вид курсора «</text:span><text:span text:style-name="T31">K</text:span><text:span text:style-name="T32">» на </text:span><text:span text:style-name="T31">«L» </text:span><text:span text:style-name="T32">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31">TR-DOS.</text:span><text:span text:style-name="T32"> В скобках </text:span><text:span text:style-name="T31">[ ] </text:span><text:span text:style-name="T32">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75">Полный список доступных команд:</text:p>
      <text:p text:style-name="P75"/>
      <text:p text:style-name="P76">.CD</text:p>
      <text:p text:style-name="P76">.CLRCMOS</text:p>
      <text:p text:style-name="P76">.DIR</text:p>
      <text:p text:style-name="P76">.DRIVE</text:p>
      <text:p text:style-name="P76">.HELP</text:p>
      <text:p text:style-name="P76">.MOUNT</text:p>
      <text:p text:style-name="P76">.UMOUNT</text:p>
      <text:p text:style-name="P76">.VER</text:p>
      <text:p text:style-name="P76">.VIRT</text:p>
      <text:p text:style-name="P77">.<text:span text:style-name="T4">TURBO</text:span></text:p>
      <text:p text:style-name="P75"/>
      <text:p text:style-name="P78">Команда <text:span text:style-name="T30">.</text:span><text:span text:style-name="T33">TURBO</text:span><text:span text:style-name="T4"> </text:span>без параметров выводит на экран текущую частоту процессора, с параметрами 0, <text:soft-page-break/>1 или 2 устанавливает соответствующую частоту 3.5, 7.0 или 14.0 Мгц. Установка частоты не сохраняется в <text:span text:style-name="T4">CMOS.</text:span></text:p>
      <text:p text:style-name="P78"><text:span text:style-name="T4"/></text:p>
      <text:p text:style-name="P74"><text:span text:style-name="T32">Команда </text:span><text:span text:style-name="T3">.</text:span>VER<text:span text:style-name="T31"> </text:span><text:span text:style-name="T32">выводит на экран название </text:span><text:span text:style-name="T31">DOS, </text:span><text:span text:style-name="T32">версию и дату сборки. Данные для вывода берется из последних 8 байт ПЗУ самого </text:span><text:span text:style-name="T31">DOS.</text:span></text:p>
      <text:p text:style-name="P75"/>
      <text:p text:style-name="P79"><text:span text:style-name="T31">Команда </text:span>.<text:span text:style-name="T4">VIRT</text:span><text:span text:style-name="T51"> </text:span><text:span text:style-name="T4">[.X:]</text:span><text:span text:style-name="T51"> </text:span><text:span text:style-name="T31">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51">CMOS. </text:span><text:span text:style-name="T31">Формат команды </text:span>.<text:span text:style-name="T4">VIRT X:</text:span><text:span text:style-name="T51"> </text:span><text:span text:style-name="T31">здесь </text:span><text:span text:style-name="T4">X</text:span><text:span text:style-name="T51"> </text:span><text:span text:style-name="T31">любая буква дисковода </text:span><text:span text:style-name="T51">A,B,C,D. </text:span><text:span text:style-name="T31">Наличие «:» после буквы диска обязательно.</text:span></text:p>
      <text:p text:style-name="P79"><text:span text:style-name="T31">Кроме возможности стандартного </text:span><text:span text:style-name="T51">TR-DOS </text:span><text:span text:style-name="T31">для смены диска командой </text:span>*<text:span text:style-name="T4">”X:”</text:span><text:span text:style-name="T51"> </text:span><text:span text:style-name="T31">где </text:span><text:span text:style-name="T4">X</text:span><text:span text:style-name="T51">-</text:span><text:span text:style-name="T31">любая буква </text:span><text:span text:style-name="T51">A...D </text:span><text:span text:style-name="T31">можно поменять дисковод командой </text:span>.<text:span text:style-name="T4">X:</text:span><text:span text:style-name="T51"> </text:span><text:span text:style-name="T31">подставив вместо </text:span><text:span text:style-name="T4">X</text:span><text:span text:style-name="T51"> </text:span><text:span text:style-name="T31">любую букву </text:span><text:span text:style-name="T51">A...D </text:span><text:span text:style-name="T31">для смены дисковода</text:span><text:span text:style-name="T51">, </text:span><text:span text:style-name="T31">а буквой </text:span><text:span text:style-name="T51">E </text:span><text:span text:style-name="T31">и далее сменить текущий раздел </text:span><text:span text:style-name="T51">FAT </text:span><text:span text:style-name="T31">устройства. Наличие символа «:» обязательно. Максимальную букву найденного раздела можно узнать командой .</text:span><text:span text:style-name="T4">DRIVE</text:span><text:span text:style-name="T51">, </text:span><text:span text:style-name="T31">при попытке переключиться на не найденный раздел будет выдана ошибка.</text:span></text:p>
      <text:p text:style-name="P75"/>
      <text:p text:style-name="P79"><text:span text:style-name="T31">Команда </text:span>.<text:span text:style-name="T4">DRIVE</text:span><text:span text:style-name="T51"> </text:span><text:span text:style-name="T31">показывает найденные разделы на </text:span><text:span text:style-name="T51">HDD </text:span><text:span text:style-name="T31">и </text:span><text:span text:style-name="T51">SD </text:span><text:span text:style-name="T31">картах. Первая присвоенная буква найденного раздела всегда </text:span><text:span text:style-name="T4">E</text:span><text:span text:style-name="T51">, </text:span><text:span text:style-name="T31">последняя зависит от количества найденных разделов. Отображается в виде </text:span><text:span text:style-name="T51">«</text:span><text:span text:style-name="T4">Drives: E-Z</text:span><text:span text:style-name="T51">».</text:span></text:p>
      <text:p text:style-name="P75"/>
      <text:p text:style-name="P79"><text:span text:style-name="T31">Команда </text:span>.<text:span text:style-name="T4">DIR</text:span><text:span text:style-name="T51"> </text:span><text:span text:style-name="T4">[/L]</text:span><text:span text:style-name="T51"> </text:span><text:span text:style-name="T31">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4">L </text:span></text:p>
      <text:p text:style-name="P75"/>
      <text:p text:style-name="P75">Команда <text:span text:style-name="T30">.</text:span><text:span text:style-name="T33">CD </text:span><text:span text:style-name="T4"><text:s/></text:span>позволяет входит в директории или выходить в предыдущую. За одну команду можно перейти только на один уровень. Пример:</text:p>
      <text:p text:style-name="P75"/>
      <text:p text:style-name="P75"><text:span text:style-name="T30">.</text:span><text:span text:style-name="T33">CD dirname</text:span><text:span text:style-name="T4"> – </text:span>войти в директорию <text:span text:style-name="T4">dirname</text:span></text:p>
      <text:p text:style-name="P75"><text:span text:style-name="T33">.CD ..</text:span><text:span text:style-name="T4"> - </text:span>перейти в предыдущую директорию </text:p>
      <text:p text:style-name="P75"/>
      <text:p text:style-name="P75">Команда <text:span text:style-name="T30">.</text:span><text:span text:style-name="T33">MOUNT</text:span><text:span text:style-name="T4"> </text:span>позволяет смонтировать <text:span text:style-name="T4">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75"/>
      <text:p text:style-name="P79">.<text:span text:style-name="T4">MOUNT FILENAME.TRD B:</text:span></text:p>
      <text:p text:style-name="P80"/>
      <text:p text:style-name="P75">Расширение должно быть указанно обязательно, как и : после буквы монтируемого дисковода. </text:p>
      <text:p text:style-name="P75"/>
      <text:p text:style-name="P75">Команда <text:span text:style-name="T33">.UMOUNT</text:span><text:span text:style-name="T4"> </text:span>производит отключение образа от буквы дисковода. Параметр для команды только буква дисковода, символ : обязателен.</text:p>
      <text:p text:style-name="P75"/>
      <text:p text:style-name="P75">Команда <text:span text:style-name="T30">.</text:span><text:span text:style-name="T33">HELP</text:span><text:span text:style-name="T4"> <text:s/>предназначена</text:span> для вывода на экран списка доступных команд в данной версии.</text:p>
      <text:p text:style-name="P75"/>
      <text:p text:style-name="P75">Команда <text:span text:style-name="T30">.</text:span><text:span text:style-name="T33">CLRCMOS</text:span><text:span text:style-name="T4"> </text:span>производит сброс ячеек содержащих необходимые настройки в состояние по умолчанию.</text:p>
      <text:h text:style-name="P81" text:outline-level="1"/>
      <text:h text:style-name="P9" text:outline-level="1"><text:bookmark-start text:name="Внешняя утилита обновления FlashROM"/><text:bookmark-start text:name="__RefHeading__7559_2044125182"/>Внешняя утилита обновления <text:span text:style-name="T4">FlashROM</text:span><text:bookmark-end text:name="Внешняя утилита обновления FlashROM"/><text:bookmark-end text:name="__RefHeading__7559_2044125182"/></text:h>
      <text:p text:style-name="P82"><text:span text:style-name="T32">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51">(</text:span><text:span text:style-name="T32">для </text:span><text:span text:style-name="T51">hobeta </text:span><text:span text:style-name="T32">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51">PentEvo.</text:span></text:p>
      <text:p text:style-name="P82"><text:span text:style-name="T32">Имя файла прошивки всегда должно быть </text:span><text:span text:style-name="T51">ZXEVO.ROM, </text:span><text:span text:style-name="T32">размер файла 512Кб (524288 байт),</text:span><text:span text:style-name="T51"> </text:span><text:span text:style-name="T32">место нахождение должно быть всегда в корне </text:span><text:span text:style-name="T51">SD </text:span><text:span text:style-name="T32">карты. </text:span></text:p>
      <text:h text:style-name="P9" text:outline-level="1"><text:bookmark-start text:name="Вызовы RST 8"/><text:bookmark-start text:name="__RefHeading__7580_2044125182"/>Вызовы <text:span text:style-name="T4">RST 8</text:span><text:bookmark-end text:name="Вызовы RST 8"/><text:bookmark-end text:name="__RefHeading__7580_2044125182"/></text:h>
      <text:p text:style-name="P83">Вызовы всех функций осуществляется командой <text:span text:style-name="T4">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4">define.a80</text:span></text:p>
      <text:h text:style-name="P15"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83">Все вызываемые функции начинаются с кода <text:span text:style-name="T4">0x40.</text:span></text:p>
      <text:p text:style-name="P84"/>
      <text:h text:style-name="Heading_20_6" text:outline-level="6"><text:bookmark-start text:name="__RefHeading__6866_904266311"/>Инициализация принтера подключаемого через порты <text:span text:style-name="T4">AY. </text:span><text:bookmark-end text:name="__RefHeading__6866_904266311"/></text:h>
      <text:p text:style-name="Standard">Для вызова из Бейсик 48.</text:p>
      <text:p text:style-name="P84"/>
      <text:p text:style-name="P85"><text:tab/><text:tab/>RST 8</text:p>
      <text:p text:style-name="P85"><text:tab/><text:tab/>DB _AY_PRN_INIT <text:span text:style-name="T3">(0</text:span>x40)</text:p>
      <text:p text:style-name="P84"/>
      <text:p text:style-name="P83">Регистры:</text:p>
      <text:p text:style-name="P83">на входе:<text:tab/><text:tab/>нет</text:p>
      <text:p text:style-name="P83">на выходе:<text:tab/>нет</text:p>
      <text:p text:style-name="P84"/>
      <text:h text:style-name="Heading_20_6" text:outline-level="6"><text:bookmark-start text:name="__RefHeading__6868_904266311"/>Печать символа на <text:span text:style-name="T4">AY </text:span>принтере.<text:span text:style-name="T4"> </text:span><text:bookmark-end text:name="__RefHeading__6868_904266311"/></text:h>
      <text:p text:style-name="Standard">Для вызова из Бейсик 48.</text:p>
      <text:p text:style-name="P83"/>
      <text:p text:style-name="P86"><text:tab/><text:tab/><text:span text:style-name="T4">RST 8</text:span></text:p>
      <text:p text:style-name="P85"><text:tab/><text:tab/>DB _AY_PRN_A_ (0x41)</text:p>
      <text:p text:style-name="P84"/>
      <text:p text:style-name="P83">Регистры:</text:p>
      <text:p text:style-name="P83">на входе:<text:tab/><text:tab/><text:span text:style-name="T33">A</text:span><text:span text:style-name="T4">=</text:span>код символа из диапазона <text:span text:style-name="T4">0x20...0x7F</text:span></text:p>
      <text:p text:style-name="P83">на выходе:<text:tab/><text:span text:style-name="T33">AF</text:span><text:span text:style-name="T4">=</text:span>выставляется после кода <text:span text:style-name="T4">LD A,B:CP 3:SBC A,A (</text:span>при выключенной драйвере <text:span text:style-name="T4">AY </text:span>принтера)</text:p>
      <text:p text:style-name="P83"><text:tab/><text:tab/><text:tab/>нет (при включенной драйвере <text:span text:style-name="T4">AY </text:span>принтера)</text:p>
      <text:p text:style-name="P83"/>
      <text:h text:style-name="Heading_20_6" text:outline-level="6"><text:bookmark-start text:name="__RefHeading__6870_904266311"/>Печать токена Бейсика на <text:span text:style-name="T4">AY </text:span>принтере.<text:span text:style-name="T4"> </text:span><text:bookmark-end text:name="__RefHeading__6870_904266311"/></text:h>
      <text:p text:style-name="Standard">Для вызова из Бейсик 48.</text:p>
      <text:p text:style-name="P83"/>
      <text:p text:style-name="P86"><text:tab/><text:tab/><text:span text:style-name="T4">RST 8</text:span></text:p>
      <text:p text:style-name="P85"><text:tab/><text:tab/>DB _AY_PRN_TOKEN (0x42)</text:p>
      <text:p text:style-name="P84"/>
      <text:p text:style-name="P83">Регистры:</text:p>
      <text:p text:style-name="P83">на входе:<text:tab/><text:tab/><text:span text:style-name="T33">A</text:span><text:span text:style-name="T4">=</text:span>код токена Бейсика</text:p>
      <text:p text:style-name="P83">на выходе:<text:tab/>нет</text:p>
      <text:p text:style-name="P83"/>
      <text:h text:style-name="Heading_20_6" text:outline-level="6"><text:bookmark-start text:name="__RefHeading__6872_904266311"/>Печать экранной области на <text:span text:style-name="T4">AY </text:span>принтере.<text:span text:style-name="T4"> </text:span><text:bookmark-end text:name="__RefHeading__6872_904266311"/></text:h>
      <text:p text:style-name="Standard">Для вызова из Бейсик 48.</text:p>
      <text:p text:style-name="P83"/>
      <text:p text:style-name="P86"><text:tab/><text:tab/><text:span text:style-name="T4">RST 8</text:span></text:p>
      <text:p text:style-name="P85"><text:tab/><text:tab/>DB _AY_PRN_SCR (0x43)</text:p>
      <text:p text:style-name="P84"/>
      <text:p text:style-name="P83">Регистры:</text:p>
      <text:p text:style-name="P83">на входе:<text:tab/><text:tab/>нет</text:p>
      <text:p text:style-name="P83">на выходе:<text:tab/><text:span text:style-name="T33">B</text:span><text:span text:style-name="T4">=0xB0 </text:span>(при выключенной эмуляции)</text:p>
      <text:p text:style-name="P83"><text:soft-page-break/><text:span text:style-name="T4"><text:tab/><text:tab/><text:tab/></text:span>нет (при включенной эмуляции)</text:p>
      <text:p text:style-name="P83"/>
      <text:h text:style-name="Heading_20_6" text:outline-level="6"><text:bookmark-start text:name="__RefHeading__6874_904266311"/>Инициализация эмуляции работы с лентой.<text:span text:style-name="T4"> </text:span><text:bookmark-end text:name="__RefHeading__6874_904266311"/></text:h>
      <text:p text:style-name="Standard">Для вызова из Бейсик 48.</text:p>
      <text:p text:style-name="P83"/>
      <text:p text:style-name="P86"><text:tab/><text:tab/><text:span text:style-name="T4">RST 8</text:span></text:p>
      <text:p text:style-name="P85"><text:tab/><text:tab/>DB _TAPE_INIT (0x44)</text:p>
      <text:p text:style-name="P84"/>
      <text:p text:style-name="P83">Регистры:</text:p>
      <text:p text:style-name="P83">на входе:<text:tab/><text:tab/>нет</text:p>
      <text:p text:style-name="P83">на выходе:<text:tab/>нет</text:p>
      <text:p text:style-name="P83"/>
      <text:h text:style-name="Heading_20_6" text:outline-level="6"><text:bookmark-start text:name="__RefHeading__6876_904266311"/>Вызов эмуляции работы с лентой.<text:span text:style-name="T4"> </text:span><text:bookmark-end text:name="__RefHeading__6876_904266311"/></text:h>
      <text:p text:style-name="Standard">Для вызова из Бейсик 48.</text:p>
      <text:p text:style-name="P83"/>
      <text:p text:style-name="P86"><text:tab/><text:tab/><text:span text:style-name="T4">RST 8</text:span></text:p>
      <text:p text:style-name="P85"><text:tab/><text:tab/>DB _TAPE_EMUL (0x45)</text:p>
      <text:p text:style-name="P84"/>
      <text:p text:style-name="P83">Регистры:</text:p>
      <text:p text:style-name="P83">на входе:<text:tab/><text:tab/><text:span text:style-name="T33">IX</text:span><text:span text:style-name="T4">-</text:span>адрес загрузки</text:p>
      <text:p text:style-name="P83"><text:span text:style-name="T4"><text:tab/><text:tab/><text:tab/></text:span><text:span text:style-name="T33">DE</text:span>-длина в байтах</text:p>
      <text:p text:style-name="P83">на выходе:<text:tab/><text:span text:style-name="T33">C</text:span><text:span text:style-name="T4">=</text:span><text:span text:style-name="T33">A</text:span></text:p>
      <text:p text:style-name="P83"><text:span text:style-name="T33"><text:tab/><text:tab/><text:tab/>F</text:span><text:span text:style-name="T4">=</text:span>выставляется после команды <text:span text:style-name="T4">CP A (</text:span>при выключенной эмуляции)</text:p>
      <text:p text:style-name="P83"><text:tab/><text:tab/><text:tab/><text:span text:style-name="T33">IX</text:span><text:span text:style-name="T4">=</text:span>адрес загрузки+длина блока</text:p>
      <text:p text:style-name="P83"><text:tab/><text:tab/><text:tab/><text:span text:style-name="T33">DE</text:span><text:span text:style-name="T4">=0</text:span></text:p>
      <text:p text:style-name="P83"><text:span text:style-name="T4"><text:tab/><text:tab/><text:tab/></text:span>флаг <text:span text:style-name="T33">Z</text:span><text:span text:style-name="T4">=0</text:span></text:p>
      <text:p text:style-name="P83"><text:span text:style-name="T4"><text:tab/><text:tab/><text:tab/></text:span>флаг <text:span text:style-name="T33">C</text:span><text:span text:style-name="T4">=1</text:span></text:p>
      <text:p text:style-name="P83"/>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83"/>
      <text:p text:style-name="P86"><text:tab/><text:tab/><text:span text:style-name="T4">RST 8</text:span></text:p>
      <text:p text:style-name="P85"><text:tab/><text:tab/>DB _WINW (0x46)</text:p>
      <text:p text:style-name="P84"/>
      <text:p text:style-name="P83">Регистры:</text:p>
      <text:p text:style-name="P83">на входе:<text:tab/><text:tab/><text:span text:style-name="T33">IX</text:span><text:span text:style-name="T4">=</text:span>адрес описателя окна</text:p>
      <text:p text:style-name="P83">на выходе:<text:tab/>нет</text:p>
      <text:p text:style-name="P83"/>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4">ZX screen </text:span>или текстовый)</text:p>
      <text:p text:style-name="P83"/>
      <text:p text:style-name="P86"><text:tab/><text:tab/><text:span text:style-name="T4">RST 8</text:span></text:p>
      <text:p text:style-name="P85"><text:tab/><text:tab/>DB _PRINT_MESSAGE (0x47)</text:p>
      <text:p text:style-name="P84"/>
      <text:p text:style-name="P83">Регистры:</text:p>
      <text:p text:style-name="P83">на входе:<text:tab/><text:tab/><text:span text:style-name="T33">HL</text:span><text:span text:style-name="T4">=</text:span>адрес текстовой строки, конец строки байт 0 </text:p>
      <text:p text:style-name="P83">на выходе:<text:tab/>нет</text:p>
      <text:p text:style-name="P83"/>
      <text:h text:style-name="Heading_20_6" text:outline-level="6"><text:bookmark-start text:name="__RefHeading__6882_904266311"/>Печать символа на экране<text:bookmark-end text:name="__RefHeading__6882_904266311"/></text:h>
      <text:p text:style-name="P83"/>
      <text:p text:style-name="P86"><text:tab/><text:tab/><text:span text:style-name="T4">RST 8</text:span></text:p>
      <text:p text:style-name="P85"><text:tab/><text:tab/>DB _PRINT_A (0x48)</text:p>
      <text:p text:style-name="P84"><text:soft-page-break/></text:p>
      <text:p text:style-name="P83">Регистры:</text:p>
      <text:p text:style-name="P83">на входе:<text:tab/><text:tab/><text:span text:style-name="T33">A</text:span><text:span text:style-name="T4">=</text:span>код символа для печати</text:p>
      <text:p text:style-name="P83">на выходе:<text:tab/>нет</text:p>
      <text:p text:style-name="P83"/>
      <text:h text:style-name="Heading_20_6" text:outline-level="6"><text:bookmark-start text:name="__RefHeading__6884_904266311"/>Сдвиг окна вверх с цветом или без цвета.<text:bookmark-end text:name="__RefHeading__6884_904266311"/></text:h>
      <text:p text:style-name="P83"/>
      <text:p text:style-name="P86"><text:tab/><text:tab/><text:span text:style-name="T4">LD A,</text:span><text:span text:style-name="T31">режимы сдвига</text:span></text:p>
      <text:p text:style-name="P86"><text:tab/><text:tab/><text:span text:style-name="T4">RST 8</text:span></text:p>
      <text:p text:style-name="P85"><text:tab/><text:tab/>DB _SCROL_UP (0x49)</text:p>
      <text:p text:style-name="P84"/>
      <text:p text:style-name="P83">Регистры:<text:tab/></text:p>
      <text:p text:style-name="P83">на входе:<text:tab/><text:tab/><text:span text:style-name="T30">A</text:span><text:span text:style-name="T33">=</text:span><text:span text:style-name="T30">0 -</text:span> сдвиг<text:span text:style-name="T30"> </text:span>без цвета</text:p>
      <text:p text:style-name="P83"><text:tab/><text:tab/><text:tab/><text:span text:style-name="T33">A=1</text:span><text:span text:style-name="T4"> </text:span><text:span text:style-name="T33">-</text:span><text:span text:style-name="T4"> </text:span>сдвиг с цветом</text:p>
      <text:p text:style-name="P83">на выходе:<text:tab/>нет</text:p>
      <text:p text:style-name="P83"/>
      <text:h text:style-name="Heading_20_6" text:outline-level="6"><text:bookmark-start text:name="__RefHeading__6886_904266311"/>Сдвиг окна вниз с цветом или без цвета.<text:bookmark-end text:name="__RefHeading__6886_904266311"/></text:h>
      <text:p text:style-name="P83"/>
      <text:p text:style-name="P86"><text:tab/><text:tab/><text:span text:style-name="T4">LD A,</text:span><text:span text:style-name="T31">режимы сдвига</text:span></text:p>
      <text:p text:style-name="P86"><text:tab/><text:tab/><text:span text:style-name="T4">RST 8</text:span></text:p>
      <text:p text:style-name="P85"><text:tab/><text:tab/>DB _SCROLL_DOWN (0x4A)</text:p>
      <text:p text:style-name="P84"/>
      <text:p text:style-name="P83">Регистры:</text:p>
      <text:p text:style-name="P83">на входе:<text:tab/><text:tab/><text:span text:style-name="T30">A</text:span><text:span text:style-name="T33">=</text:span><text:span text:style-name="T30">0 -</text:span> сдвиг без цвета</text:p>
      <text:p text:style-name="P83"><text:tab/><text:tab/><text:tab/><text:span text:style-name="T33">A=1 -</text:span> сдвиг с цветом </text:p>
      <text:p text:style-name="P83">на выходе:<text:tab/>нет</text:p>
      <text:p text:style-name="P83"/>
      <text:h text:style-name="P87" text:outline-level="6"><text:bookmark-start text:name="__RefHeading__6888_904266311"/>Установка частоты процессора, видеорежима и модели памяти.<text:bookmark-end text:name="__RefHeading__6888_904266311"/></text:h>
      <text:p text:style-name="P88"><text:span text:style-name="T87">Устанавливаемые режимы «временные», действуют до сброса и не сохраняются в </text:span><text:span text:style-name="T88">CMOS.</text:span></text:p>
      <text:p text:style-name="P89"><text:span text:style-name="T88">A=</text:span><text:span text:style-name="T89">0...7</text:span><text:span text:style-name="T88"> – </text:span><text:span text:style-name="T89">номер видеорежима, соответствует видеорежимам </text:span><text:span text:style-name="T90">ATM Turbo 2+</text:span><text:span text:style-name="T89">. Чтобы видеорежим включился бит 3 регистра </text:span><text:span text:style-name="T90">A </text:span><text:span text:style-name="T89">должен быть установлен в 1, то есть в регистр нужно записать число (номер видеорежима + 8). </text:span><text:span text:style-name="T91">Включение бита 3 нужно только для установки видеорежима.</text:span></text:p>
      <text:p text:style-name="P84">A=0x10 – <text:span text:style-name="T3">включить частоту процессора 3.5 МГц</text:span></text:p>
      <text:p text:style-name="P84">A=0x20 – <text:span text:style-name="T3">включить частоту процессора 7.0 МГц</text:span></text:p>
      <text:p text:style-name="P84">A=0x30 – <text:span text:style-name="T3">включить частоту процессора 14.0 МГц</text:span></text:p>
      <text:p text:style-name="P84">A=0x40 – <text:span text:style-name="T3">установить модель памяти 48 Кб</text:span></text:p>
      <text:p text:style-name="P84">A=0x80 – <text:span text:style-name="T3">установить модель памяти 128 Кб</text:span></text:p>
      <text:p text:style-name="P84">A=0x<text:span text:style-name="T3">C</text:span>0 – <text:span text:style-name="T3">установить модель памяти </text:span>Pentagon 1024 <text:span text:style-name="T3">Кб</text:span></text:p>
      <text:p text:style-name="P83"/>
      <text:p text:style-name="P83"><text:tab/><text:tab/><text:span text:style-name="T33">LD A,</text:span>установки</text:p>
      <text:p text:style-name="P83"><text:tab/><text:tab/><text:span text:style-name="T33">RST 8</text:span></text:p>
      <text:p text:style-name="P85"><text:tab/><text:tab/>DB _SET_MODE (0x4B)</text:p>
      <text:p text:style-name="P83"/>
      <text:p text:style-name="P83">Регистры:</text:p>
      <text:p text:style-name="P83">на входе:<text:tab/><text:tab/><text:span text:style-name="T33">A=</text:span>установки</text:p>
      <text:p text:style-name="P83"><text:tab/><text:tab/><text:span text:style-name="T92">или</text:span><text:tab/><text:span text:style-name="T33">A=0</text:span><text:span text:style-name="T4"> – </text:span>получение текущих установленных режимов</text:p>
      <text:p text:style-name="P83">на выходе:<text:tab/><text:span text:style-name="T33">A</text:span><text:span text:style-name="T30">=</text:span>установленные режимы</text:p>
      <text:p text:style-name="P83"/>
      <text:h text:style-name="Heading_20_6" text:outline-level="6"><text:bookmark-start text:name="__RefHeading___Toc7909_410474887"/>Математические функции<text:bookmark-end text:name="__RefHeading___Toc7909_410474887"/></text:h>
      <text:p text:style-name="P83">Несколько функций деления, умножения и преобразования числа в текстовую строку.</text:p>
      <text:p text:style-name="P83"/>
      <text:p text:style-name="P83">Деление 2-х 16 битных чисел.</text:p>
      <text:p text:style-name="P83"><text:soft-page-break/></text:p>
      <text:p text:style-name="P83"><text:tab/><text:tab/><text:span text:style-name="T33">RST 8</text:span></text:p>
      <text:p text:style-name="P83"><text:span text:style-name="T33"><text:tab/><text:tab/>DB _MATH </text:span><text:span text:style-name="T30">(0</text:span><text:span text:style-name="T33">x4C)</text:span></text:p>
      <text:p text:style-name="P85"><text:tab/><text:tab/>DB _DIVIDE16 (0x00)</text:p>
      <text:p text:style-name="P83"/>
      <text:p text:style-name="P83">Регистры:</text:p>
      <text:p text:style-name="P83">на входе:<text:tab/><text:tab/><text:span text:style-name="T33">BC - </text:span>делимое</text:p>
      <text:p text:style-name="P83"><text:tab/><text:tab/><text:tab/><text:span text:style-name="T33">DE - </text:span>делитель</text:p>
      <text:p text:style-name="P83">на выходе:<text:tab/><text:span text:style-name="T33">DE - </text:span>результат</text:p>
      <text:p text:style-name="P83"/>
      <text:p text:style-name="P83">Умножение 2-х 16 битных чисел.</text:p>
      <text:p text:style-name="P83"/>
      <text:p text:style-name="P83"><text:tab/><text:tab/><text:span text:style-name="T33">RST 8</text:span></text:p>
      <text:p text:style-name="P83"><text:span text:style-name="T33"><text:tab/><text:tab/>DB _MATH </text:span><text:span text:style-name="T30">(0</text:span><text:span text:style-name="T33">x4C)</text:span></text:p>
      <text:p text:style-name="P85"><text:tab/><text:tab/>DB _MULTIPLY16 (0x01)</text:p>
      <text:p text:style-name="P85"/>
      <text:p text:style-name="P83">Регистры:</text:p>
      <text:p text:style-name="P83">на входе:<text:tab/><text:tab/><text:span text:style-name="T33">BC – </text:span>первый множитель</text:p>
      <text:p text:style-name="P83"><text:span text:style-name="T33"><text:tab/><text:tab/><text:tab/>DE – </text:span>второй множитель</text:p>
      <text:p text:style-name="P83">на выходе:<text:tab/><text:span text:style-name="T33">BCDE - </text:span>результат</text:p>
      <text:p text:style-name="P83"/>
      <text:p text:style-name="P83">Беззнаковое 32-разрядное деление функция состоит из двух частей:</text:p>
      <text:p text:style-name="P83">1. 32-разрядное делимое и 16-разрядный делитель.</text:p>
      <text:p text:style-name="P83">2. 32-разрядное делимое и 32-разрядный делитель.</text:p>
      <text:p text:style-name="P83"/>
      <text:p text:style-name="P84"><text:span text:style-name="T3"><text:tab/><text:tab/></text:span><text:span text:style-name="T30">RST 8</text:span></text:p>
      <text:p text:style-name="P84"><text:span text:style-name="T30"><text:tab/><text:tab/>DB _MATH </text:span><text:span text:style-name="T93">(0</text:span><text:span text:style-name="T30">x4C)</text:span></text:p>
      <text:p text:style-name="P85"><text:tab/><text:tab/>DB _DIVIDE32 (0x02)</text:p>
      <text:p text:style-name="P83"/>
      <text:p text:style-name="P83">Регистры:</text:p>
      <text:p text:style-name="P83">на входе:<text:tab/><text:tab/><text:span text:style-name="T33">BCDE – </text:span>делимое</text:p>
      <text:p text:style-name="P83"><text:tab/><text:tab/><text:tab/><text:span text:style-name="T33">BC’DE’ - </text:span>делитель</text:p>
      <text:p text:style-name="P83">на выходе:<text:tab/><text:span text:style-name="T33">BCDE – </text:span>результат</text:p>
      <text:p text:style-name="P83"><text:tab/><text:tab/><text:tab/><text:span text:style-name="T33">BC’DE’ - </text:span>остаток</text:p>
      <text:p text:style-name="P83"/>
      <text:p text:style-name="P83">Умножение 16 битного числа на 32 битное.</text:p>
      <text:p text:style-name="P83"/>
      <text:p text:style-name="P83"><text:tab/><text:tab/><text:span text:style-name="T33">RST 8</text:span></text:p>
      <text:p text:style-name="P83"><text:span text:style-name="T33"><text:tab/><text:tab/>DB _MATH </text:span><text:span text:style-name="T30">(0</text:span><text:span text:style-name="T33">x4C)</text:span></text:p>
      <text:p text:style-name="P85"><text:tab/><text:tab/>DB _MULTIPLY32 (0x03)</text:p>
      <text:p text:style-name="P83"/>
      <text:p text:style-name="P83">Регистры:</text:p>
      <text:p text:style-name="P83">на входе:<text:tab/><text:tab/><text:span text:style-name="T33">BCDE – </text:span>первый множитель</text:p>
      <text:p text:style-name="P83"><text:span text:style-name="T33"><text:tab/><text:tab/><text:tab/>BC’DE’ - </text:span>второй множитель</text:p>
      <text:p text:style-name="P83">на выходе:<text:tab/><text:span text:style-name="T33">BC’DE’BCDE - </text:span>результат</text:p>
      <text:p text:style-name="P83"/>
      <text:p text:style-name="P83">Преобразование числа в текстовую строку в десятичном виде. Требуется буфер на 11 байт (максимальное число 4294967295 завершенное байтом 0).</text:p>
      <text:p text:style-name="P83"/>
      <text:p text:style-name="P83"><text:tab/><text:tab/><text:span text:style-name="T33">RST 8</text:span></text:p>
      <text:p text:style-name="P83"><text:span text:style-name="T33"><text:tab/><text:tab/>DB _MATH (</text:span><text:span text:style-name="T30">0</text:span><text:span text:style-name="T33">x4C)</text:span></text:p>
      <text:p text:style-name="P85"><text:tab/><text:tab/>DB _HEX4DECTXT (0x04)<text:tab/></text:p>
      <text:p text:style-name="P83"/>
      <text:p text:style-name="P83">Регистры:</text:p>
      <text:p text:style-name="P83"><text:soft-page-break/>на входе:<text:tab/><text:tab/><text:span text:style-name="T33">HL – </text:span>адрес буфера для текстовой строки</text:p>
      <text:p text:style-name="P83"><text:span text:style-name="T33"><text:tab/><text:tab/><text:tab/>BCDE – </text:span><text:span text:style-name="T4">32 </text:span>битное число</text:p>
      <text:p text:style-name="P83">на выходе:<text:tab/>нет</text:p>
      <text:p text:style-name="P83"/>
      <text:p text:style-name="P83"><text:tab/><text:tab/><text:span text:style-name="T33">RST 8</text:span></text:p>
      <text:p text:style-name="P83"><text:span text:style-name="T33"><text:tab/><text:tab/>DB _MATH (</text:span><text:span text:style-name="T30">0</text:span><text:span text:style-name="T33">x4C)</text:span></text:p>
      <text:p text:style-name="P83"><text:tab/><text:tab/><text:span text:style-name="T33">DB _HEX2DECTXT (0x05)</text:span></text:p>
      <text:p text:style-name="P83"/>
      <text:p text:style-name="P83">Регистры:</text:p>
      <text:p text:style-name="P83">на входе:<text:tab/><text:tab/><text:span text:style-name="T33">HL – </text:span>адрес буфера для текстовой строки</text:p>
      <text:p text:style-name="P83"><text:span text:style-name="T33"><text:tab/><text:tab/><text:tab/>DE – </text:span>16<text:span text:style-name="T4"> </text:span>битное число</text:p>
      <text:p text:style-name="P83">на выходе:<text:tab/>нет</text:p>
      <text:p text:style-name="P83"/>
      <text:p text:style-name="P83"><text:tab/><text:tab/><text:span text:style-name="T33">RST 8</text:span></text:p>
      <text:p text:style-name="P83"><text:span text:style-name="T33"><text:tab/><text:tab/>DB _MATH (</text:span><text:span text:style-name="T30">0</text:span><text:span text:style-name="T33">x4C)</text:span></text:p>
      <text:p text:style-name="P83"><text:tab/><text:tab/><text:span text:style-name="T33">DB _HEX1DECTXT (0x06)</text:span></text:p>
      <text:p text:style-name="P83"/>
      <text:p text:style-name="P83">Регистры:</text:p>
      <text:p text:style-name="P83">на входе:<text:tab/><text:tab/><text:span text:style-name="T33">HL – </text:span>адрес буфера для текстовой строки</text:p>
      <text:p text:style-name="P83"><text:span text:style-name="T33"><text:tab/><text:tab/><text:tab/>E – </text:span>8<text:span text:style-name="T4"> </text:span>битное число</text:p>
      <text:p text:style-name="P83">на выходе:<text:tab/>нет</text:p>
      <text:p text:style-name="P83"/>
      <text:h text:style-name="P90" text:outline-level="6"><text:bookmark-start text:name="__RefHeading___Toc8323_2230053599"/>Получение номера версии прошивки.<text:bookmark-end text:name="__RefHeading___Toc8323_2230053599"/></text:h>
      <text:p text:style-name="P91">Получение номера версии прошивки в бинарном виде <text:span text:style-name="T94">(BCD </text:span><text:span text:style-name="T95">формат)</text:span>.</text:p>
      <text:p text:style-name="P91"><text:tab/><text:tab/><text:span text:style-name="T33">RST 8</text:span></text:p>
      <text:p text:style-name="P92"><text:tab/><text:tab/>DB _VERSION <text:span text:style-name="T96">(0x4D)</text:span></text:p>
      <text:p text:style-name="P93">Регистры:</text:p>
      <text:p text:style-name="P93">на входе:<text:tab/><text:tab/>нет.</text:p>
      <text:p text:style-name="P94">На выходе:<text:tab/><text:tab/><text:span text:style-name="T33">BCDE –</text:span><text:span text:style-name="T4"> 32 </text:span>битное число. Пример 0<text:span text:style-name="T4">x00005810 </text:span><text:span text:style-name="T97">соответствует</text:span> <text:span text:style-name="T98">номеру</text:span></text:p>
      <text:p text:style-name="P94"><text:span text:style-name="T98"><text:tab/><text:tab/><text:tab/>версии 0.</text:span><text:span text:style-name="T97">58.10</text:span><text:span text:style-name="T4">.</text:span></text:p>
      <text:p text:style-name="P95"><text:tab/><text:tab/><text:tab/><text:span text:style-name="T99">A – </text:span><text:span text:style-name="T100">0-</text:span><text:span text:style-name="T101">TR-DOS </text:span><text:span text:style-name="T102">эмуляция полностью программная; </text:span><text:span text:style-name="T103">1-</text:span><text:span text:style-name="T102"> эмуляция программно-<text:tab/><text:tab/><text:tab/><text:tab/>аппаратная и требующая прошивки FPGA </text:span><text:span text:style-name="T104">(файл zxevo_fw.bin)</text:span><text:span text:style-name="T102">. </text:span><text:span text:style-name="T105">При установленном <text:tab/><text:tab/><text:tab/>7 бите (соответствуенно 0</text:span><text:span text:style-name="T106">x80</text:span><text:span text:style-name="T105"> или</text:span><text:span text:style-name="T106"> 0x81) </text:span><text:span text:style-name="T105">прошивка </text:span><text:span text:style-name="T106">FPGA </text:span><text:span text:style-name="T105">не соответствует <text:tab/><text:tab/><text:tab/><text:tab/>прошивке </text:span><text:span text:style-name="T106">ROM </text:span><text:span text:style-name="T105">файла.</text:span></text:p>
      <text:p text:style-name="P96"><text:span text:style-name="T3">Для </text:span>RST 8:DB 0x4<text:span text:style-name="T107">E</text:span>-4F <text:span text:style-name="T3">зарезервированы.</text:span></text:p>
      <text:p text:style-name="P97"/>
      <text:h text:style-name="Heading_20_6" text:outline-level="6"><text:bookmark-start text:name="__RefHeading__6890_904266311"/>Вызов менеджера устройств<text:bookmark-end text:name="__RefHeading__6890_904266311"/></text:h>
      <text:p text:style-name="P84"/>
      <text:p text:style-name="P85"><text:tab/><text:tab/>RST 8</text:p>
      <text:p text:style-name="P85"><text:tab/><text:tab/>DB _COM_DEV (0x50)</text:p>
      <text:p text:style-name="P85"><text:tab/><text:tab/>DB <text:span text:style-name="T3">номер подпрограммы</text:span></text:p>
      <text:p text:style-name="P84"/>
      <text:p text:style-name="P83">Регистры: описание временно отсутствует.</text:p>
      <text:p text:style-name="P83"/>
      <text:h text:style-name="Heading_20_6" text:outline-level="6"><text:bookmark-start text:name="__RefHeading__6892_904266311"/>Вызов <text:span text:style-name="T4">FAT </text:span>драйвера<text:bookmark-end text:name="__RefHeading__6892_904266311"/></text:h>
      <text:p text:style-name="P83"/>
      <text:p text:style-name="P86"><text:tab/><text:tab/><text:span text:style-name="T4">RST 8</text:span></text:p>
      <text:p text:style-name="P85"><text:tab/><text:tab/>DB _COM_FAT (0x51)</text:p>
      <text:p text:style-name="P85"><text:tab/><text:tab/>DB <text:span text:style-name="T3">номер подпрограммы</text:span></text:p>
      <text:p text:style-name="P84"><text:soft-page-break/></text:p>
      <text:p text:style-name="P83">Регистры: описание временно <text:span text:style-name="T108">отсутствует.</text:span></text:p>
      <text:p text:style-name="P83"/>
      <text:h text:style-name="Heading_20_6" text:outline-level="6"><text:bookmark-start text:name="__RefHeading__6894_904266311"/>Вызов сортировщика найденных файлов<text:bookmark-end text:name="__RefHeading__6894_904266311"/></text:h>
      <text:p text:style-name="P83"/>
      <text:p text:style-name="P86"><text:tab/><text:tab/><text:span text:style-name="T4">RST 8</text:span></text:p>
      <text:p text:style-name="P85"><text:tab/><text:tab/>DB _SORT_FINDFILES (0x52)</text:p>
      <text:p text:style-name="P84"/>
      <text:p text:style-name="P83">Регистры: описание временно отсутствует.</text:p>
      <text:p text:style-name="P83"/>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83"/>
      <text:p text:style-name="P86"><text:tab/><text:tab/><text:span text:style-name="T4">RST 8</text:span></text:p>
      <text:p text:style-name="P85"><text:tab/><text:tab/>DB _MOUNTER (0x53)</text:p>
      <text:p text:style-name="P85"><text:tab/><text:tab/>DB <text:span text:style-name="T3">номер подпрограммы</text:span></text:p>
      <text:p text:style-name="P83"/>
      <text:p text:style-name="P83">Подпрограммы:</text:p>
      <text:p text:style-name="P86"/>
      <text:h text:style-name="Heading_20_6" text:outline-level="6"><text:bookmark-start text:name="__RefHeading__6898_904266311"/>Монтирование образа.<text:bookmark-end text:name="__RefHeading__6898_904266311"/></text:h>
      <text:p text:style-name="P86"/>
      <text:p text:style-name="P86"><text:tab/><text:tab/><text:span text:style-name="T4">RST 8</text:span></text:p>
      <text:p text:style-name="P85"><text:tab/><text:tab/>DB _MOUNTER (0x53)</text:p>
      <text:p text:style-name="P85"><text:tab/><text:tab/>DB _OPEN_MOUNT (0x00)</text:p>
      <text:p text:style-name="P84"/>
      <text:p text:style-name="P83">Регистры:</text:p>
      <text:p text:style-name="P83">на входе:<text:tab/><text:tab/><text:span text:style-name="T33">A=</text:span>номер монтируемого дисковода (0-3). Монтируется файл на который указывает внутренний указатель <text:span text:style-name="T4">FAT </text:span>драйвера.</text:p>
      <text:p text:style-name="P83">на выходе:<text:tab/>нет</text:p>
      <text:p text:style-name="P83"/>
      <text:h text:style-name="Heading_20_6" text:outline-level="6"><text:bookmark-start text:name="__RefHeading__6900_904266311"/>Чтение/запись примонтированных образов.<text:bookmark-end text:name="__RefHeading__6900_904266311"/></text:h>
      <text:p text:style-name="P83"/>
      <text:p text:style-name="P86"><text:tab/><text:tab/><text:span text:style-name="T4">RST 8</text:span></text:p>
      <text:p text:style-name="P85"><text:tab/><text:tab/>DB _MOUNTER (0x53)</text:p>
      <text:p text:style-name="P85"><text:tab/><text:tab/>DB _RDWR_MOUNT (0x01)</text:p>
      <text:p text:style-name="P85"/>
      <text:p text:style-name="P83">Регистры:</text:p>
      <text:p text:style-name="P83">на входе:<text:tab/><text:tab/><text:span text:style-name="T4">A=</text:span>биты 1-0=номер дисковода (0-3)</text:p>
      <text:p text:style-name="P83"><text:tab/><text:tab/><text:tab/> <text:s text:c="4"/>бит 7=0-чтение образа</text:p>
      <text:p text:style-name="P83"><text:tab/><text:tab/><text:tab/> <text:s text:c="4"/>бит 7=1-запись образа</text:p>
      <text:p text:style-name="P83"><text:tab/><text:tab/><text:tab/><text:span text:style-name="T4">D=</text:span>номер трека </text:p>
      <text:p text:style-name="P83"><text:span text:style-name="T4"><text:tab/><text:tab/><text:tab/>E=</text:span>номер сектора</text:p>
      <text:p text:style-name="P83"><text:span text:style-name="T4"><text:tab/><text:tab/><text:tab/>HL=</text:span>адрес чтения/записи</text:p>
      <text:p text:style-name="P83">на выходе:<text:tab/>нет</text:p>
      <text:p text:style-name="P83"/>
      <text:h text:style-name="Heading_20_6" text:outline-level="6"><text:bookmark-start text:name="__RefHeading__6902_904266311"/>Поиск монтируемых образов прописанных в файле <text:span text:style-name="T4">IMAGE.MNT</text:span><text:bookmark-end text:name="__RefHeading__6902_904266311"/></text:h>
      <text:p text:style-name="P84"/>
      <text:p text:style-name="P86"><text:tab/><text:tab/><text:span text:style-name="T4">RST 8</text:span></text:p>
      <text:p text:style-name="P85"><text:tab/><text:tab/>DB _MOUNTER (0x53)</text:p>
      <text:p text:style-name="P85"><text:tab/><text:tab/>DB <text:span text:style-name="T3">_FIND_MOUNTED</text:span> (0x02)</text:p>
      <text:p text:style-name="P85"/>
      <text:p text:style-name="P83">Регистры:</text:p>
      <text:p text:style-name="P83">на входе:<text:tab/><text:tab/>нет</text:p>
      <text:p text:style-name="P83"><text:soft-page-break/>на выходе:<text:tab/>нет</text:p>
      <text:p text:style-name="P83"/>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83"/>
      <text:p text:style-name="P86"><text:tab/><text:tab/><text:span text:style-name="T4">RST 8</text:span></text:p>
      <text:p text:style-name="P85"><text:tab/><text:tab/>DB _MOUNTER (0x53)</text:p>
      <text:p text:style-name="P85"><text:tab/><text:tab/>DB _GET_MOUNTED (0x03)</text:p>
      <text:p text:style-name="P84"/>
      <text:p text:style-name="P83">Регистры:</text:p>
      <text:p text:style-name="P83">на входе:<text:tab/><text:tab/><text:span text:style-name="T4">HL=</text:span>адрес куда считать описатели (256 байт)</text:p>
      <text:p text:style-name="P83">на выходе:<text:tab/>нет</text:p>
      <text:p text:style-name="P83"/>
      <text:p text:style-name="P83">Формат описателей примонтированных образов (64 байта на образ):</text:p>
      <text:p text:style-name="P83"/>
      <text:p text:style-name="P83">+<text:span text:style-name="T4">0x</text:span>00...<text:tab/>описатель примонтированного файла</text:p>
      <text:p text:style-name="P83">...+<text:span text:style-name="T4">0x</text:span>1<text:span text:style-name="T4">F<text:tab/></text:span>скопированный с <text:span text:style-name="T4">FAT</text:span></text:p>
      <text:p text:style-name="P83">+0<text:span text:style-name="T4">x20<text:tab/></text:span>флаговый (пока не используется), биты:</text:p>
      <text:p text:style-name="P83"><text:tab/><text:tab/>7-</text:p>
      <text:p text:style-name="P83"><text:tab/><text:tab/>6-</text:p>
      <text:p text:style-name="P83"><text:tab/><text:tab/>5-</text:p>
      <text:p text:style-name="P83"><text:tab/><text:tab/>4-</text:p>
      <text:p text:style-name="P83"><text:tab/><text:tab/>3-</text:p>
      <text:p text:style-name="P83"><text:tab/><text:tab/>2-</text:p>
      <text:p text:style-name="P83"><text:tab/><text:tab/>1-</text:p>
      <text:p text:style-name="P83"><text:tab/><text:tab/>0-</text:p>
      <text:p text:style-name="P83">+0<text:span text:style-name="T4">x21<text:tab/></text:span>тип образа (реализована только поддержка <text:span text:style-name="T4">TRD)</text:span></text:p>
      <text:p text:style-name="P83"><text:span text:style-name="T4">+0x22<text:tab/></text:span>шаг кластеров (при размере файла в кластерах более 64)</text:p>
      <text:p text:style-name="P84">+0x23<text:tab/><text:span text:style-name="T3">тип раздела (</text:span>0,1,2 <text:span text:style-name="T3">для </text:span>FAT 12/16/32 соответственно<text:span text:style-name="T3">)</text:span></text:p>
      <text:p text:style-name="P84">+0x24<text:tab/><text:span text:style-name="T3">номер выбранного раздела</text:span></text:p>
      <text:p text:style-name="P84">+0x25<text:tab/><text:span text:style-name="T3">адрес вызываемого драйвера для работы с примонтированным образом</text:span></text:p>
      <text:p text:style-name="P84"><text:span text:style-name="T3">+0</text:span>x<text:span text:style-name="T3">2</text:span>7<text:span text:style-name="T3"><text:tab/>адрес вызываемого драйвера раздела где находится примонтированный образами</text:span></text:p>
      <text:p text:style-name="P84">+0x2<text:span text:style-name="T3">9<text:tab/>номер монтируемого дисковода</text:span></text:p>
      <text:p text:style-name="P83"/>
      <text:h text:style-name="Heading_20_6" text:outline-level="6"><text:bookmark-start text:name="__RefHeading__6906_904266311"/>Демонтирование образов.<text:bookmark-end text:name="__RefHeading__6906_904266311"/></text:h>
      <text:p text:style-name="P83"/>
      <text:p text:style-name="P86"><text:tab/><text:tab/><text:span text:style-name="T4">RST 8</text:span></text:p>
      <text:p text:style-name="P85"><text:tab/><text:tab/>DB _MOUNTER (0x53)</text:p>
      <text:p text:style-name="P85"><text:tab/><text:tab/>DB _CLOSEMOUNT (0x04)</text:p>
      <text:p text:style-name="P84"/>
      <text:p text:style-name="P83">Регистры:</text:p>
      <text:p text:style-name="P83">на входе:<text:tab/><text:tab/><text:span text:style-name="T33">A=</text:span>номер демонтируемого дисковода</text:p>
      <text:p text:style-name="P83">на выходе:<text:tab/>нет</text:p>
      <text:p text:style-name="P83"/>
      <text:h text:style-name="Heading_20_6" text:outline-level="6"><text:bookmark-start text:name="__RefHeading__6908_904266311"/>Загрузка образа в рамдиск.<text:bookmark-end text:name="__RefHeading__6908_904266311"/></text:h>
      <text:p text:style-name="P83"/>
      <text:p text:style-name="P86"><text:tab/><text:tab/><text:span text:style-name="T4">RST 8</text:span></text:p>
      <text:p text:style-name="P85"><text:tab/><text:tab/>DB _MOUNTER (0x53)</text:p>
      <text:p text:style-name="P85"><text:tab/><text:tab/>DB _LOADIMAGE (0x05)</text:p>
      <text:p text:style-name="P84"/>
      <text:p text:style-name="P83">Регистры: </text:p>
      <text:p text:style-name="P98">на входе:<text:tab/><text:tab/>нет.</text:p>
      <text:p text:style-name="P98">на выходе:<text:tab/>нет.</text:p>
      <text:p text:style-name="P83"><text:soft-page-break/></text:p>
      <text:h text:style-name="P99" text:outline-level="6"><text:bookmark-start text:name="__RefHeading___Toc8144_2723042641"/>Функция <text:span text:style-name="T109">отсутствует.</text:span><text:bookmark-end text:name="__RefHeading___Toc8144_2723042641"/></text:h>
      <text:p text:style-name="P100"/>
      <text:p text:style-name="P101"><text:span text:style-name="T110"><text:tab/><text:tab/></text:span><text:span text:style-name="T111">RST 8</text:span></text:p>
      <text:p text:style-name="P102"><text:tab/><text:tab/>DB _MOUNTER (0x53)</text:p>
      <text:p text:style-name="P102"><text:tab/><text:tab/>DB (0x0<text:span text:style-name="T112">6</text:span>)</text:p>
      <text:p text:style-name="P103"/>
      <text:p text:style-name="P104">Регистры: <text:tab/><text:span text:style-name="T109">нет</text:span>.</text:p>
      <text:p text:style-name="P104"/>
      <text:h text:style-name="P105" text:outline-level="6"><text:bookmark-start text:name="__RefHeading___Toc8146_2723042641"/>Получение описателя файла загруженного в рамдиск.<text:bookmark-end text:name="__RefHeading___Toc8146_2723042641"/></text:h>
      <text:p text:style-name="P100"/>
      <text:p text:style-name="P101"><text:span text:style-name="T110"><text:tab/><text:tab/></text:span><text:span text:style-name="T111">RST 8</text:span></text:p>
      <text:p text:style-name="P102"><text:tab/><text:tab/>DB _MOUNTER (0x53)</text:p>
      <text:p text:style-name="P102"><text:tab/><text:tab/>DB _REST_NAMELOAD (0x0<text:span text:style-name="T112">7</text:span>)</text:p>
      <text:p text:style-name="P103"/>
      <text:p text:style-name="P104">Регистры:</text:p>
      <text:p text:style-name="P106">на входе:<text:tab/><text:tab/><text:span text:style-name="T33">HL</text:span><text:span text:style-name="T4"> – </text:span>адрес куда переносить описатель.</text:p>
      <text:p text:style-name="P106">на выходе:<text:tab/>нет.</text:p>
      <text:p text:style-name="P83"/>
      <text:h text:style-name="P107" text:outline-level="6"><text:bookmark-start text:name="__RefHeading___Toc8148_2723042641"/>Проверка примонтированного образа <text:span text:style-name="T113">на указанной букве</text:span>.<text:bookmark-end text:name="__RefHeading___Toc8148_2723042641"/></text:h>
      <text:p text:style-name="P108"/>
      <text:p text:style-name="P109"><text:span text:style-name="T110"><text:tab/><text:tab/></text:span><text:span text:style-name="T111">RST 8</text:span></text:p>
      <text:p text:style-name="P110"><text:tab/><text:tab/>DB _MOUNTER (0x53)</text:p>
      <text:p text:style-name="P110"><text:tab/><text:tab/>DB _CMP_DRIVE (0x0<text:span text:style-name="T114">8</text:span>)</text:p>
      <text:p text:style-name="P103"/>
      <text:p text:style-name="P104">Регистры: описание временно отсутствует.</text:p>
      <text:p text:style-name="P104"/>
      <text:h text:style-name="P111" text:outline-level="6"><text:bookmark-start text:name="__RefHeading___Toc8150_2723042641"/>Получение битов смонтированных дисков.<text:bookmark-end text:name="__RefHeading___Toc8150_2723042641"/></text:h>
      <text:p text:style-name="P112"/>
      <text:p text:style-name="P113"><text:span text:style-name="T110"><text:tab/><text:tab/></text:span><text:span text:style-name="T111">RST 8</text:span></text:p>
      <text:p text:style-name="P114"><text:tab/><text:tab/>DB _MOUNTER (0x53)</text:p>
      <text:p text:style-name="P114"><text:tab/><text:tab/>DB _GET_VIRT_BITS (0x0<text:span text:style-name="T115">9</text:span>)</text:p>
      <text:p text:style-name="P103"/>
      <text:p text:style-name="P104">Регистры: описание временно отсутствует.</text:p>
      <text:p text:style-name="P104"/>
      <text:h text:style-name="P115" text:outline-level="6"><text:bookmark-start text:name="__RefHeading___Toc8152_2723042641"/>Монтирование рамдиска<text:bookmark-end text:name="__RefHeading___Toc8152_2723042641"/></text:h>
      <text:p text:style-name="P116"/>
      <text:p text:style-name="P117"><text:span text:style-name="T110"><text:tab/><text:tab/></text:span><text:span text:style-name="T111">RST 8</text:span></text:p>
      <text:p text:style-name="P118"><text:tab/><text:tab/>DB _MOUNTER (0x53)</text:p>
      <text:p text:style-name="P118"><text:tab/><text:tab/>DB _MOUNT_RAMDISK (0x0<text:span text:style-name="T116">A)</text:span></text:p>
      <text:p text:style-name="P103"/>
      <text:p text:style-name="P104">Регистры: описание временно отсутствует.</text:p>
      <text:p text:style-name="P104"/>
      <text:h text:style-name="Heading_20_6" text:outline-level="6"><text:bookmark-start text:name="__RefHeading__6910_904266311"/>Установка загрузчика <text:span text:style-name="T4">Hobeta </text:span>и <text:span text:style-name="T4">SPG </text:span>файлов<text:bookmark-end text:name="__RefHeading__6910_904266311"/></text:h>
      <text:p text:style-name="P83"/>
      <text:p text:style-name="P86"><text:tab/><text:tab/><text:span text:style-name="T4">RST 8</text:span></text:p>
      <text:p text:style-name="P85"><text:tab/><text:tab/>DB _INST_FATBOOT (0x54)</text:p>
      <text:p text:style-name="P84"/>
      <text:p text:style-name="P83">Регистры:</text:p>
      <text:p text:style-name="P83">на входе:<text:tab/><text:tab/><text:span text:style-name="T33">HL</text:span><text:span text:style-name="T4">-</text:span>адрес копирования переменных <text:span text:style-name="T4">FAT </text:span>текущего выбранного раздела</text:p>
      <text:p text:style-name="P83">на выходе:<text:tab/>нет</text:p>
      <text:p text:style-name="P84"><text:soft-page-break/></text:p>
      <text:h text:style-name="Heading_20_6" text:outline-level="6"><text:bookmark-start text:name="__RefHeading__6912_904266311"/>Работа с ячейками <text:span text:style-name="T4">CMOS</text:span><text:bookmark-end text:name="__RefHeading__6912_904266311"/></text:h>
      <text:p text:style-name="P84"/>
      <text:p text:style-name="P85"><text:tab/><text:tab/>RST 8</text:p>
      <text:p text:style-name="P85"><text:tab/><text:tab/>DB _CMOS_RW (0x55)</text:p>
      <text:p text:style-name="P85"><text:tab/><text:tab/>DB <text:span text:style-name="T3">номер подпрограммы</text:span></text:p>
      <text:p text:style-name="P84"/>
      <text:h text:style-name="Heading_20_6" text:outline-level="6"><text:bookmark-start text:name="__RefHeading__6914_904266311"/><text:span text:style-name="T3">Проверка </text:span>CRC CMOS<text:bookmark-end text:name="__RefHeading__6914_904266311"/></text:h>
      <text:p text:style-name="Standard"><text:s/><text:span text:style-name="T3">и инициализация при не совпадении до дефолтных установок..</text:span></text:p>
      <text:p text:style-name="P84"/>
      <text:p text:style-name="P85"><text:tab/><text:tab/>RST 8</text:p>
      <text:p text:style-name="P85"><text:tab/><text:tab/>DB _CMOS_RW (0x55)</text:p>
      <text:p text:style-name="P85"><text:tab/><text:tab/>DB _INIT_CMOS (0x00)</text:p>
      <text:p text:style-name="P85"/>
      <text:p text:style-name="P83">Регистры:</text:p>
      <text:p text:style-name="P83">на входе:<text:tab/><text:tab/>нет</text:p>
      <text:p text:style-name="P83">на выходе:<text:tab/>нет</text:p>
      <text:p text:style-name="P84"/>
      <text:h text:style-name="Heading_20_6" text:outline-level="6"><text:bookmark-start text:name="__RefHeading__6916_904266311"/><text:span text:style-name="T3">Чтение ячейки </text:span>CMOS<text:bookmark-end text:name="__RefHeading__6916_904266311"/></text:h>
      <text:p text:style-name="Standard"><text:s/><text:span text:style-name="T3">Для более быстрого чтения можно использовать свою процедуру.</text:span></text:p>
      <text:p text:style-name="P84"/>
      <text:p text:style-name="P85"><text:tab/><text:tab/>RST 8</text:p>
      <text:p text:style-name="P85"><text:tab/><text:tab/>DB _CMOS_RW (0x55)</text:p>
      <text:p text:style-name="P85"><text:tab/><text:tab/>DB _READ_CMOS (0x01)</text:p>
      <text:p text:style-name="P85"/>
      <text:p text:style-name="P83">Регистры:</text:p>
      <text:p text:style-name="P83">на входе:<text:tab/><text:tab/><text:span text:style-name="T4">H=</text:span>адрес ячейки</text:p>
      <text:p text:style-name="P83">на выходе:<text:tab/><text:span text:style-name="T4">A=L=</text:span>прочитанное значение</text:p>
      <text:p text:style-name="P84"/>
      <text:h text:style-name="Heading_20_6" text:outline-level="6"><text:bookmark-start text:name="__RefHeading__6918_904266311"/><text:span text:style-name="T3">Запись ячейки </text:span>CMOS.<text:bookmark-end text:name="__RefHeading__6918_904266311"/></text:h>
      <text:p text:style-name="P84"><text:span text:style-name="T3">При изменении настроек </text:span>Evo Reset Service <text:span text:style-name="T3">вызывать обязательно, при записи пересчитывается </text:span>CRC <text:span text:style-name="T3">сумма. При прямой записи не будет изменена </text:span>CRC <text:span text:style-name="T3">сумма и при последующем сбросе все настройки будут перезаписаны дефолтными значениями.</text:span></text:p>
      <text:p text:style-name="P85"/>
      <text:p text:style-name="P85"><text:tab/><text:tab/>RST 8</text:p>
      <text:p text:style-name="P85"><text:tab/><text:tab/>DB _CMOS_RW (0x55)</text:p>
      <text:p text:style-name="P85"><text:tab/><text:tab/>DB _WRITE_CMOS (0x02)</text:p>
      <text:p text:style-name="P85"/>
      <text:p text:style-name="P83">Регистры:</text:p>
      <text:p text:style-name="P83">на входе:<text:tab/><text:tab/><text:span text:style-name="T4">H=</text:span>адрес ячейки</text:p>
      <text:p text:style-name="P83"><text:tab/><text:tab/><text:tab/><text:span text:style-name="T4">L</text:span>=число для записи</text:p>
      <text:p text:style-name="P83">на выходе:<text:tab/>нет</text:p>
      <text:p text:style-name="P84"/>
      <text:h text:style-name="Heading_20_6" text:outline-level="6"><text:bookmark-start text:name="__RefHeading__6920_904266311"/>Принудительный сброс настроек до дефолтных значений.<text:bookmark-end text:name="__RefHeading__6920_904266311"/></text:h>
      <text:p text:style-name="P84"/>
      <text:p text:style-name="P85"><text:tab/><text:tab/>RST 8</text:p>
      <text:p text:style-name="P85"><text:tab/><text:tab/>DB _CMOS_RW (0x55)</text:p>
      <text:p text:style-name="P85"><text:tab/><text:tab/>DB _CLEAR_CMOS (0x03)</text:p>
      <text:p text:style-name="P85"/>
      <text:p text:style-name="P83">Регистры:</text:p>
      <text:p text:style-name="P83">на входе:<text:tab/><text:tab/>нет</text:p>
      <text:p text:style-name="P83">на выходе:<text:tab/>нет</text:p>
      <text:p text:style-name="P83"><text:soft-page-break/></text:p>
      <text:h text:style-name="Heading_20_6" text:outline-level="6"><text:bookmark-start text:name="__RefHeading___Toc7911_410474887"/>Установка палитры. <text:bookmark-end text:name="__RefHeading___Toc7911_410474887"/></text:h>
      <text:p text:style-name="P84"><text:span text:style-name="T3">Записывает 16 байт из указанного адреса, если </text:span>A <text:span text:style-name="T3">не равен 0. Стандартная палитра Спектрум режима: 0x00, 0x21, 0x42, 0x63, 0x90, 0xB1, 0xD2, 0xF3, 0xE0, 0xE1, 0xE2, 0xE3, 0xF0, 0xF1, 0xF2, 0xF3.</text:span></text:p>
      <text:p text:style-name="P83"/>
      <text:p text:style-name="P84"><text:span text:style-name="T3"><text:tab/><text:tab/></text:span><text:span text:style-name="T30">RST 8</text:span></text:p>
      <text:p text:style-name="P84"><text:span text:style-name="T30"><text:tab/><text:tab/>DB _SETUP_PAL </text:span><text:span text:style-name="T93">(0</text:span><text:span text:style-name="T30">x56)</text:span></text:p>
      <text:p text:style-name="P84"/>
      <text:p text:style-name="P83">Регистры:</text:p>
      <text:p text:style-name="P83">на входе:<text:tab/><text:tab/><text:span text:style-name="T4">A=0 - </text:span>запись стандартной Спектрум палитры</text:p>
      <text:p text:style-name="P83"><text:tab/><text:tab/><text:tab/><text:span text:style-name="T4">A&gt;0 - HL=</text:span>адрес палитры</text:p>
      <text:p text:style-name="P83">на выходе:<text:tab/>нет</text:p>
      <text:p text:style-name="P83"/>
      <text:h text:style-name="Heading_20_6" text:outline-level="6"><text:bookmark-start text:name="__RefHeading___Toc7913_410474887"/>Установка шрифта.<text:bookmark-end text:name="__RefHeading___Toc7913_410474887"/></text:h>
      <text:p text:style-name="P83"/>
      <text:p text:style-name="P84"><text:span text:style-name="T3"><text:tab/><text:tab/></text:span><text:span text:style-name="T30">RST 8</text:span></text:p>
      <text:p text:style-name="P85"><text:tab/><text:tab/>DB _SETUP_FONT (0x57)</text:p>
      <text:p text:style-name="P84"/>
      <text:p text:style-name="P83">Регистры:</text:p>
      <text:p text:style-name="P83">на входе:<text:tab/><text:tab/><text:span text:style-name="T4">A=0 – </text:span>установка <text:span text:style-name="T4">ATM </text:span>шрифта</text:p>
      <text:p text:style-name="P83"><text:span text:style-name="T4"><text:tab/><text:tab/><text:tab/>A=1 – </text:span>установка <text:span text:style-name="T4">CP866 </text:span>шрифта</text:p>
      <text:p text:style-name="P84"><text:tab/><text:tab/><text:tab/>A=2 – <text:span text:style-name="T3">установка произвольного шрифта, при этом </text:span></text:p>
      <text:p text:style-name="P84"><text:span text:style-name="T3"><text:tab/><text:tab/><text:tab/></text:span>HL – <text:span text:style-name="T3">адрес устанавливаемого шрифта (адрес шрифта должен находиться в <text:tab/><text:tab/><text:tab/><text:tab/><text:tab/>адресах </text:span>0x4000<text:span text:style-name="T3"> - 0</text:span>xFFFF, <text:span text:style-name="T117">не проверяется</text:span>)</text:p>
      <text:p text:style-name="P83">на выходе:<text:tab/>нет</text:p>
      <text:h text:style-name="P119" text:outline-level="2"/>
      <text:h text:style-name="P120"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83">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83"/>
      <text:h text:style-name="Heading_20_6" text:outline-level="6"><text:bookmark-start text:name="__RefHeading__6922_904266311"/>Поиск и инициализация драйверов устройств.<text:bookmark-end text:name="__RefHeading__6922_904266311"/></text:h>
      <text:p text:style-name="P83"/>
      <text:p text:style-name="P83"><text:tab/><text:tab/><text:span text:style-name="T33">RST 8</text:span></text:p>
      <text:p text:style-name="P85"><text:tab/><text:tab/>DB _COM_DEV (0x50)</text:p>
      <text:p text:style-name="P85"><text:tab/><text:tab/>DB _DEVFIND (0x00)</text:p>
      <text:p text:style-name="P83"/>
      <text:p text:style-name="P83">Регистры:</text:p>
      <text:p text:style-name="P83">на входе:<text:tab/><text:tab/>нет</text:p>
      <text:p text:style-name="P83">на выходе:<text:tab/><text:span text:style-name="T33">D </text:span><text:span text:style-name="T4">- </text:span>номер текущего выбранного раздела</text:p>
      <text:p text:style-name="P83"><text:tab/><text:tab/><text:tab/><text:span text:style-name="T33">E </text:span>- количество найденных разделов</text:p>
      <text:p text:style-name="P83"><text:tab/><text:tab/><text:tab/><text:span text:style-name="T33">A </text:span><text:span text:style-name="T4">- </text:span>тип текущего выбранного раздела (0-<text:span text:style-name="T4">FAT12, 1-FAT16, 2-FAT32)</text:span></text:p>
      <text:p text:style-name="P83"><text:span text:style-name="T4"><text:tab/><text:tab/><text:tab/></text:span>флаг <text:span text:style-name="T33">C</text:span>=1 - ничего не найдено.</text:p>
      <text:p text:style-name="P84"/>
      <text:h text:style-name="Heading_20_6" text:outline-level="6"><text:bookmark-start text:name="__RefHeading__6924_904266311"/>Выбор раздела.<text:bookmark-end text:name="__RefHeading__6924_904266311"/></text:h>
      <text:p text:style-name="P83">Имена дисководов <text:span text:style-name="T4">A-D </text:span>не учитываются, 0 соответствует букве <text:span text:style-name="T4">FAT </text:span>устройства <text:span text:style-name="T4">E. </text:span>Максимальное количество устройств/разделов ограниченно 16.</text:p>
      <text:p text:style-name="P83"/>
      <text:p text:style-name="P83"><text:tab/><text:tab/><text:span text:style-name="T33">RST 8</text:span></text:p>
      <text:p text:style-name="P85"><text:tab/><text:tab/>DB _COM_DEV (0x50)</text:p>
      <text:p text:style-name="P85"><text:tab/><text:tab/>DB _SET_VOL (0x01)</text:p>
      <text:p text:style-name="P84"/>
      <text:p text:style-name="P83">Регистры:</text:p>
      <text:p text:style-name="P83">на входе:<text:tab/><text:tab/><text:span text:style-name="T33">A</text:span><text:span text:style-name="T4"> -</text:span> номер выбираемого раздела. Может принимать значение от 0 до количества найденных разделов -1.</text:p>
      <text:p text:style-name="P83">на выходе:<text:tab/>флаг <text:span text:style-name="T33">C</text:span><text:span text:style-name="T30">=</text:span>1<text:span text:style-name="T33"> - </text:span>попытка выбрать не существующий раздел.</text:p>
      <text:p text:style-name="P83"/>
      <text:h text:style-name="Heading_20_6" text:outline-level="6"><text:bookmark-start text:name="__RefHeading___Toc7915_410474887"/>Получение количества найденных разделов, номер текущего и его тип<text:span text:style-name="T118">. </text:span><text:bookmark-end text:name="__RefHeading___Toc7915_410474887"/></text:h>
      <text:p text:style-name="P121">Выдает на выходе тоже, что и функция поиска устройств.</text:p>
      <text:p text:style-name="P83"/>
      <text:p text:style-name="P83"><text:tab/><text:tab/><text:span text:style-name="T33">RST 8</text:span></text:p>
      <text:p text:style-name="P85"><text:tab/><text:tab/>DB _COM_DEV (0x50)</text:p>
      <text:p text:style-name="P85"><text:tab/><text:tab/>DB _KOL_VOL (0x02)</text:p>
      <text:p text:style-name="P84"/>
      <text:p text:style-name="P83">Регистры:</text:p>
      <text:p text:style-name="P83">на входе:<text:tab/><text:tab/>нет</text:p>
      <text:p text:style-name="P83">на выходе:<text:tab/><text:span text:style-name="T33">D </text:span><text:span text:style-name="T4">- </text:span>номер текущего выбранного раздела</text:p>
      <text:p text:style-name="P83"><text:tab/><text:tab/><text:tab/><text:span text:style-name="T33">E </text:span>- количество найденных разделов</text:p>
      <text:p text:style-name="P83"><text:tab/><text:tab/><text:tab/><text:span text:style-name="T33">A </text:span><text:span text:style-name="T4">- </text:span>тип текущего раздела (0-<text:span text:style-name="T4">FAT12, 1-FAT16, 2-FAT32)</text:span></text:p>
      <text:p text:style-name="P83"><text:span text:style-name="T4"><text:tab/><text:tab/><text:tab/>флаг </text:span><text:span text:style-name="T33">C</text:span><text:span text:style-name="T4">=1 - ничего не найдено.</text:span></text:p>
      <text:p text:style-name="P84"/>
      <text:h text:style-name="Heading_20_6" text:outline-level="6"><text:bookmark-start text:name="__RefHeading__6928_904266311"/>Получить таблицу найденных разделов.<text:bookmark-end text:name="__RefHeading__6928_904266311"/></text:h>
      <text:p text:style-name="P83"/>
      <text:p text:style-name="P83"><text:tab/><text:tab/><text:span text:style-name="T33">RST 8</text:span></text:p>
      <text:p text:style-name="P85"><text:tab/><text:tab/>DB _COM_DEV (0x50)</text:p>
      <text:p text:style-name="P85"><text:tab/><text:tab/>DB _GET_FNDVOLUME (0x03)</text:p>
      <text:p text:style-name="P84"><text:soft-page-break/></text:p>
      <text:p text:style-name="P83">Регистры:</text:p>
      <text:p text:style-name="P83">на входе:<text:tab/><text:tab/><text:span text:style-name="T33">HL</text:span><text:span text:style-name="T4"> – </text:span>адрес куда перенести таблицу. В указанный адрес переносится 256 байт.</text:p>
      <text:p text:style-name="P83">на выходе:<text:tab/>нет</text:p>
      <text:p text:style-name="P83"/>
      <text:p text:style-name="P122">На каждый найденный раздел отведено 8 байт, максимум найденных разделов 26 (по количеству букв <text:span text:style-name="T4">A...Z</text:span>). Формат таблицы:</text:p>
      <text:p text:style-name="P83"/>
      <text:p text:style-name="P83">+0 <text:s text:c="4"/><text:span text:style-name="T4">=<text:tab/></text:span>0-<text:span text:style-name="T4">FDD </text:span>drive <text:span text:style-name="T4">A</text:span></text:p>
      <text:p text:style-name="P83"><text:tab/><text:tab/>1-<text:span text:style-name="T4">FDD drive</text:span> B</text:p>
      <text:p text:style-name="P83"><text:tab/><text:tab/>2-<text:span text:style-name="T4">FDD drive</text:span> C</text:p>
      <text:p text:style-name="P83"><text:tab/><text:tab/>3-<text:span text:style-name="T4">FDD drive</text:span> D</text:p>
      <text:p text:style-name="P83"><text:tab/><text:tab/>4-SD карта ZC</text:p>
      <text:p text:style-name="P83"><text:tab/><text:tab/>5-SD карта <text:span text:style-name="T4">NeoGS</text:span></text:p>
      <text:p text:style-name="P83"><text:tab/><text:tab/>6-HDD N<text:span text:style-name="T4">emo</text:span></text:p>
      <text:p text:style-name="P83"><text:tab/><text:tab/>7-HDD SMUC</text:p>
      <text:p text:style-name="P83"><text:tab/><text:tab/>8-HDD DIVIDE</text:p>
      <text:p text:style-name="P83"><text:tab/><text:tab/>9-HDD PROFI</text:p>
      <text:p text:style-name="P83"><text:tab/><text:tab/><text:span text:style-name="T4">0x0</text:span>A-HDD TURBO2+</text:p>
      <text:p text:style-name="P83">+1 <text:s text:c="4"/>=<text:tab/>для SD всегда 0</text:p>
      <text:p text:style-name="P83"><text:tab/><text:tab/>для HDD 0-<text:span text:style-name="T4">Master</text:span>, 1-<text:span text:style-name="T4">Slave</text:span></text:p>
      <text:p text:style-name="P83">+2 <text:s text:c="4"/><text:span text:style-name="T4">=<text:tab/></text:span>тип раздела, сейчас только разделы:</text:p>
      <text:p text:style-name="P83"><text:tab/><text:tab/>0 - FAT12 (1)</text:p>
      <text:p text:style-name="P83"><text:tab/><text:tab/>1 <text:span text:style-name="T4">-</text:span> FAT16 (<text:span text:style-name="T4">4, 6, 0x0E</text:span>)</text:p>
      <text:p text:style-name="P83"><text:tab/><text:tab/>2 –<text:span text:style-name="T4"> </text:span>FAT32 <text:span text:style-name="T4">(0x0B</text:span>, <text:span text:style-name="T4">0x0C)</text:span></text:p>
      <text:p text:style-name="P83">+3 <text:s text:c="4"/>=<text:tab/>стартовый сектор раздела</text:p>
      <text:p text:style-name="P83">+7 <text:s text:c="4"/>=<text:tab/>резерв</text:p>
      <text:p text:style-name="P83"/>
      <text:p text:style-name="P83">Дисководы пока никак не поддержаны.</text:p>
      <text:p text:style-name="P83"/>
      <text:h text:style-name="Heading_20_6" text:outline-level="6"><text:bookmark-start text:name="__RefHeading___Toc7917_410474887"/>Вызов драйвера выбранного устройства.<text:bookmark-end text:name="__RefHeading___Toc7917_410474887"/></text:h>
      <text:p text:style-name="P83"/>
      <text:p text:style-name="P84"><text:span text:style-name="T3"><text:tab/><text:tab/></text:span><text:span text:style-name="T30">RST 8</text:span></text:p>
      <text:p text:style-name="P85"><text:tab/><text:tab/>DB _COM_DEV (0x50)</text:p>
      <text:p text:style-name="P85"><text:tab/><text:tab/>DB _TO_DRV (0x04)</text:p>
      <text:p text:style-name="P121"/>
      <text:h text:style-name="Heading_20_6" text:outline-level="6"><text:bookmark-start text:name="__RefHeading___Toc7919_410474887"/>Установка битов устройства для вызова драйвера <text:span text:style-name="T4">HDD.</text:span><text:bookmark-end text:name="__RefHeading___Toc7919_410474887"/></text:h>
      <text:p text:style-name="P83"/>
      <text:p text:style-name="P83"><text:tab/><text:tab/><text:span text:style-name="T33">RST 8</text:span></text:p>
      <text:p text:style-name="P85"><text:tab/><text:tab/>DB _COM_DEV (0x50)</text:p>
      <text:p text:style-name="P83"><text:tab/><text:tab/><text:span text:style-name="T33">DB </text:span><text:span text:style-name="T30">_SET_DEVICE </text:span><text:span text:style-name="T33">(0x05)</text:span></text:p>
      <text:p text:style-name="P83"/>
      <text:h text:style-name="Heading_20_6" text:outline-level="6"><text:bookmark-start text:name="__RefHeading__6934_904266311"/>Контроль наличия <text:span text:style-name="T4">SD </text:span>карт.<text:bookmark-end text:name="__RefHeading__6934_904266311"/></text:h>
      <text:p text:style-name="P83"/>
      <text:p text:style-name="P83"><text:tab/><text:tab/><text:span text:style-name="T33">RST 8</text:span></text:p>
      <text:p text:style-name="P85"><text:tab/><text:tab/>DB _COM_DEV (0x50)</text:p>
      <text:p text:style-name="P83"><text:tab/><text:tab/><text:span text:style-name="T33">DB </text:span><text:span text:style-name="T30">_CONTROL_SD </text:span><text:span text:style-name="T33">(0x06)</text:span></text:p>
      <text:p text:style-name="P83"/>
      <text:h text:style-name="Heading_20_6" text:outline-level="6"><text:bookmark-start text:name="__RefHeading__6936_904266311"/>Прямой вызов драйвера <text:span text:style-name="T4">HDD.</text:span><text:bookmark-end text:name="__RefHeading__6936_904266311"/></text:h>
      <text:p text:style-name="P83"/>
      <text:p text:style-name="P83"><text:tab/><text:tab/><text:span text:style-name="T33">RST 8</text:span></text:p>
      <text:p text:style-name="P85"><text:tab/><text:tab/>DB _COM_DEV (0x50)</text:p>
      <text:p text:style-name="P83"><text:soft-page-break/><text:tab/><text:tab/><text:span text:style-name="T33">DB </text:span><text:span text:style-name="T30">_COMHDDN </text:span><text:span text:style-name="T33">(0x07)</text:span></text:p>
      <text:p text:style-name="P83"/>
      <text:h text:style-name="Heading_20_6" text:outline-level="6"><text:bookmark-start text:name="__RefHeading___Toc7921_410474887"/>Полная переинициализация раздела.<text:bookmark-end text:name="__RefHeading___Toc7921_410474887"/></text:h>
      <text:p text:style-name="P83"/>
      <text:p text:style-name="P83"><text:tab/><text:tab/><text:span text:style-name="T33">RST 8</text:span></text:p>
      <text:p text:style-name="P85"><text:tab/><text:tab/>DB COM_DEV (0x50)</text:p>
      <text:p text:style-name="P85"><text:tab/><text:tab/>DB _FREINIT_VOL (0x08)</text:p>
      <text:p text:style-name="P85"/>
      <text:h text:style-name="P123" text:outline-level="6"><text:bookmark-start text:name="__RefHeading___Toc8865_3384946529"/>Установка номера сектора для чтения/записи<text:bookmark-end text:name="__RefHeading___Toc8865_3384946529"/></text:h>
      <text:p text:style-name="P124"/>
      <text:p text:style-name="P124"><text:tab/><text:tab/><text:span text:style-name="T119">RST 8</text:span></text:p>
      <text:p text:style-name="P125"><text:tab/><text:tab/>DB COM_DEV (0x50)</text:p>
      <text:p text:style-name="P126"><text:span text:style-name="T33"><text:tab/><text:tab/>DB </text:span><text:span text:style-name="T120">_SET_</text:span><text:span text:style-name="T121">SECTOR_NUM</text:span></text:p>
      <text:p text:style-name="P127"/>
      <text:h text:style-name="P120" text:outline-level="2"><text:bookmark-start text:name="Функции FAT драйвера"/><text:bookmark-start text:name="__RefHeading__7586_2044125182"/>Функции <text:span text:style-name="T4">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83">Используется менеджером устройств, не рекомендуется вызывать.</text:p>
      <text:p text:style-name="P83"/>
      <text:p text:style-name="P83"><text:tab/><text:tab/><text:span text:style-name="T33">RST 8</text:span></text:p>
      <text:p text:style-name="P85"><text:tab/><text:tab/>DB _COM_FAT (0x51)</text:p>
      <text:p text:style-name="P85"><text:tab/><text:tab/>DB _INIT_FATVARS (0x00)</text:p>
      <text:p text:style-name="P84"/>
      <text:p text:style-name="P83">Регистры:</text:p>
      <text:p text:style-name="P83">на входе:<text:tab/><text:tab/>нет</text:p>
      <text:p text:style-name="P83">на выходе:<text:tab/>нет</text:p>
      <text:p text:style-name="P83"/>
      <text:h text:style-name="Heading_20_6" text:outline-level="6"><text:bookmark-start text:name="__RefHeading__6940_904266311"/>Получение описателя файла.<text:bookmark-end text:name="__RefHeading__6940_904266311"/></text:h>
      <text:p text:style-name="P83">Переносит по указанному адресу 32 байтный описатель файла.</text:p>
      <text:p text:style-name="P83"/>
      <text:p text:style-name="P83"><text:tab/><text:tab/><text:span text:style-name="T33">RST 8</text:span></text:p>
      <text:p text:style-name="P85"><text:tab/><text:tab/>DB _COM_FAT (0x51)</text:p>
      <text:p text:style-name="P85"><text:tab/><text:tab/>DB _READ_DIR (0x01)</text:p>
      <text:p text:style-name="P84"/>
      <text:p text:style-name="P83">Регистры:</text:p>
      <text:p text:style-name="P83">на входе:<text:tab/><text:tab/><text:span text:style-name="T33">HL</text:span><text:span text:style-name="T4">-</text:span>адрес куда переносить 32 байта описателя</text:p>
      <text:p text:style-name="P83"><text:tab/><text:tab/><text:tab/><text:span text:style-name="T33">BC</text:span><text:span text:style-name="T4">-</text:span>номер файла</text:p>
      <text:p text:style-name="P83">на выходе:<text:tab/>нет</text:p>
      <text:p text:style-name="P83"/>
      <text:h text:style-name="Heading_20_6" text:outline-level="6"><text:bookmark-start text:name="__RefHeading__6942_904266311"/>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83"/>
      <text:p text:style-name="P83"><text:tab/><text:tab/><text:span text:style-name="T33">RST 8</text:span></text:p>
      <text:p text:style-name="P85"><text:tab/><text:tab/>DB _COM_FAT (0x51)</text:p>
      <text:p text:style-name="P85"><text:tab/><text:tab/>DB _ENTER_DIR (0x02)</text:p>
      <text:p text:style-name="P84"/>
      <text:p text:style-name="P83">Регистры:</text:p>
      <text:p text:style-name="P83">на входе:<text:tab/><text:tab/>нет</text:p>
      <text:p text:style-name="P83">на выходе:<text:tab/>нет</text:p>
      <text:p text:style-name="P83"/>
      <text:h text:style-name="P128" text:outline-level="6"><text:bookmark-start text:name="__RefHeading___Toc8348_1791399199"/>Получение текущего пути.<text:bookmark-end text:name="__RefHeading___Toc8348_1791399199"/></text:h>
      <text:p text:style-name="P129">Получение текстовой строки текущего пути файла.</text:p>
      <text:p text:style-name="P130"><text:tab/><text:tab/><text:span text:style-name="T33">RST 8</text:span></text:p>
      <text:p text:style-name="P131"><text:tab/><text:tab/>DB _COM_FAT (0x51)</text:p>
      <text:p text:style-name="P132"><text:tab/><text:tab/>DB _GET_PATH (0x03)</text:p>
      <text:p text:style-name="P83"/>
      <text:p text:style-name="P133">Регистры:</text:p>
      <text:p text:style-name="P134">на входе:<text:tab/><text:tab/><text:span text:style-name="T33">HL</text:span><text:span text:style-name="T4"> – </text:span>адрес куда переносит текстовую строку текущего пути.</text:p>
      <text:p text:style-name="P134">на выходе:<text:tab/>нет</text:p>
      <text:p text:style-name="P83"/>
      <text:h text:style-name="Heading_20_6" text:outline-level="6"><text:bookmark-start text:name="__RefHeading__6944_904266311"/>Получение длинного имени файла.<text:bookmark-end text:name="__RefHeading__6944_904266311"/></text:h>
      <text:p text:style-name="P83">Переносит в указанный адрес 256 байт (до 255 байт имени и байт 0 как признак конца имени). При отсутствии длинного имени выдает короткое вида 8.3.</text:p>
      <text:p text:style-name="P83"/>
      <text:p text:style-name="P83"><text:tab/><text:tab/><text:span text:style-name="T33">RST 8</text:span></text:p>
      <text:p text:style-name="P85"><text:soft-page-break/><text:tab/><text:tab/>DB _COM_FAT (0x51)</text:p>
      <text:p text:style-name="P85"><text:tab/><text:tab/>DB _GET_LONGNAME (0x0<text:span text:style-name="T122">4</text:span>)</text:p>
      <text:p text:style-name="P84"/>
      <text:p text:style-name="P83">Регистры:</text:p>
      <text:p text:style-name="P83">на входе:<text:tab/><text:tab/><text:span text:style-name="T33">HL</text:span><text:span text:style-name="T4">-</text:span>адрес куда перенести 256 байт длинного имени.</text:p>
      <text:p text:style-name="P83">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83">Поиск по текстовой строке вида <text:span text:style-name="T4">filename.ext, </text:span>завершение строки байтом с кодом менее <text:span text:style-name="T4">0x21 </text:span>(пробел тоже является признаком конца строки)<text:span text:style-name="T4">. </text:span>Имя и расширение не нужно дополнять до вида 8.3. Возможен поиск например по строке <text:span text:style-name="T4">abc.$C</text:span></text:p>
      <text:p text:style-name="P83"/>
      <text:p text:style-name="P83"><text:tab/><text:tab/><text:span text:style-name="T33">RST 8</text:span></text:p>
      <text:p text:style-name="P85"><text:tab/><text:tab/>DB _COM_FAT (0x51)</text:p>
      <text:p text:style-name="P85"><text:tab/><text:tab/>DB _FIND_NAME (0x0<text:span text:style-name="T122">5</text:span>)</text:p>
      <text:p text:style-name="P84"/>
      <text:p text:style-name="P83">Регистры:</text:p>
      <text:p text:style-name="P83">на входе:<text:tab/><text:tab/><text:span text:style-name="T33">HL</text:span>-адрес текстовой строки для поиска</text:p>
      <text:p text:style-name="P83">на выходе:<text:tab/><text:span text:style-name="T33">BC</text:span>-номер записи</text:p>
      <text:p text:style-name="P83"><text:tab/><text:tab/><text:tab/>флаг <text:span text:style-name="T30">С</text:span>=1 ничего не найдено</text:p>
      <text:p text:style-name="P83"/>
      <text:h text:style-name="Heading_20_6" text:outline-level="6"><text:bookmark-start text:name="__RefHeading__6948_904266311"/>Поиск всех файлов и директорий в текущей директории.<text:bookmark-end text:name="__RefHeading__6948_904266311"/></text:h>
      <text:p text:style-name="P83">Возможен поиск по расширению. Директории находятся всегда. Описатель «.» игнорируется.</text:p>
      <text:p text:style-name="P83"/>
      <text:p text:style-name="P83"><text:tab/><text:tab/><text:span text:style-name="T33">RST 8</text:span></text:p>
      <text:p text:style-name="P85"><text:tab/><text:tab/>DB _COM_FAT (0x51)</text:p>
      <text:p text:style-name="P85"><text:tab/><text:tab/>DB _FIND_FILEITEM (0x06)</text:p>
      <text:p text:style-name="P84"/>
      <text:p text:style-name="P83">Регистры:</text:p>
      <text:p text:style-name="P83">на входе:<text:tab/><text:tab/>нет</text:p>
      <text:p text:style-name="P83">на выходе:<text:tab/><text:span text:style-name="T33">BC</text:span><text:span text:style-name="T4">-</text:span>количество найденного</text:p>
      <text:p text:style-name="P83"><text:tab/><text:tab/><text:tab/><text:span text:style-name="T33">A</text:span>-номер страницы куда сложена таблица найденных описателей</text:p>
      <text:p text:style-name="P83"/>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4">TRD!C FDI</text:span>»</text:p>
      <text:p text:style-name="P83"/>
      <text:p text:style-name="P83"><text:tab/><text:tab/><text:span text:style-name="T33">RST 8</text:span></text:p>
      <text:p text:style-name="P85"><text:tab/><text:tab/>DB _COM_FAT (0x51)</text:p>
      <text:p text:style-name="P85"><text:tab/><text:tab/>DB _SET_MASK_EXT (0x07)</text:p>
      <text:p text:style-name="P84"/>
      <text:p text:style-name="P83">Регистры:</text:p>
      <text:p text:style-name="P83">на входе:<text:tab/><text:tab/><text:span text:style-name="T33">A</text:span><text:span text:style-name="T4">=0 </text:span>отключение поиска по расширению</text:p>
      <text:p text:style-name="P83"><text:tab/><text:tab/><text:tab/><text:span text:style-name="T33">A</text:span>=любое число установка расширений для поиска</text:p>
      <text:p text:style-name="P83"><text:tab/><text:tab/><text:tab/><text:span text:style-name="T33">HL</text:span><text:span text:style-name="T4">-</text:span>адрес строки расширений заканчивающийся байтом 0</text:p>
      <text:p text:style-name="P83">на выходе:<text:tab/>нет</text:p>
      <text:p text:style-name="P83"/>
      <text:h text:style-name="Heading_20_6" text:outline-level="6"><text:bookmark-start text:name="__RefHeading__6952_904266311"/>Открытие файла.<text:bookmark-end text:name="__RefHeading__6952_904266311"/></text:h>
      <text:p text:style-name="P83"/>
      <text:p text:style-name="P85"><text:tab/><text:tab/>RST 8</text:p>
      <text:p text:style-name="P85"><text:tab/><text:tab/>DB _COM_FAT (0x51)</text:p>
      <text:p text:style-name="P85"><text:tab/><text:tab/>DB _OPEN_FILE (0x08)</text:p>
      <text:p text:style-name="P84"/>
      <text:p text:style-name="P83"><text:soft-page-break/>Регистры:</text:p>
      <text:p text:style-name="P83">на входе:<text:tab/><text:tab/>нет</text:p>
      <text:p text:style-name="P83">на выходе:<text:tab/>нет</text:p>
      <text:p text:style-name="P84"/>
      <text:h text:style-name="Heading_20_6" text:outline-level="6"><text:bookmark-start text:name="__RefHeading__6954_904266311"/>Последовательное чтение открытого файла.<text:bookmark-end text:name="__RefHeading__6954_904266311"/></text:h>
      <text:p text:style-name="P83"/>
      <text:p text:style-name="P85"><text:tab/><text:tab/>RST 8</text:p>
      <text:p text:style-name="P85"><text:tab/><text:tab/>DB _COM_FAT (0x51)</text:p>
      <text:p text:style-name="P85"><text:tab/><text:tab/>DB _READ_FILE (0x09)</text:p>
      <text:p text:style-name="P84"/>
      <text:p text:style-name="P83">Регистры:</text:p>
      <text:p text:style-name="P83">на входе:<text:tab/><text:tab/><text:span text:style-name="T33">A</text:span>-количество секторов для загрузки</text:p>
      <text:p text:style-name="P83"><text:span text:style-name="T4"><text:tab/><text:tab/><text:tab/></text:span><text:span text:style-name="T33">HL</text:span>-адрес загрузки</text:p>
      <text:p text:style-name="P83">на выходе:<text:tab/>флаг <text:span text:style-name="T33">C</text:span><text:span text:style-name="T4">=1 </text:span>файл закончился</text:p>
      <text:p text:style-name="P84"/>
      <text:h text:style-name="Heading_20_6" text:outline-level="6"><text:bookmark-start text:name="__RefHeading__6956_904266311"/>Создание таблицы кластеров текущей директории.<text:bookmark-end text:name="__RefHeading__6956_904266311"/></text:h>
      <text:p text:style-name="P83"><text:span text:style-name="T123">Не рекомендуется к применению</text:span>.</text:p>
      <text:p text:style-name="P83"/>
      <text:p text:style-name="P86"><text:tab/><text:tab/><text:span text:style-name="T4">RST 8</text:span></text:p>
      <text:p text:style-name="P85"><text:tab/><text:tab/>DB _COM_FAT (0x51)</text:p>
      <text:p text:style-name="P85"><text:tab/><text:tab/>DB _INIT_TEKDIR (0x0A)</text:p>
      <text:p text:style-name="P83"/>
      <text:p text:style-name="P83">Регистры:</text:p>
      <text:p text:style-name="P83">на входе:<text:tab/><text:tab/>нет</text:p>
      <text:p text:style-name="P83">на выходе:<text:tab/>нет</text:p>
      <text:p text:style-name="P83"/>
      <text:h text:style-name="Heading_20_6" text:outline-level="6"><text:bookmark-start text:name="__RefHeading__6958_904266311"/>Работа с текущей позицией в текущей директории.<text:bookmark-end text:name="__RefHeading__6958_904266311"/></text:h>
      <text:p text:style-name="P83">Имеет несколько подфунций.</text:p>
      <text:p text:style-name="P83"/>
      <text:p text:style-name="P86"><text:tab/><text:tab/><text:span text:style-name="T4">RST 8</text:span></text:p>
      <text:p text:style-name="P85"><text:tab/><text:tab/>DB _COM_FAT (0x51)</text:p>
      <text:p text:style-name="P85"><text:tab/><text:tab/>DB _POS_FILES (0x0B<text:span text:style-name="T124">)</text:span></text:p>
      <text:p text:style-name="P83"/>
      <text:p text:style-name="P83">Регистры:</text:p>
      <text:p text:style-name="P83">на входе:<text:tab/><text:tab/><text:span text:style-name="T33">A</text:span>-номер подфункции</text:p>
      <text:p text:style-name="P83"><text:span text:style-name="T4"><text:tab/><text:tab/><text:tab/></text:span><text:span text:style-name="T33">BC</text:span>-номер позиции</text:p>
      <text:p text:style-name="P83">на выходе:<text:tab/><text:span text:style-name="T33">BC</text:span><text:span text:style-name="T4">-</text:span>номер позиции</text:p>
      <text:p text:style-name="P83"/>
      <text:p text:style-name="P83">Подфункции:</text:p>
      <text:p text:style-name="P83">00-сохранение текущей позиции файла (сохраняется внутри функции)</text:p>
      <text:p text:style-name="P83">01-восстановление текущей позиции файла (сохраняется внутри функции)</text:p>
      <text:p text:style-name="P83">02-сброс текущей позиции в 0 и поиск первой "легальной" записи </text:p>
      <text:p text:style-name="P83">03-перемотать на "<text:span text:style-name="T4">B</text:span>" файлов назад</text:p>
      <text:p text:style-name="P83">04-перемотать на "<text:span text:style-name="T4">B</text:span>" файлов вперед</text:p>
      <text:p text:style-name="P83">05-подсчет количества "легальных" записей</text:p>
      <text:p text:style-name="P83">06-установить номер "легальной" записи из "<text:span text:style-name="T4">BC</text:span>"</text:p>
      <text:p text:style-name="P83">07-вернуть в "<text:span text:style-name="T4">BC</text:span>" текущий номер "легальной" записи</text:p>
      <text:p text:style-name="P83"/>
      <text:p text:style-name="P83">"Легальная" запись - реальный описатель файла вида 8.3. Дополнения для хранения длинного имени удаленные файлы не учитываются.</text:p>
      <text:h text:style-name="P15" text:outline-level="2"><text:bookmark-start text:name="Рисование окна по описателю"/><text:bookmark-start text:name="__RefHeading__7588_2044125182"/><text:soft-page-break/>Рисование окна по описателю<text:bookmark-end text:name="Рисование окна по описателю"/><text:bookmark-end text:name="__RefHeading__7588_2044125182"/></text:h>
      <text:p text:style-name="P83">Адрес описателя окна должен быть указан в регистре <text:span text:style-name="T4">IX.</text:span></text:p>
      <text:p text:style-name="P84"/>
      <text:p text:style-name="P83">Описатель окна:</text:p>
      <text:p text:style-name="P83"/>
      <text:p text:style-name="P83">+00 (<text:span text:style-name="T4">byte</text:span>) - Х координата окна (в знакоместах)</text:p>
      <text:p text:style-name="P83">+01 (<text:span text:style-name="T4">byte</text:span>) - <text:span text:style-name="T4">Y </text:span>координата окна (в знакоместах)</text:p>
      <text:p text:style-name="P83">+02 (<text:span text:style-name="T4">byte</text:span>) <text:span text:style-name="T4">-</text:span> <text:span text:style-name="T4">V </text:span>высота окна (в знакоместах)</text:p>
      <text:p text:style-name="P83">+03 (<text:span text:style-name="T4">byte</text:span>) - <text:span text:style-name="T4">H </text:span>ширина окна (в знакоместах)</text:p>
      <text:p text:style-name="P83">+04 <text:span text:style-name="T4">(byte) </text:span>- <text:span text:style-name="T4">C </text:span>цвет окна</text:p>
      <text:p text:style-name="P83">+05 <text:span text:style-name="T4">(byte) </text:span>- <text:span text:style-name="T4">C </text:span>цвет курсорной полосы для меню</text:p>
      <text:p text:style-name="P83">+06 <text:span text:style-name="T4">(byte) </text:span>- <text:span text:style-name="T4">F </text:span>флаговый байт, раскладка по битам:</text:p>
      <text:p text:style-name="P83"><text:tab/>7 - 1-рисовать нижний заголовок, 0-нет (цветная полоса внизу окна цветом инверсным цвету окна)</text:p>
      <text:p text:style-name="P83"><text:tab/>6 - 1-окно без рамки, 0-с рамкой</text:p>
      <text:p text:style-name="P83"><text:tab/>5 - 1-рисовать верхний заголовок, 0-нет (цветная полоса внизу окна цветом инверсным цвету окна)</text:p>
      <text:p text:style-name="P83"><text:tab/>4 - 1-печать текста в окне, 0-не печатать</text:p>
      <text:p text:style-name="P83"><text:tab/>3 -</text:p>
      <text:p text:style-name="P83"><text:tab/>2 -</text:p>
      <text:p text:style-name="P83"><text:tab/>1 -</text:p>
      <text:p text:style-name="P83"><text:tab/>0 - </text:p>
      <text:p text:style-name="P83">+07 <text:span text:style-name="T4">(byte) </text:span>- <text:span text:style-name="T4">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83">+08 <text:span text:style-name="T4">(word)</text:span> номер пункта в окне или адрес хранения номера пункта в меню</text:p>
      <text:p text:style-name="P83">+<text:span text:style-name="T4">0A (word) </text:span>количество пунктов в меню</text:p>
      <text:p text:style-name="P83">+0<text:span text:style-name="T4">C (word) </text:span>адрес нахождения текста для печати в этом окне</text:p>
      <text:p text:style-name="P83">+0<text:span text:style-name="T4">E (word) </text:span>адрес нахождения списка адресов в соответствии для вызова</text:p>
      <text:p text:style-name="P83">+<text:span text:style-name="T4">10 (word) </text:span>адрес списка активных зон для мыши</text:p>
      <text:p text:style-name="P83">+12 (<text:span text:style-name="T4">word</text:span>) адрес списка горячих клавиш</text:p>
      <text:p text:style-name="P83"/>
      <text:p text:style-name="P83">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83">Список активных зон для мыши состоит из 6 байтных значений:</text:p>
      <text:p text:style-name="P83"/>
      <text:p text:style-name="P83">+0 - на данный момент зарезервировано</text:p>
      <text:p text:style-name="P83">+1 - <text:span text:style-name="T4">X </text:span>коодината</text:p>
      <text:p text:style-name="P83">+2 - <text:span text:style-name="T4">Y </text:span>координата</text:p>
      <text:p text:style-name="P83">+3 - <text:span text:style-name="T4">V </text:span>высота</text:p>
      <text:p text:style-name="P83">+4 - <text:span text:style-name="T4">H </text:span>ширина</text:p>
      <text:p text:style-name="P83">+5 - <text:span text:style-name="T4">K </text:span>код горячей клавиши</text:p>
      <text:h text:style-name="P15"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83">При печати текста на экране можно использовать некоторые управляющие коды. При печати на стандартном <text:span text:style-name="T4">ZX </text:span>экране знакоместом считается символ размеров 6х8, в режиме текстмода по знакоместно.</text:p>
      <text:p text:style-name="P83"/>
      <text:p text:style-name="P83">Код 1 - установка позиции печати в окне в исходную позицию. Для <text:span text:style-name="T4">ZX </text:span>экрана считается от позиции левого верхнего угла окна по формуле <text:span text:style-name="T4">X*8+1, Y*8 (</text:span>по горизонтали с точностью до точки, по вертикали с точностью до знакоряда)<text:span text:style-name="T4">. </text:span>Для текстового экрана по формуле <text:span text:style-name="T4">X+1, Y </text:span>(по знакоместно)<text:span text:style-name="T4">. </text:span></text:p>
      <text:p text:style-name="P83">Код 3 - при печати текста на стандартном <text:span text:style-name="T4">ZX </text:span>экране центрирует печатаемую строку по ширине окна. Выравнивание производится для символов с кодом <text:span text:style-name="T4">0x20...0xFF. </text:span>Код менее <text:span text:style-name="T4">0x20 </text:span>считается концом <text:soft-page-break/>выравниваемой строки. При печати на экране текстового режима код 3 игнорируется, центрирование строки не производится.</text:p>
      <text:p text:style-name="P83">Код 9,<text:span text:style-name="T4">x</text:span> - табулятор, <text:span text:style-name="T4">x</text:span>-количество знакомест.</text:p>
      <text:p text:style-name="P83">Код 0<text:span text:style-name="T4">x0D </text:span>- перевод печати на новую строку. Для <text:span text:style-name="T4">ZX </text:span>экрана новая строка начинается с левого края окна +1 пиксель, для текстового экрана левый край окна +1 знакоместо.</text:p>
      <text:p text:style-name="P83">Код 0<text:span text:style-name="T4">x16,y,x -</text:span> принудительная установка позиции печати. Для <text:span text:style-name="T4">ZX </text:span>экрана позиция печать задается в пикселях, для текстового экрана в знакоместах.</text:p>
      <text:p text:style-name="P135">Код 0x17,c - указание цвета при печати. Если с=0xFF печать производится без изменения цвета печатаемой позиции. </text:p>
      <text:h text:style-name="P9" text:outline-level="1"><text:bookmark-start text:name="История версий EVO Reset Service"/><text:bookmark-start text:name="__RefHeading__7561_2044125182"/><text:span text:style-name="T3">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136"/>
      <text:p text:style-name="P137">07.01.2026</text:p>
      <text:p text:style-name="P137">- <text:span text:style-name="T3">еще одно исправление загрузки </text:span>HOBETA <text:span text:style-name="T3">файлов, размер загружаемого файла берется из описателя файла вместо </text:span>HOBETA <text:span text:style-name="T3">заголовка.</text:span></text:p>
      <text:p text:style-name="P138"/>
      <text:p text:style-name="P138">05.01.2026 Версия<text:span text:style-name="T3"> 0.60.04</text:span></text:p>
      <text:p text:style-name="P139">- исправлена загрузка <text:span text:style-name="T4">HOBETA </text:span>файлов.</text:p>
      <text:p text:style-name="P140"/>
      <text:p text:style-name="P140">21.08.2025 <text:span text:style-name="T3">Версия 0.60.03</text:span></text:p>
      <text:p text:style-name="P141">- исправлена обработка файла <text:span text:style-name="T4">IMAGE.MNT, </text:span>сектор файла загружался неправильно.</text:p>
      <text:p text:style-name="P142"/>
      <text:p text:style-name="P142">23.03.2025 <text:span text:style-name="T3">Версия 0.60.02</text:span></text:p>
      <text:p text:style-name="P143">- исправлена неполная загрузка образа в <text:span text:style-name="T4">NMI File Bro</text:span><text:span text:style-name="T125">w</text:span><text:span text:style-name="T4">ser.</text:span></text:p>
      <text:p text:style-name="P144"/>
      <text:p text:style-name="P144">27.02.2025 <text:span text:style-name="T3">Версия 0.60.01</text:span></text:p>
      <text:p text:style-name="P145">- исправлена проверка расширений на <text:span text:style-name="T4">FAT </text:span>при поиске файлов.</text:p>
      <text:p text:style-name="P146"/>
      <text:p text:style-name="P146">16.02.2025 Версия 0.60</text:p>
      <text:p text:style-name="P146">- <text:span text:style-name="T62">в меню по </text:span><text:span text:style-name="T126">NMI </text:span><text:span text:style-name="T62">добавлен </text:span><text:span text:style-name="T126">File browser.</text:span></text:p>
      <text:p text:style-name="P147"/>
      <text:p text:style-name="P147">12.02.2024 <text:span text:style-name="T3">Версия 0.59.13</text:span></text:p>
      <text:p text:style-name="P147"><text:span text:style-name="T3">- </text:span><text:span text:style-name="T127">на экран </text:span><text:span text:style-name="T128">Magic Service </text:span><text:span text:style-name="T127">добавлено отображение портов ВГшки, адрес бряка и текущую частоту процессора.</text:span></text:p>
      <text:p text:style-name="P147"><text:span text:style-name="T3">- </text:span><text:span text:style-name="T129">переделана задержка детекта </text:span><text:span text:style-name="T130">HDD </text:span><text:span text:style-name="T129">для срабатывания только после включения.</text:span></text:p>
      <text:p text:style-name="P147"><text:span text:style-name="T3">- убран детект </text:span>SLAVE HDD.</text:p>
      <text:p text:style-name="P148"><text:span text:style-name="T131"/></text:p>
      <text:p text:style-name="P148"><text:span text:style-name="T131">08.03</text:span>.2023 <text:span text:style-name="T3">Версия </text:span><text:span text:style-name="T132">0.59.1</text:span><text:span text:style-name="T133">2</text:span></text:p>
      <text:p text:style-name="P149"><text:span text:style-name="T134">- </text:span>при заливке custom-rom, в чипы с блоками не равными 64 килобайтам, не подается команда <text:tab/><text:tab/>стирания </text:p>
      <text:p text:style-name="P148"/>
      <text:p text:style-name="P150">2<text:span text:style-name="T132">4</text:span>.02.2023 <text:span text:style-name="T3">Версия </text:span><text:span text:style-name="T132">0.59.11</text:span></text:p>
      <text:p text:style-name="P150">- <text:span text:style-name="T135">код флешера передвинут по адресам выше </text:span><text:span text:style-name="T132">0x8000.</text:span></text:p>
      <text:p text:style-name="P150">- <text:span text:style-name="T135">при размере </text:span><text:span text:style-name="T132">TRD </text:span><text:span text:style-name="T135">образа больше или меньше стандартны</text:span><text:span text:style-name="T136">x</text:span><text:span text:style-name="T135"> 640к загрузка в рамдиск без запроса.</text:span></text:p>
      <text:p text:style-name="P150">- <text:span text:style-name="T3">добавлен пункт демонтирования всех смонтированных образов.</text:span></text:p>
      <text:p text:style-name="P151"/>
      <text:p text:style-name="P151">16.<text:span text:style-name="T3">01.2023 Версия 0.59.10</text:span></text:p>
      <text:p text:style-name="P151">- <text:span text:style-name="T3">поправлена запись в драйвере </text:span>HDD Nemo <text:span text:style-name="T3">аналогично чтения для внутреннего/внешнего вызова</text:span>.</text:p>
      <text:p text:style-name="P151">- <text:span text:style-name="T3">исправлена ошибка в драйвере </text:span>HDD Nemo.</text:p>
      <text:p text:style-name="P152"/>
      <text:p text:style-name="P152">26.12.2022 <text:span text:style-name="T3">Версия 0.59.09</text:span></text:p>
      <text:p text:style-name="P152">- <text:span text:style-name="T3">исправлена работа </text:span>ATM CP/M.</text:p>
      <text:p text:style-name="P153"/>
      <text:p text:style-name="P153">21.12.2022 <text:span text:style-name="T3">Версия 0.59.08</text:span></text:p>
      <text:p text:style-name="P153">- <text:span text:style-name="T3">поправлен драйвер </text:span>SD <text:span text:style-name="T3">карты для запуска хобет.</text:span></text:p>
      <text:p text:style-name="P154"/>
      <text:p text:style-name="P154">13.11.2022 <text:span text:style-name="T3">Версия 0.59.07</text:span></text:p>
      <text:p text:style-name="P154">- <text:span text:style-name="T3">при входе в </text:span>NMI <text:span text:style-name="T3">сделано глушение двух </text:span>AY <text:span text:style-name="T3">без сохранения/восстановления регистров.</text:span></text:p>
      <text:p text:style-name="P154">- <text:span text:style-name="T3">убраны </text:span>ifdef <text:span text:style-name="T3">поддержки резидента </text:span>Honey Comander.</text:p>
      <text:p text:style-name="P155"/>
      <text:p text:style-name="P155">24.10.2022 <text:span text:style-name="T3">Версия 0.59.06</text:span></text:p>
      <text:p text:style-name="P155">- <text:span text:style-name="T3">сделано сохранение/восстановление перехода на обработчик </text:span>NMI.</text:p>
      <text:p text:style-name="P156"><text:soft-page-break/></text:p>
      <text:p text:style-name="P156"><text:span text:style-name="T137">19</text:span>.<text:span text:style-name="T137">1</text:span>0.2022 <text:span text:style-name="T3">Версия </text:span><text:span text:style-name="T138">0.59.05</text:span></text:p>
      <text:p text:style-name="P156">- <text:span text:style-name="T3">добавлено озвучивание </text:span><text:span text:style-name="T139">любых</text:span><text:span text:style-name="T3"> нажатий, если включено в </text:span>Setup.</text:p>
      <text:p text:style-name="P157"/>
      <text:p text:style-name="P157">13.10.2022 <text:span text:style-name="T3">Версия 0.59.04</text:span></text:p>
      <text:p text:style-name="P157">- <text:span text:style-name="T3">исправлено определения типа </text:span>FAT <text:span text:style-name="T3">при отсутствии <text:s/></text:span>MBR.</text:p>
      <text:p text:style-name="P158"/>
      <text:p text:style-name="P158">08.10.2022 <text:span text:style-name="T3">Версия 0.59.03</text:span></text:p>
      <text:p text:style-name="P158">- <text:span text:style-name="T140">в качестве эксперимента добавлено копирование </text:span><text:span text:style-name="T141">TRD </text:span><text:span text:style-name="T140">на произвольный диск, </text:span><text:span text:style-name="T142">SCL</text:span><text:span text:style-name="T143"> и</text:span><text:span text:style-name="T142"> FDI </text:span><text:span text:style-name="T143">пока не копируется</text:span><text:span text:style-name="T140">.</text:span></text:p>
      <text:p text:style-name="P158"><text:span text:style-name="T140">- </text:span><text:span text:style-name="T144">возвращен </text:span><text:span text:style-name="T145">zxevo.rom c EVO-DOS </text:span><text:span text:style-name="T144">и его сборка</text:span><text:span text:style-name="T145">.</text:span></text:p>
      <text:p text:style-name="P158"><text:span text:style-name="T140">- </text:span><text:span text:style-name="T144">временно удален из свн </text:span><text:span text:style-name="T145">zxevo_fe.rom </text:span><text:span text:style-name="T144">(на реконструкцию).</text:span></text:p>
      <text:p text:style-name="P159"/>
      <text:p text:style-name="P160">20.07.2022 <text:span text:style-name="T3">Версия 0.59.02</text:span></text:p>
      <text:p text:style-name="P160">- <text:span text:style-name="T3">исправлено не правильный возврат типа </text:span>FAT <text:span text:style-name="T3">после инициализации переменных раздела.</text:span></text:p>
      <text:p text:style-name="P160">- <text:span text:style-name="T3">исправлено не выставление типа </text:span>FAT <text:span text:style-name="T3">при отсутствии </text:span>MBR<text:span text:style-name="T3">.</text:span></text:p>
      <text:p text:style-name="P160"/>
      <text:p text:style-name="P159">15.06.2022 <text:span text:style-name="T3">Версия 0.59.01</text:span></text:p>
      <text:p text:style-name="P159">- <text:span text:style-name="T3">исправлено вычисление смещений областей на </text:span>FAT <text:span text:style-name="T3">при одной </text:span>FAT <text:span text:style-name="T3">таблице.</text:span></text:p>
      <text:p text:style-name="P159">- <text:span text:style-name="T3">исправлено вычисление смещения первой </text:span>FAT <text:span text:style-name="T3">таблицы.</text:span></text:p>
      <text:p text:style-name="P159">- <text:span text:style-name="T3">исправлен адрес порта чтения данных для </text:span>SMUC <text:span text:style-name="T3">контроллера для мини загрузчика.</text:span></text:p>
      <text:p text:style-name="P159"/>
      <text:p text:style-name="P161">15.01.2022 Версия 0.5<text:span text:style-name="T146">9</text:span></text:p>
      <text:p text:style-name="P161">- <text:span text:style-name="T147">удалена из сборки </text:span><text:span text:style-name="T148">zxevo.rom </text:span><text:span text:style-name="T147">и сам файл, теперь собирается только</text:span><text:span text:style-name="T148"> zxevo_fe.rom.</text:span></text:p>
      <text:p text:style-name="P161"><text:span text:style-name="T148">- </text:span><text:span text:style-name="T27">добавлено меню выбора при загрузке </text:span><text:span text:style-name="T149">SCL </text:span><text:span text:style-name="T27">образа.</text:span></text:p>
      <text:p text:style-name="P161"><text:span text:style-name="T148">- </text:span><text:span text:style-name="T147">при запуске из образа или при загрузке/монтировании изменено меню выбора загружать или монтировать.</text:span></text:p>
      <text:p text:style-name="P161">- исправлен запуск <text:span text:style-name="T4">Basic </text:span>файлов из образов с автомонтированием образов или с загрузкой в рамдиск.</text:p>
      <text:p text:style-name="P161">- добавлены функции для <text:span text:style-name="T4">RST 8 </text:span>по переключению реального или виртуального дисковода или обоих сразу.</text:p>
      <text:p text:style-name="P161">- исправлен расчет смещения расположения директории на <text:span text:style-name="T4">FAT.</text:span></text:p>
      <text:p text:style-name="P161"/>
      <text:p text:style-name="P162">22.11.2021 <text:span text:style-name="T3">Версия 0.58.20</text:span></text:p>
      <text:p text:style-name="P162"><text:span text:style-name="T3">- при не соответствии прошивки </text:span>ROM <text:span text:style-name="T150">zxevo_fe.rom</text:span> <text:span text:style-name="T3">и </text:span>FPGA <text:span text:style-name="T3">на экран выводится «</text:span>Incorrect FPGA zxevo_fw.bin<text:span text:style-name="T3">» на красном фоне.</text:span></text:p>
      <text:p text:style-name="P162"><text:span text:style-name="T3">- запрос версии через </text:span>RST 8: _VERSION <text:span text:style-name="T3">в «</text:span>A<text:span text:style-name="T3">» возвращает для какой сборки собран </text:span>ROM <text:span text:style-name="T3">файл и соответствие прошивке </text:span>FPGA.</text:p>
      <text:p text:style-name="P163"/>
      <text:p text:style-name="P163">06.11.2021 <text:span text:style-name="T3">Версия 0.58.19</text:span></text:p>
      <text:p text:style-name="P163"><text:span text:style-name="T3">- исправлено демонтирование образов дисков </text:span>TRD <text:span text:style-name="T3">при сбросе.</text:span></text:p>
      <text:p text:style-name="P136"/>
      <text:p text:style-name="P164"><text:span text:style-name="T151">0</text:span><text:span text:style-name="T152">1</text:span><text:span text:style-name="T153">.0</text:span><text:span text:style-name="T152">8</text:span><text:span text:style-name="T153">.2021 </text:span><text:span text:style-name="T154">Версия </text:span><text:span text:style-name="T155">0.58.18</text:span></text:p>
      <text:p text:style-name="P164"><text:span text:style-name="T154">- </text:span><text:span text:style-name="T155">добавлено сохранение/восстановление порта виртуальных дисководов для </text:span><text:span text:style-name="T152">RST 8, NMI.</text:span></text:p>
      <text:p text:style-name="P164"><text:span text:style-name="T154">- переписана работа с </text:span><text:span text:style-name="T153">FAT.</text:span></text:p>
      <text:p text:style-name="P164"><text:span text:style-name="T153">- </text:span><text:span text:style-name="T154">поправлены запускалки форматов </text:span><text:span text:style-name="T153">Hobeta, SNA, SPG.</text:span></text:p>
      <text:p text:style-name="P165"/>
      <text:p text:style-name="P166"><text:span text:style-name="T151">2</text:span><text:span text:style-name="T156">6</text:span><text:span text:style-name="T153">.0</text:span><text:span text:style-name="T151">5</text:span><text:span text:style-name="T153">.2021 </text:span><text:span text:style-name="T154">Версия 0.58.17</text:span></text:p>
      <text:p text:style-name="P166"><text:span text:style-name="T154">- </text:span><text:span text:style-name="T157">изменено дефолтное значение турборежима </text:span><text:span text:style-name="T156">на 3.5 МГц</text:span><text:span text:style-name="T157"> при сбросе </text:span><text:span text:style-name="T158">CMOS</text:span><text:span text:style-name="T157">.</text:span></text:p>
      <text:p text:style-name="P166"><text:span text:style-name="T154">- в связи с поддержкой </text:span><text:span text:style-name="T153">LBA48 </text:span><text:span text:style-name="T159">(</text:span><text:span text:style-name="T160">пока не добавлена)</text:span><text:span text:style-name="T153"> </text:span><text:span text:style-name="T154">добавлена функция установки номера сектора для чтения/записи.</text:span></text:p>
      <text:p text:style-name="P166"><text:span text:style-name="T154">- </text:span><text:span text:style-name="T160">из теста </text:span><text:span text:style-name="T159">HDD </text:span><text:span text:style-name="T160">убран показ </text:span><text:span text:style-name="T159">CHS </text:span><text:span text:style-name="T160">параметров.</text:span></text:p>
      <text:p text:style-name="P167"/>
      <text:p text:style-name="P168"><text:span text:style-name="T161">25</text:span><text:span text:style-name="T162">.0</text:span><text:span text:style-name="T161">9</text:span><text:span text:style-name="T162">.2020 </text:span><text:span text:style-name="T163">Версия 0.58.16</text:span></text:p>
      <text:p text:style-name="P168"><text:span text:style-name="T163">- при отсутствии </text:span><text:span text:style-name="T161">MBR </text:span><text:span text:style-name="T163">неправильно определялся тип </text:span><text:span text:style-name="T161">FAT.</text:span></text:p>
      <text:p text:style-name="P169"><text:soft-page-break/><text:span text:style-name="T164">- </text:span><text:span text:style-name="T165">исправлено </text:span><text:span text:style-name="T154">(в</text:span><text:span text:style-name="T164"> fat_boot,</text:span><text:span text:style-name="T154"> для запуска хобет и прочего) </text:span><text:span text:style-name="T165"><text:s/>неправильное высчитывание начала корневой директории </text:span><text:span text:style-name="T154">(для </text:span><text:span text:style-name="T164">FAT12/16)</text:span><text:span text:style-name="T165">, не учитывалось количество </text:span><text:span text:style-name="T166">FAT </text:span><text:span text:style-name="T165">таблиц.</text:span></text:p>
      <text:p text:style-name="P170"/>
      <text:p text:style-name="P171"><text:span text:style-name="T167">0</text:span><text:span text:style-name="T168">3</text:span><text:span text:style-name="T164">.</text:span><text:span text:style-name="T154">03.2020 Версия 0.58.15 Исправления и переделки.</text:span></text:p>
      <text:p text:style-name="P171"><text:span text:style-name="T154">- исправлено неправильное высчитывание начала корневой директории </text:span><text:span text:style-name="T169">(для </text:span><text:span text:style-name="T170">FAT12/16)</text:span><text:span text:style-name="T154">, не учитывалось количество </text:span><text:span text:style-name="T164">FAT </text:span><text:span text:style-name="T154">таблиц.</text:span></text:p>
      <text:p text:style-name="P172">- <text:span text:style-name="T171">добавлена запускалка хобета файла с фиксированным именем</text:span><text:span text:style-name="T172"> “sd_boot.$C”</text:span><text:span text:style-name="T171"> с</text:span><text:span text:style-name="T172"> SD</text:span><text:span text:style-name="T171"> карты </text:span><text:span text:style-name="T173">из корневой директории карточки</text:span><text:span text:style-name="T171">. </text:span></text:p>
      <text:p text:style-name="P173"/>
      <text:p text:style-name="P174"><text:span text:style-name="T174">2</text:span><text:span text:style-name="T175">0</text:span><text:span text:style-name="T176">.08.2019 </text:span><text:span text:style-name="T177">Версия 0.58.14 Переделки</text:span></text:p>
      <text:p text:style-name="P174"><text:span text:style-name="T154">- в подменю </text:span><text:span text:style-name="T164">Setup </text:span><text:span text:style-name="T154">добавлен пункт «</text:span><text:span text:style-name="T164">Kill rezident</text:span><text:span text:style-name="T154">» для порчи резидента и обеспечения его одноразового запуска.</text:span></text:p>
      <text:p text:style-name="P175"><text:span text:style-name="T178">- </text:span><text:span text:style-name="T175">в подменю Setup в </text:span><text:span text:style-name="T179">меню</text:span><text:span text:style-name="T175"> NMI также добавлен пункт «Kill rezident».</text:span></text:p>
      <text:p text:style-name="P176"><text:span text:style-name="T154">- на комбинацию сброса</text:span><text:span text:style-name="T164"> </text:span><text:span text:style-name="T180">0+F12</text:span><text:span text:style-name="T164"> </text:span><text:span text:style-name="T154">добавлено принудительно отключение резидента с сохранением выключенного состояния в </text:span><text:span text:style-name="T164">CMOS.</text:span></text:p>
      <text:p text:style-name="P176"><text:span text:style-name="T164">- </text:span><text:span text:style-name="T178">переделана функция </text:span><text:span text:style-name="T181">RST 8 _SET_MODE. </text:span><text:span text:style-name="T178">Устанавливаемые режимы сделаны временными (не сохраняются в </text:span><text:span text:style-name="T181">CMOS</text:span><text:span text:style-name="T178">) и действуют до сброса</text:span><text:span text:style-name="T181">.</text:span></text:p>
      <text:p text:style-name="P176"><text:span text:style-name="T181">- </text:span><text:span text:style-name="T182">обновлен файл </text:span><text:span text:style-name="T183">define.a80.</text:span></text:p>
      <text:p text:style-name="P176"><text:span text:style-name="T181">- </text:span><text:span text:style-name="T184">в дерево исходников добавлена папка «</text:span><text:span text:style-name="T185">C</text:span><text:span text:style-name="T184">» с заголовочным файлом</text:span><text:span text:style-name="T185"> ers.h </text:span><text:span text:style-name="T184">для сборки проектов на Си.</text:span></text:p>
      <text:p text:style-name="P177"/>
      <text:p text:style-name="P178"><text:span text:style-name="T174">1</text:span>4<text:span text:style-name="T174">.08.2019</text:span><text:span text:style-name="T186"> </text:span><text:span text:style-name="T174">Версия 0.58.13 Переделки</text:span></text:p>
      <text:p text:style-name="P179"><text:span text:style-name="T3">- сделана принудительная установка частоты 7.0Мгц для </text:span>NMI service, <text:span text:style-name="T187">иначе неправильно вычитывался текущий установленный шрифт.</text:span></text:p>
      <text:p text:style-name="P179"><text:span text:style-name="T187">- </text:span><text:span text:style-name="T188">добавлен пункт меню в подменю </text:span><text:span text:style-name="T189">Setup </text:span><text:span text:style-name="T188">для включения/выключения резидента.</text:span></text:p>
      <text:p text:style-name="P180"/>
      <text:p text:style-name="P180">05.08.2019 <text:span text:style-name="T3">Версия 0.58.12 Переделки</text:span></text:p>
      <text:p text:style-name="P181">- переделана работа по переключению дисков.</text:p>
      <text:p text:style-name="P180"><text:span text:style-name="T3">- обновлен </text:span>define.a80.</text:p>
      <text:p text:style-name="P136"/>
      <text:p text:style-name="P182">29.07.2019 <text:span text:style-name="T3">Версия 0.58.11 Исправление</text:span></text:p>
      <text:p text:style-name="P183">- исправлено отображение для примонтированного диска в главном меню.</text:p>
      <text:p text:style-name="P136"/>
      <text:p text:style-name="P184">28.07.2019 Версия 0.58.10 Исправления</text:p>
      <text:p text:style-name="P184">- загрузка <text:span text:style-name="T4">SCL</text:span> и <text:span text:style-name="T4">TRD </text:span>переключены на загрузку через функцию <text:span text:style-name="T4">RST 8.</text:span></text:p>
      <text:p text:style-name="P184"><text:span text:style-name="T4">- </text:span>удалена функция _<text:span text:style-name="T4">STOR_NAMELOAD </text:span>за ненадобностью. На ее месте пока заглушка которая ничего не делает.</text:p>
      <text:p text:style-name="P184">- <text:span text:style-name="T190">имя</text:span> файла загруженного в рамдиск <text:span text:style-name="T190">теперь устанавливается внутри функции </text:span><text:span text:style-name="T191">RST 8.</text:span></text:p>
      <text:p text:style-name="P184"><text:span text:style-name="T191">- </text:span><text:span text:style-name="T192">добавлен возврат номера версии прошивки в бинарном виде.</text:span></text:p>
      <text:p text:style-name="P136"/>
      <text:p text:style-name="P185">14.07.2019 Версия 0.5<text:span text:style-name="T193">8</text:span>.09 Мелкие переделки</text:p>
      <text:p text:style-name="P185">- переделан возврат битов эмуляции дисков из функции <text:span text:style-name="T4">RST 8.</text:span></text:p>
      <text:p text:style-name="P186"/>
      <text:p text:style-name="P186">10.07.2019 Версия 0.5<text:span text:style-name="T193">8</text:span>.08 Исправления и мелкие переделки</text:p>
      <text:p text:style-name="P136">- <text:span text:style-name="T194">переделано внутренняя нумерация девайсов.</text:span></text:p>
      <text:p text:style-name="P136">- <text:span text:style-name="T194">добавлен драйвер </text:span><text:span text:style-name="T195">USB Flash. </text:span><text:span text:style-name="T196">Пока не проверен <text:s/>и не подкючен.</text:span></text:p>
      <text:p text:style-name="P187"><text:span text:style-name="T3">- добавлена возможность установки произвольного шрифта вызовом </text:span>RST 8.</text:p>
      <text:p text:style-name="P187">- <text:span text:style-name="T197">исправлена ошибка монтирования образов.</text:span></text:p>
      <text:p text:style-name="P187"/>
      <text:p text:style-name="P187">06.05.2019 <text:span text:style-name="T3">Версия 0.58.07 Исправление</text:span></text:p>
      <text:p text:style-name="P187"><text:span text:style-name="T3">- исправлена порча данных в таблице секторов/дорожек рамдиска при загрузке </text:span>TAP.</text:p>
      <text:p text:style-name="P187"/>
      <text:p text:style-name="P187">03.05.2019 <text:span text:style-name="T3">Версия 0.58.06 Исправление</text:span></text:p>
      <text:p text:style-name="P187"><text:span text:style-name="T3">- исправлена проблема при наведении мыши в окне файлового менеджера для </text:span>FAT <text:span text:style-name="T3">при количестве файлов менее высоты окна.</text:span></text:p>
      <text:p text:style-name="P187"><text:soft-page-break/><text:span text:style-name="T3">- исправлено загрузка при выборе обрезанного </text:span>TRD <text:span text:style-name="T3">образа, теперь сразу загружается в рамдиск без возможности монтирования.</text:span></text:p>
      <text:p text:style-name="P187"><text:span text:style-name="T3">- поправлен порядок расширений в файла</text:span> define.a80. </text:p>
      <text:p text:style-name="P187"/>
      <text:p text:style-name="P187">02.04.2019 <text:span text:style-name="T3">Версия 0.58.05 Исправление</text:span></text:p>
      <text:p text:style-name="P187"><text:span text:style-name="T3">- исправлен запуск </text:span>Basic <text:span text:style-name="T3">файлов из </text:span>TRD <text:span text:style-name="T3">образа из режима просмотра.</text:span></text:p>
      <text:p text:style-name="P187"/>
      <text:p text:style-name="P187">17.<text:span text:style-name="T3">03.2019 Версия 0.58.04. Мелкие переделки</text:span></text:p>
      <text:p text:style-name="P187"><text:span text:style-name="T3">- для </text:span>RST <text:span text:style-name="T3">8 сделано определения в каком маппере произошел вызов.</text:span></text:p>
      <text:p text:style-name="P187"><text:span text:style-name="T3">- в главном меню удалил вызов сброса дисководов через </text:span>0x3D13.</text:p>
      <text:p text:style-name="P187"/>
      <text:p text:style-name="P187">30.01.2019 <text:span text:style-name="T3">Версия 0.58.03 Мелкие переделки</text:span></text:p>
      <text:p text:style-name="P136">- вычистил некоторые излишества.</text:p>
      <text:p text:style-name="P136">- перенес упакованный блок главного меню в другую страницу.</text:p>
      <text:p text:style-name="P187"/>
      <text:p text:style-name="P187">24.11.2018 <text:span text:style-name="T3">Версия 0.58.02 Изменения</text:span></text:p>
      <text:p text:style-name="P187"><text:span text:style-name="T3">- доделал полностью все что связано с резидентом </text:span>Honey Comander.</text:p>
      <text:p text:style-name="P187"><text:span text:style-name="T3">- в связи с использованными способами переключения страниц в резиденте </text:span>Honey Comander<text:span text:style-name="T3">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187"/>
      <text:p text:style-name="P187">16.11.2018 <text:span text:style-name="T3">Версия 0.58.01 Исправление</text:span></text:p>
      <text:p text:style-name="P187"><text:span text:style-name="T3">- исправлен очень старый код установки турбо режимов в при сбросе с </text:span>Shift <text:span text:style-name="T3">клавишами.</text:span></text:p>
      <text:p text:style-name="P187"/>
      <text:p text:style-name="P187">11.11.2018 <text:span text:style-name="T3">Версия 0.58 Изменения</text:span></text:p>
      <text:p text:style-name="P187"><text:span text:style-name="T3">- добавлена отключаемая в настройках проверка наличия резидента для </text:span>Honey Commander.</text:p>
      <text:p text:style-name="P187">- <text:span text:style-name="T3">мелкие исправления в драйвере </text:span>IDE <text:span text:style-name="T3">устройств связанные с чтением сектора идентификации. </text:span></text:p>
      <text:p text:style-name="P187">- <text:span text:style-name="T3">добавлен показ подключенных </text:span>IDE <text:span text:style-name="T3">устройств.</text:span></text:p>
      <text:p text:style-name="P187"/>
      <text:p text:style-name="P187">14.10.2018 <text:span text:style-name="T3">Версия </text:span>0.57h Исправление</text:p>
      <text:p text:style-name="P187"><text:span text:style-name="T3">- исправление в новом драйвере</text:span> <text:span text:style-name="T3">вместо </text:span>Slave HDD <text:span text:style-name="T3">определялся опять </text:span>Master.</text:p>
      <text:p text:style-name="P187">- <text:span text:style-name="T3">исправлено правильное определения </text:span>CD-ROM.</text:p>
      <text:p text:style-name="P187"/>
      <text:p text:style-name="P187">13.10.2018 <text:span text:style-name="T3">Версия 0.57</text:span>g <text:span text:style-name="T3">Изменение</text:span></text:p>
      <text:p text:style-name="P187"><text:span text:style-name="T3">- заменен драйвер </text:span>HDD.</text:p>
      <text:p text:style-name="P187"/>
      <text:p text:style-name="P187">29.04.2018 <text:span text:style-name="T3">Версия </text:span>0.57f <text:span text:style-name="T3">Исправление</text:span></text:p>
      <text:p text:style-name="P187"><text:span text:style-name="T3">- исправлено не отображение имени </text:span>FDI <text:span text:style-name="T3">образа загруженного в рамдиск.</text:span></text:p>
      <text:p text:style-name="P187"/>
      <text:p text:style-name="P187">05.09.2017 <text:span text:style-name="T3">Версия 0.57</text:span>e <text:span text:style-name="T3">Изменения</text:span></text:p>
      <text:p text:style-name="P136">- удалено использование портов-ячеек.</text:p>
      <text:p text:style-name="P187"/>
      <text:p text:style-name="P187">27.08.2017 <text:span text:style-name="T3">Версия 0.57</text:span>d <text:span text:style-name="T3">Изменения</text:span></text:p>
      <text:p text:style-name="P136">- добавлено отображение имени образа загруженного в рамдиск.</text:p>
      <text:p text:style-name="P187"><text:span text:style-name="T3">- на </text:span>NMI <text:span text:style-name="T3">экран добавлено отображение режима (разрешены/запрещены) и типа прерываний (</text:span>IM1/2)<text:span text:style-name="T3">.</text:span></text:p>
      <text:p text:style-name="P187"/>
      <text:p text:style-name="P187">07.01.2017 <text:span text:style-name="T3">Версия 0.57с Исправления</text:span></text:p>
      <text:p text:style-name="P136">- исправлено зависание при созданном но не отформатированном разделе.</text:p>
      <text:p text:style-name="P187"><text:span text:style-name="T3">- исправлен вылет в </text:span>Basic <text:span text:style-name="T3">при отсутствии дискеты.</text:span></text:p>
      <text:p text:style-name="P136">- переименованы некоторые переменные и внесены соответствующие изменения во многих текстовых файлах</text:p>
      <text:p text:style-name="P187"><text:span text:style-name="T3">- переписаны многие </text:span>bat <text:span text:style-name="T3">файлы.</text:span></text:p>
      <text:p text:style-name="P136">- крупные изменения пока отложены.</text:p>
      <text:p text:style-name="P187"/>
      <text:p text:style-name="P187"><text:soft-page-break/>08.05.2016 <text:span text:style-name="T3">Версия 0.57</text:span>b<text:span text:style-name="T3"> Изменения</text:span></text:p>
      <text:p text:style-name="P187"><text:span text:style-name="T3">- добавлен запуск </text:span>SNA <text:span text:style-name="T3">файлов</text:span></text:p>
      <text:p text:style-name="P136"/>
      <text:p text:style-name="P187">19.03.2016 <text:span text:style-name="T3">Версия 0.57</text:span>a<text:span text:style-name="T3"> Исправления</text:span></text:p>
      <text:p text:style-name="P136">- исправлена загрузка TAP файлов</text:p>
      <text:p text:style-name="P187"/>
      <text:p text:style-name="P136">08.02.2016 Версия 0<text:span text:style-name="T4">.5</text:span>7<text:span text:style-name="T4"> </text:span>Исправления и изменения</text:p>
      <text:p text:style-name="P136">- <text:span text:style-name="T4">DimkaM </text:span>переделал поддержку рамдиска для <text:span text:style-name="T4">ATM CP/M </text:span>режима для возможности загрузки образов из <text:span text:style-name="T4">File browser </text:span>в главного меню <text:span text:style-name="T4">ERS.</text:span></text:p>
      <text:p text:style-name="P136"><text:span text:style-name="T4">- </text:span>исправлена порча альтернативного регистра <text:span text:style-name="T4">AF </text:span>при загрузке с диска<text:span text:style-name="T4"> </text:span>из-за чего не работал «Черный ворон» и возможно еще какие-то программы.</text:p>
      <text:p text:style-name="P136">- добавлена функция для <text:span text:style-name="T4">RST 8 </text:span>установки шрифта (пока только для шрифтов из <text:span text:style-name="T4">ROM).</text:span></text:p>
      <text:p text:style-name="P136"><text:span text:style-name="T4">- </text:span>небольшое изменение в описании битов по отображению текущего шрифта.</text:p>
      <text:p text:style-name="P187"/>
      <text:p text:style-name="P187">13.01.2015 <text:span text:style-name="T3">Версия 0.</text:span>56c <text:span text:style-name="T3">Исправления и изменения</text:span></text:p>
      <text:p text:style-name="P187"><text:span text:style-name="T3">- исправлена неправильная установка значений порта </text:span>7FFD<text:span text:style-name="T3"> при сбросе в </text:span>Basic 48.</text:p>
      <text:p text:style-name="P136">- добавлено отображения режимов развертки.</text:p>
      <text:p text:style-name="P187"><text:span text:style-name="T3">- добавлены непатченные </text:span>ROM <text:span text:style-name="T3">для работы с новыми развертками в режимах </text:span>Basic 48 <text:span text:style-name="T3">и </text:span>Basic 128.</text:p>
      <text:p text:style-name="P187"/>
      <text:p text:style-name="P187">03.12.2014 <text:span text:style-name="T3">Версия 0.</text:span>56b <text:span text:style-name="T3">Изменения</text:span></text:p>
      <text:p text:style-name="P187">- <text:span text:style-name="T3">из меню </text:span>Service <text:span text:style-name="T3">удалено форматирование рамдиска на 896К.</text:span></text:p>
      <text:p text:style-name="P187"/>
      <text:p text:style-name="P187">01.12.2014 <text:span text:style-name="T3">Версия 0.56</text:span>a <text:span text:style-name="T3">Изменения</text:span></text:p>
      <text:p text:style-name="P187"><text:span text:style-name="T3">- переделана работа с содержимым порта </text:span>0x7FFD <text:span text:style-name="T3">для </text:span>Magic <text:span text:style-name="T3">и </text:span>RST 8.</text:p>
      <text:p text:style-name="P187">- <text:span text:style-name="T3">перемещены некоторые участки кода.</text:span></text:p>
      <text:p text:style-name="P187"><text:span text:style-name="T3">- укорочен </text:span>bat <text:span text:style-name="T3">файл для сборки полной прошивки.</text:span></text:p>
      <text:p text:style-name="P187"/>
      <text:p text:style-name="P187">22.<text:span text:style-name="T3">11</text:span>.2014 <text:span text:style-name="T3">Версия 0.56</text:span> <text:span text:style-name="T3">Исправление</text:span></text:p>
      <text:p text:style-name="P187"><text:span text:style-name="T3">- исправлена ошибка </text:span>Hobeta <text:span text:style-name="T3">загрузчика, для некоторых файлов неправильно загружался последний сектора файла.</text:span></text:p>
      <text:p text:style-name="P136">- уменьшено на 2 проверки определение типа <text:span text:style-name="T4">FAT </text:span>при отсутствии <text:span text:style-name="T4">MBR, </text:span>не определялся <text:span text:style-name="T4">FAT12.</text:span></text:p>
      <text:p text:style-name="P136"><text:span text:style-name="T4">- </text:span>поправлена проверка и инит <text:span text:style-name="T4">CMOS </text:span>при каждом сбросе при ошибке <text:span text:style-name="T4">CRC.</text:span></text:p>
      <text:p text:style-name="P136"><text:span text:style-name="T4">- </text:span>исправлено восстановление сохраненного шрифта для текстмодного режима.</text:p>
      <text:p text:style-name="P136">- в меню <text:span text:style-name="T4">Setup </text:span>добавлен пункт включения/выключения автозапуска <text:span text:style-name="T4">TAP </text:span>файла после выбора в <text:span text:style-name="T4">File browser</text:span>.</text:p>
      <text:p text:style-name="P136">- пункт установки драйвера принтера перенесен с основного экрана в меню <text:span text:style-name="T4">Setup.</text:span></text:p>
      <text:p text:style-name="P136"><text:span text:style-name="T4">- </text:span>отключен <text:span text:style-name="T4">screen saver.</text:span></text:p>
      <text:p text:style-name="P136"><text:span text:style-name="T4">- </text:span>для файлов <text:span text:style-name="T4">TRD </text:span>в меню выбора монтировать или загружать в рамдиск пункт меню <text:span text:style-name="T4">Ramdisk </text:span>перемещен в первую позицию меню.</text:p>
      <text:p text:style-name="P136">- в меню <text:span text:style-name="T4">Setup </text:span>добавлен выбор задержки определения наличия <text:span text:style-name="T4">HDD </text:span>(от <text:span text:style-name="T4">0(</text:span>выключена) до 9 секунд).</text:p>
      <text:p text:style-name="P187"/>
      <text:p text:style-name="P187">17.07.2014 <text:span text:style-name="T3">Версия 0.55</text:span>f <text:span text:style-name="T3">Исправление</text:span></text:p>
      <text:p text:style-name="P187"><text:span text:style-name="T3">- исправлена ошибка зависания при входе в </text:span>Perfect commander.</text:p>
      <text:p text:style-name="P187"/>
      <text:p text:style-name="P187">16.07.2014 <text:span text:style-name="T3">Версия 0.5</text:span>5e <text:span text:style-name="T3">Исправления</text:span></text:p>
      <text:p text:style-name="P187"><text:span text:style-name="T3">- исправлена загрузка <text:s/>с винта (пункт </text:span>HDD boot).</text:p>
      <text:p text:style-name="P187"/>
      <text:p text:style-name="P187">19.05.2014 <text:span text:style-name="T3">Версия 0.55</text:span>d <text:span text:style-name="T3">Исправление</text:span></text:p>
      <text:p text:style-name="P187"><text:span text:style-name="T3">- исправление определения типа раздела при отсутствии </text:span>MBR.</text:p>
      <text:p text:style-name="P187"/>
      <text:p text:style-name="P187">18.05.2014 <text:span text:style-name="T3">Версия 0.55</text:span>c <text:span text:style-name="T3">Добавление</text:span></text:p>
      <text:p text:style-name="P136">- добавлена индикация текущего включенного видео режима.</text:p>
      <text:p text:style-name="P136">- выход из хранителя экрана добавлен опрос движения мыши, вращения колесика и факта нажатия и отпускания кнопок мыши.</text:p>
      <text:p text:style-name="P187"><text:soft-page-break/></text:p>
      <text:p text:style-name="P187">20.04.2014 <text:span text:style-name="T3">Версия 0.55</text:span>b <text:span text:style-name="T3">Исправление</text:span></text:p>
      <text:p text:style-name="P187"><text:span text:style-name="T3">- после переделки </text:span>RST 8 <text:span text:style-name="T3">функции не были синхронизированы переменные </text:span>fat_boot <text:span text:style-name="T3">загрузчика из-за чего при запуске </text:span>hobeta <text:span text:style-name="T3">и </text:span>spg <text:span text:style-name="T3">файлов происходил сброс.</text:span></text:p>
      <text:p text:style-name="P136"/>
      <text:p text:style-name="P187"><text:span text:style-name="T3">16.04.2014 Версия 0.55</text:span>a <text:span text:style-name="T3">Исправление</text:span></text:p>
      <text:p text:style-name="P187"><text:span text:style-name="T3">- вернул очистку 128К памяти по сбросу, а не по запуску файла. Проблема возникала при входе в </text:span>File browser <text:span text:style-name="T3">не в корневой директории и при выходе в предыдущую директории.</text:span></text:p>
      <text:p text:style-name="P187"><text:span text:style-name="T3">- добавлена очистка страницы озу переменных </text:span>ProfROM <text:span text:style-name="T3">по включению питания.</text:span></text:p>
      <text:p text:style-name="P136"/>
      <text:p text:style-name="P187"><text:span text:style-name="T3">08.04.2014</text:span> <text:span text:style-name="T3">Версия 0.55 Изменения и исправления</text:span></text:p>
      <text:p text:style-name="P187"><text:span text:style-name="T3">- исправлен просмотрщик </text:span>BMP <text:span text:style-name="T3">файлов.</text:span></text:p>
      <text:p text:style-name="P187"><text:span text:style-name="T3">- после просмотра </text:span>BMP <text:span text:style-name="T3">файла вместо выхода в основное меню сделан возврат в </text:span>File browser <text:span text:style-name="T3">для продолжения просмотра.</text:span></text:p>
      <text:p text:style-name="P187"><text:span text:style-name="T3">- сделана возможность просмотра <text:s/>содержимого </text:span>TRD <text:span text:style-name="T3">и</text:span> SCL <text:span text:style-name="T3">образов с возможностью запуска выбранного </text:span>Basic <text:span text:style-name="T3">файла.</text:span></text:p>
      <text:p text:style-name="P187"><text:span text:style-name="T3">- исправлена не установка перехватчика ошибок </text:span>DOS.</text:p>
      <text:p text:style-name="P187"/>
      <text:p text:style-name="P187">16.02.2014 <text:span text:style-name="T3">Версия 0.54</text:span>d <text:span text:style-name="T3">Косметические изменения</text:span></text:p>
      <text:p text:style-name="P187"><text:span text:style-name="T3">- убрал из просмотра </text:span>file browser <text:span text:style-name="T3">расширения </text:span>FNT.</text:p>
      <text:p text:style-name="P187"/>
      <text:p text:style-name="P187">11.02.2014 <text:span text:style-name="T3">Версия 0.54</text:span>c <text:span text:style-name="T3">Исправление</text:span></text:p>
      <text:p text:style-name="P187"><text:span text:style-name="T3">- по ошибке скомпилил с доработанным </text:span>file browser <text:s/><text:span text:style-name="T3">(но недоделанным) из-за чего оказалось сломан обновитель </text:span>ROM. <text:span text:style-name="T3">Перекомпилил со старой версией. </text:span></text:p>
      <text:p text:style-name="P187"/>
      <text:p text:style-name="P187">10.02.2014 <text:span text:style-name="T3">Версия 0.</text:span>54b<text:span text:style-name="T3"> Изменения и исправления.</text:span></text:p>
      <text:p text:style-name="P187"><text:span text:style-name="T3">- добавлен вызов подпрограммы сброса из </text:span>TR-DOS. </text:p>
      <text:p text:style-name="P187">- <text:span text:style-name="T3">в подменю </text:span>Service <text:span text:style-name="T3">добавлен загрузчик </text:span>IS-DOS <text:span text:style-name="T3">с винчестера из прошивки </text:span>KAY.</text:p>
      <text:p text:style-name="P187"/>
      <text:p text:style-name="P187">18.12.2013 <text:span text:style-name="T3">Версия 0.54</text:span>a <text:span text:style-name="T3">Исправления.</text:span></text:p>
      <text:p text:style-name="P187"><text:span text:style-name="T3">- исправлена ошибка когда </text:span>File browser <text:span text:style-name="T3">не видел файлы на карточках размером более 4</text:span>Gb.</text:p>
      <text:p text:style-name="P187">- <text:span text:style-name="T3">поправлена табличка символов для сортировки файлов.</text:span></text:p>
      <text:p text:style-name="P187"/>
      <text:p text:style-name="P187">15.12.2013 <text:span text:style-name="T3">Версия 0.54 Изменения и исправления.</text:span></text:p>
      <text:p text:style-name="P136">- исправлен сброс выбранного дисковода при сбросе.</text:p>
      <text:p text:style-name="P187"><text:span text:style-name="T3">- добавлен </text:span>ATM CP/M, <text:span text:style-name="T3">доступ через меню </text:span>Service.</text:p>
      <text:p text:style-name="P187">- TR-DOS 6.12E <text:span text:style-name="T3">входящий в состав </text:span>Gluk Reset Service <text:span text:style-name="T3">компилится на общих основаниях и получил доступ к рамдиску основной прошивки.</text:span></text:p>
      <text:p text:style-name="P187"/>
      <text:p text:style-name="P187">17.11.2013 <text:span text:style-name="T3">Версия 0.53</text:span>d <text:span text:style-name="T3">Изменение.</text:span></text:p>
      <text:p text:style-name="P187"><text:span text:style-name="T3">- изменены номера ячеек </text:span>CMOS <text:span text:style-name="T3">с настройками, теперь настройки </text:span>Gluk <text:span text:style-name="T3">и </text:span>EVO Reset Service <text:span text:style-name="T3">независимы.</text:span></text:p>
      <text:p text:style-name="P187"><text:span text:style-name="T3">- подпрограммы вызываемые через </text:span>RST 8 <text:span text:style-name="T3">работают на частоте 7 МГц.</text:span></text:p>
      <text:p text:style-name="P136">- переставлены местами пункты выбора реального и виртуального дисковода отображаемые слева от основного меню.</text:p>
      <text:p text:style-name="P187"/>
      <text:p text:style-name="P187">18.05.2013 <text:span text:style-name="T3">Версия 0.53</text:span>c <text:span text:style-name="T3">Исправление</text:span></text:p>
      <text:p text:style-name="P136">- исправлена ошибка неправильного монтирования образа при размере кластера 1 сектор.</text:p>
      <text:p text:style-name="P187"><text:span text:style-name="T3">- исправлена ошибка загрузчика </text:span>HDD boot.</text:p>
      <text:p text:style-name="P187">- <text:span text:style-name="T3">исправлена ошибка для </text:span>FAT12/16 <text:span text:style-name="T3">получения неправильного номера кластера.</text:span></text:p>
      <text:p text:style-name="P187">- <text:span text:style-name="T3">исправлена ошибка не сохранения порта </text:span>#EFF7 <text:span text:style-name="T3">при вхождении в </text:span>RST <text:span text:style-name="T3">8 и выбранном режиме памяти 48</text:span>K.</text:p>
      <text:p text:style-name="P187"/>
      <text:p text:style-name="P187">10.03.2013 <text:span text:style-name="T3">Версия 0.53</text:span>b <text:span text:style-name="T3">Исправление</text:span></text:p>
      <text:p text:style-name="P187"><text:soft-page-break/><text:span text:style-name="T3">- исправлены межстраничные вызовы после переезда некоторых процедур в другие страницы </text:span>ROM <text:span text:style-name="T3">после добавления </text:span>Perfect Commander.</text:p>
      <text:p text:style-name="P187"/>
      <text:p text:style-name="P187">26.02.2013 <text:span text:style-name="T3">Версия 0.53а Исправление</text:span></text:p>
      <text:p text:style-name="P187"><text:span text:style-name="T3">- восстановил работу </text:span>FAT/SPG <text:span text:style-name="T3">загрузчика.</text:span></text:p>
      <text:p text:style-name="P136"/>
      <text:p text:style-name="P187">25.02.2013 <text:span text:style-name="T3">Версия 0.53 Добавление</text:span></text:p>
      <text:p text:style-name="P187"><text:span text:style-name="T3">- в недра сервиса добавлен </text:span>Perfect Commander.</text:p>
      <text:p text:style-name="P187"/>
      <text:p text:style-name="P187">20.01.2013 <text:span text:style-name="T3">Версия 0.52</text:span>b <text:span text:style-name="T3">Исправление</text:span></text:p>
      <text:p text:style-name="P187"><text:span text:style-name="T3">- исправлена ошибка из-за которой при сбросе обнулялся регистр секунд в </text:span>CMOS<text:span text:style-name="T3">.</text:span></text:p>
      <text:p text:style-name="P187"><text:span text:style-name="T3">- добавлен просмотрщик </text:span>BMP <text:span text:style-name="T3">файлов формата 320х200 16 цветов.</text:span></text:p>
      <text:p text:style-name="P187"/>
      <text:p text:style-name="P187">26.12.2012 <text:span text:style-name="T3">Версия 0.52а<text:tab/>Исправление</text:span></text:p>
      <text:p text:style-name="P187">- <text:span text:style-name="T3">исправлена ошибка драйвера </text:span>NeoGS <text:span text:style-name="T3">из-за которой происходила порча некоторых ячеек при загрузке файлов при вызове через </text:span>RST 8.</text:p>
      <text:p text:style-name="P187"><text:span text:style-name="T3">- исправлена ошибка в драйверах для правильной загрузке файлов при вызове через </text:span>RST 8.</text:p>
      <text:p text:style-name="P187"/>
      <text:p text:style-name="P187">08.12.2012 <text:span text:style-name="T3">Версия 0.52 Исправление.</text:span></text:p>
      <text:p text:style-name="P187"><text:span text:style-name="T3">- сделал принудительно обнуление памяти при запуске программ с </text:span>TR-DOS <text:span text:style-name="T3">диска.</text:span></text:p>
      <text:p text:style-name="P187"/>
      <text:p text:style-name="P187">04.12.2012 <text:span text:style-name="T3">Версия 0.51</text:span>a <text:span text:style-name="T3">Исправление.</text:span></text:p>
      <text:p text:style-name="P187"><text:span text:style-name="T3">- исправлена блокировка при отсуствии </text:span>SD <text:span text:style-name="T3">карты на </text:span>NeoGS.</text:p>
      <text:p text:style-name="P136"/>
      <text:p text:style-name="P187"><text:span text:style-name="T3">03.12.2012</text:span> <text:span text:style-name="T3">Версия 0.51 Исправления и дополнения</text:span></text:p>
      <text:p text:style-name="P187"><text:span text:style-name="T3">- устранено зависание драйвера </text:span>NeoGS <text:span text:style-name="T3">при определении наличия </text:span>SD <text:span text:style-name="T3">карты из-за изменения настроек прерываний.</text:span></text:p>
      <text:p text:style-name="P136">- устранена невозможность выбрать файл для загрузки с ленты при отсутствии в корне директорий.</text:p>
      <text:p text:style-name="P136">- устранена проблема сброса/зависания при запуске <text:span text:style-name="T4">TAP </text:span>файлов при заблокированном режиме 48к.</text:p>
      <text:p text:style-name="P136">- сделано автоопределение наличия <text:span text:style-name="T4">SD </text:span>карт с возможностью отключения.</text:p>
      <text:p text:style-name="P136">- сделана выдача сообщение с блокировкой дальнейшей работы при обращении к примонтированному образу после удаления <text:span text:style-name="T4">SD </text:span>карты с которой был примонтирован образ.</text:p>
      <text:p text:style-name="P136">- сделан контроль наличия <text:span text:style-name="T4">SD </text:span>карт с выдачей сообщения и блокировкой дальнейшей работы.</text:p>
      <text:p text:style-name="P136">- переименован пункт <text:span text:style-name="T4">«W.Turbo Mode» </text:span>в <text:span text:style-name="T4">«W.CPU frequency».</text:span></text:p>
      <text:p text:style-name="P136">- сделана принудительная полная инициализация после обновления <text:span text:style-name="T4">FlashROM.</text:span></text:p>
      <text:p text:style-name="P136">- нажатие 0+<text:span text:style-name="T4">RESET </text:span>теперь не только возвращает основной режим, но и делает полную инициализацию внутренних переменных.</text:p>
      <text:p text:style-name="P136">- сделан <text:span text:style-name="T4">CRC </text:span>контроль содержимого <text:span text:style-name="T4">CMOS </text:span>памяти используемых в работе, при неправильной <text:span text:style-name="T4">CRC </text:span>все используемые в работе ячейки перезаписываются исходными значениями.</text:p>
      <text:p text:style-name="P136"/>
      <text:p text:style-name="P187"><text:span text:style-name="T3">27.05.2012</text:span> <text:span text:style-name="T3">Версия 0.5 Исправления и дополнения</text:span></text:p>
      <text:p text:style-name="P187"><text:span text:style-name="T3">- устранено не сохранение/не восстановление регистра </text:span>«I» <text:span text:style-name="T3">при вызовах </text:span>RST 8.</text:p>
      <text:p text:style-name="P136">- пункт основного меню <text:span text:style-name="T4">«FAT boot» </text:span>переименован в «<text:span text:style-name="T4">File browser</text:span>».</text:p>
      <text:p text:style-name="P136">- в меню «<text:span text:style-name="T4">Service</text:span>» удалены пункты «<text:span text:style-name="T4">Load font 4 TEXTMODE</text:span>» и «<text:span text:style-name="T4">Image to RAMDISK</text:span>», функции этих пунктов теперь производятся через «<text:span text:style-name="T4">File browser</text:span>».</text:p>
      <text:p text:style-name="P136"><text:span text:style-name="T4">- </text:span>в меню «<text:span text:style-name="T4">Service</text:span>» добавлен пункт принудительного сброса на дефолтные значения <text:span text:style-name="T4">CMOS. </text:span>Также добавлен пункт демонтирования образов, если ни один образ не примонтирован меню не появляется.</text:p>
      <text:p text:style-name="P136">- загрузка/запуск файлов раскиданные ранее по разным пунктам разных меню теперь производятся через «<text:span text:style-name="T4">File browser</text:span>», кроме обновления прошивок. Обновление прошивок оставлено на старом месте.</text:p>
      <text:p text:style-name="P136">- переделан порядок доступа к <text:span text:style-name="T4">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4">.</text:span></text:p>
      <text:p text:style-name="P136">- работа с <text:span text:style-name="T4">FAT </text:span>полностью перенесена в ПЗУ, вся вызовы сделаны через <text:span text:style-name="T4">RST 8</text:span>.</text:p>
      <text:p text:style-name="P136">- сделана сортировка по первым символам для директорий/файлов (сначала для директорий, потом <text:soft-page-break/>для файлов).</text:p>
      <text:p text:style-name="P136">- сделано монтирование <text:span text:style-name="T4">TRD </text:span>образов на чтение/запись непосредственно на <text:span text:style-name="T4">FAT.</text:span></text:p>
      <text:p text:style-name="P136">- сделано монтирование <text:span text:style-name="T4">TRD </text:span>образов из текстового файла <text:span text:style-name="T4">IMAGE.MNT. </text:span>Возможность сохранения примонтированных образов в этот файл пока отсутствует.</text:p>
      <text:p text:style-name="P136">- в главном меню добавлен пункт «<text:span text:style-name="T4">Setup</text:span>»<text:span text:style-name="T4">. </text:span>Пока в нем 2 пункта: включение/выключение звука нажатых клавиш и включение/выключение доступа к <text:span text:style-name="T4">SD card NeoGS.</text:span></text:p>
      <text:p text:style-name="P136"><text:span text:style-name="T4">- </text:span>в связи с возможностью монтирования <text:span text:style-name="T4">TRD </text:span>образов сделана запись в драйверах устройств, пока только для монтировщика образов. <text:span text:style-name="T4">FAT </text:span>возможностей записи пока не имеет.</text:p>
      <text:p text:style-name="P136">- окно «<text:span text:style-name="T4">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136">- после переезда работы с <text:span text:style-name="T4">FAT </text:span>в ПЗУ инициализация всех устройств делается всегда сразу по сбросу.</text:p>
      <text:p text:style-name="P136">- сделано сохранение текущего пути при переходах по директориям.</text:p>
      <text:p text:style-name="P136">- обработчик и установщик <text:span text:style-name="T4">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136">- шрифты для текстового режима теперь хранятся в упакованном виде.</text:p>
      <text:p text:style-name="P136">- переделаны вызовы <text:span text:style-name="T4">RST 8, </text:span>сделаны вызова из <text:span text:style-name="T4">EVO-DOS </text:span>для работы с примонтированными образами.</text:p>
      <text:p text:style-name="P136">- при загрузке <text:span text:style-name="T4">TAP </text:span>файлов через «<text:span text:style-name="T4">File browser</text:span>» принудительно включается бит эмуляции работы с лентой в <text:span text:style-name="T4">CMOS. </text:span>При вызове через «<text:span text:style-name="T4">Tape loader</text:span>» зависит от установленного режима.</text:p>
      <text:p text:style-name="P136">- при выборе <text:span text:style-name="T4">TRD </text:span>образов выдается меню выбора монтировать файл или загружать в рамдиск. <text:span text:style-name="T4">FDI </text:span>и <text:span text:style-name="T4">SCL </text:span>образа всегда грузятся в рамдиск.</text:p>
      <text:p text:style-name="P136"/>
      <text:p text:style-name="P136">24.01.2012 Версия 0.49<text:span text:style-name="T4">c </text:span>Переделки</text:p>
      <text:p text:style-name="P136">- переделаны обработчики <text:span text:style-name="T4">RST 8 </text:span>и <text:span text:style-name="T4">NMI </text:span>для полной независимости друг от друга.</text:p>
      <text:p text:style-name="P136">- заменены шрифты для текстмода.</text:p>
      <text:p text:style-name="P187"/>
      <text:p text:style-name="P187">23.01.2012 <text:span text:style-name="T3">Версия 0.49</text:span>b <text:span text:style-name="T3">Исправление</text:span></text:p>
      <text:p text:style-name="P187"><text:span text:style-name="T3">- исправлена работа с принтером, теперь при подключенном </text:span>TSFM <text:span text:style-name="T3">и переходе в </text:span>Basic 48 <text:span text:style-name="T3">не происходит зависаний в независимости от наличия или отсутствия принтера.</text:span></text:p>
      <text:p text:style-name="P187">- <text:span text:style-name="T3">обновлены шрифты для текстмода.</text:span></text:p>
      <text:p text:style-name="P187"><text:span text:style-name="T3">- добавлен еще один шрифт для </text:span>Magic <text:span text:style-name="T3">меню похожий по стилю на использованный в АТМ, но в кодировке </text:span>CP866.</text:p>
      <text:p text:style-name="P187"/>
      <text:p text:style-name="P187">19.01.2012 <text:span text:style-name="T3">Версия 0.49</text:span>a <text:span text:style-name="T3">Исправление</text:span></text:p>
      <text:p text:style-name="P136">- исправлена проблема неправильного считывания фонта из-за несвоевременного переключения отображаемых экранов.</text:p>
      <text:p text:style-name="P136">- исправлено отображение некоторых регистров процессора.</text:p>
      <text:p text:style-name="P136"/>
      <text:p text:style-name="P136">18.01.2012 Версия 0.49 Добавление</text:p>
      <text:p text:style-name="P136">- добавлена поддержка волшебной кнопки <text:span text:style-name="T4">Magic.</text:span></text:p>
      <text:p text:style-name="P187"/>
      <text:p text:style-name="P187">04.01.2012 <text:span text:style-name="T3">Версия 0.48</text:span>b <text:span text:style-name="T3">Исправление</text:span></text:p>
      <text:p text:style-name="P187"><text:span text:style-name="T3">- исправлен номер страницы куда прошивается </text:span>CUSTOM ROM. </text:p>
      <text:p text:style-name="P187"/>
      <text:p text:style-name="P187">01.01.2012 <text:span text:style-name="T3">Версия 0.48а Исправление</text:span></text:p>
      <text:p text:style-name="P187"><text:span text:style-name="T3">- поправлен </text:span>RST <text:span text:style-name="T3">8 чтобы не определялось по сигнатуре </text:span>ROM <text:span text:style-name="T3">что это Скорпион.</text:span></text:p>
      <text:p text:style-name="P136"/>
      <text:p text:style-name="P136">17.12.2011 Версия 0.48 Дополнение</text:p>
      <text:p text:style-name="P136">- немного переделан тест <text:span text:style-name="T4">PC </text:span>клавиатуры, добавлено управление светодиодом <text:span text:style-name="T4">Caps LOCK.</text:span></text:p>
      <text:p text:style-name="P136"><text:span text:style-name="T4">- </text:span>в меню сервис поменяны местами пункты <text:span text:style-name="T4">“Image to RAMDISK” </text:span>и<text:span text:style-name="T4"> “Load font 4 TEXTMODE”.</text:span></text:p>
      <text:p text:style-name="P187"/>
      <text:p text:style-name="P187">17.12.2011 <text:span text:style-name="T3">Версия 0.47</text:span>e <text:span text:style-name="T3">Изменение</text:span></text:p>
      <text:p text:style-name="P187"><text:span text:style-name="T3">- переделана определялка разрядности </text:span>FAT <text:span text:style-name="T3">при отсутствие </text:span>MBR.</text:p>
      <text:p text:style-name="P136"><text:soft-page-break/></text:p>
      <text:p text:style-name="P136">16.12.2011 Версия 0.47<text:span text:style-name="T4">d </text:span>Исправление</text:p>
      <text:p text:style-name="P136">- исправлено не выставление режимов памяти и турбо при запуске <text:span text:style-name="T4">HDD boot </text:span>и <text:span text:style-name="T4">CD boot.</text:span> </text:p>
      <text:p text:style-name="P136"/>
      <text:p text:style-name="P136">16.12.2011 Версия 0.47<text:span text:style-name="T4">c </text:span>Исправление</text:p>
      <text:p text:style-name="P136">- внесено еще немного изменений в <text:span text:style-name="T4">SPG </text:span>загрузчик.</text:p>
      <text:p text:style-name="P136"/>
      <text:p text:style-name="P136">15.12.2011 Версия 0.47<text:span text:style-name="T4">b </text:span>Исправление</text:p>
      <text:p text:style-name="P136">- добавлены изменения в код <text:span text:style-name="T4">SPG </text:span>загрузчика от автора формата. Не запускались некоторые файлы.</text:p>
      <text:p text:style-name="P187"/>
      <text:p text:style-name="P187"><text:span text:style-name="T3">14.12.2011</text:span> <text:span text:style-name="T3">Версия 0.47</text:span>a <text:span text:style-name="T3">Исправление</text:span></text:p>
      <text:p text:style-name="P187"><text:span text:style-name="T3">- исправлена созданная проблема работы с </text:span>FAT <text:span text:style-name="T3">после добавления загрузчика </text:span>SPG <text:span text:style-name="T3">файлов.</text:span></text:p>
      <text:p text:style-name="P187"/>
      <text:p text:style-name="P187">14.12.2011 <text:span text:style-name="T3">Версия 0.47 Добавление</text:span></text:p>
      <text:p text:style-name="P136">- переделан загрузчик HOBETA файлов и перенесен в другую страницу ROM.</text:p>
      <text:p text:style-name="P136">- добавлена возможность запускать <text:span text:style-name="T4">SPG </text:span>файлов.</text:p>
      <text:p text:style-name="P187"/>
      <text:p text:style-name="P187">06.12.2011 <text:span text:style-name="T3">Версия 0.46а Исправление</text:span></text:p>
      <text:p text:style-name="P187"><text:span text:style-name="T3">- исправлено неправильное отображение подсказки по ячейкам </text:span>CMOS <text:span text:style-name="T3">в </text:span>CMOS Editor.</text:p>
      <text:p text:style-name="P136"/>
      <text:p text:style-name="P187">04.12.2011 <text:span text:style-name="T3">Версия 0.46 Добавление</text:span></text:p>
      <text:p text:style-name="P187"><text:span text:style-name="T3">- добавлен тестер </text:span>PC <text:span text:style-name="T3">клавиатуры.</text:span></text:p>
      <text:p text:style-name="P187">- <text:span text:style-name="T3">добавлена проверка контрольного байта и при несовпадении с ожидаемым значении производится перезапись основных ячеек </text:span>CMOS <text:span text:style-name="T3">и принудительный сброс в </text:span>EVO Reset Service.</text:p>
      <text:p text:style-name="P136">- добавлена возможность сброса в прошивку пользователя (<text:span text:style-name="T4">Custom ROM).</text:span></text:p>
      <text:p text:style-name="P136"><text:span text:style-name="T4">- </text:span>добавлена возможность менять прошивку пользователя (<text:span text:style-name="T4">Custom ROM) </text:span>размером 64 Кб не обновляя весь <text:span text:style-name="T4">ROM</text:span>.</text:p>
      <text:p text:style-name="P136">- изменены настройки хранимые в <text:span text:style-name="T4">CMOS </text:span>на противоположные для пунктов «<text:span text:style-name="T30">Reload FONT</text:span>» и «<text:span text:style-name="T30">Type FONT</text:span>». Теперь при инициализации настроек в <text:span text:style-name="T4">CMOS </text:span>пункты будут по умолчанию принимать значения <text:span text:style-name="T4">«</text:span><text:span text:style-name="T33">ON</text:span><text:span text:style-name="T4">» </text:span>и <text:span text:style-name="T4">«</text:span><text:span text:style-name="T33">CP866</text:span><text:span text:style-name="T4">» <text:s/></text:span>соответственно<text:span text:style-name="T4"> .</text:span></text:p>
      <text:p text:style-name="P136">- добавлено выставление режимов турбо при удержании <text:span text:style-name="T4">CS, SS, SPACE </text:span>при сбросе.</text:p>
      <text:p text:style-name="P136"/>
      <text:p text:style-name="P136">09.10.2011 Версия 0.45 Исправления</text:p>
      <text:p text:style-name="P187"><text:span text:style-name="T3">- исправлена ошибка опции </text:span>«HDD boot» <text:span text:style-name="T3">из-за которой происходило зависание при попытке запуска.</text:span></text:p>
      <text:p text:style-name="P136"/>
      <text:p text:style-name="P187"><text:span text:style-name="T3">28.09.2011</text:span> <text:span text:style-name="T3">Версия 0.44 Исправления и дополнения</text:span></text:p>
      <text:p text:style-name="P136">- исправлен неправильное вычисления ширины окна из-за чего скроллер сдвигал не только в окне.</text:p>
      <text:p text:style-name="P136">- драйвера и менеджер устройств перенесены в ПЗУ и работают оттуда же. </text:p>
      <text:p text:style-name="P136">- исправлено появления курсора мыши при отсутствии самой мыши и при выводе файлового меню.</text:p>
      <text:p text:style-name="P187"/>
      <text:p text:style-name="P187"><text:span text:style-name="T3">05.09.2011</text:span> <text:span text:style-name="T3">Версия 0.43 Исправления</text:span></text:p>
      <text:p text:style-name="P187"><text:span text:style-name="T3">- исправлена ошибка не обработки горячих клавиш в меню выбора </text:span>FAT <text:span text:style-name="T3">устройств.</text:span></text:p>
      <text:p text:style-name="P187"><text:span text:style-name="T3">- в выбор куда осуществлять сброс добавлен выбор для сброса в </text:span>ProfROM.<text:span text:style-name="T3"> </text:span></text:p>
      <text:p text:style-name="P187"/>
      <text:p text:style-name="P187">22.07.2011 <text:span text:style-name="T3">Версия 0.42. Исправления</text:span></text:p>
      <text:p text:style-name="P136">- исправлена ошибка из-за которой переключенные режимы не обновлялись на экране.</text:p>
      <text:p text:style-name="P136">- переделал порядок перебора и отображение на экране. Теперь перебирает в порядке 3,5-7-14 и отображает на экране в виде этих же цифр.</text:p>
      <text:p text:style-name="P136"/>
      <text:p text:style-name="P187"><text:span text:style-name="T3">21.07.2011</text:span> <text:span text:style-name="T3">Версия 0.41 Изменения и дополнения.</text:span></text:p>
      <text:p text:style-name="P136">- увеличена ширина файлового окна и сделан показ расширений файлов.</text:p>
      <text:p text:style-name="P187">- <text:span text:style-name="T3">в связи с добавлением нового </text:span>TURBO <text:span text:style-name="T3">режима переделано переключение и отображение текущего режима. Теперь режим перебираются по кругу </text:span>off, on+, on, <text:span text:style-name="T3">что соответствует частотам </text:span>3,5, 14 <text:span text:style-name="T3">и </text:span>7<text:span text:style-name="T3"> МГц.</text:span></text:p>
      <text:p text:style-name="P136"/>
      <text:p text:style-name="P136"><text:soft-page-break/>16.05.2011 Версия 0.4 Изменения и дополнения.</text:p>
      <text:p text:style-name="P187"><text:span text:style-name="T3">- сделал возможность переключать драйвер принтера: встроенный в Бейсик 48 или через </text:span>AY <text:span text:style-name="T3">порт.</text:span></text:p>
      <text:p text:style-name="P136">- сделал возможность перезагружать или не перезагружать шрифт из ПЗУ по сбросу для текстмода.</text:p>
      <text:p text:style-name="P187"><text:span text:style-name="T3">- сделал возможность выбрать какой шрифт загружать из ПЗУ по сбросу для текстмода: стандартный </text:span>ATM <text:span text:style-name="T3">(аля </text:span>KOI8) <text:span text:style-name="T3">или </text:span>CP866.</text:p>
      <text:p text:style-name="P136">- переделан вывод рамки для <text:span text:style-name="T4">CMOS editor </text:span>в зависимости от выбранного шрифта.</text:p>
      <text:p text:style-name="P136"/>
      <text:p text:style-name="P187"><text:span text:style-name="T3">15</text:span>.05.2011 <text:span text:style-name="T3">Версия 0.</text:span>39<text:span text:style-name="T3">а Дополнения.</text:span></text:p>
      <text:p text:style-name="P187"><text:span text:style-name="T3">- сделал во флешере проверку на байт </text:span>#FF. <text:span text:style-name="T3">Если таковой обнаружен, то не прошивается. Соответственно ускорился процесс прошивки новых версий.</text:span></text:p>
      <text:p text:style-name="P136">- сделал возможность загрузки шрифта для текстмода.</text:p>
      <text:p text:style-name="P187"/>
      <text:p text:style-name="P187">09.05.2011 <text:span text:style-name="T3">Версия 0.39 Дополнения.</text:span></text:p>
      <text:p text:style-name="P187"><text:span text:style-name="T3">- немного навел порядок в сервисной странице и сделал возможность использовать прошивку </text:span>GLUK, <text:span text:style-name="T3">кому это больше нравится. </text:span></text:p>
      <text:p text:style-name="P187"/>
      <text:p text:style-name="P187">04.05.2011 <text:span text:style-name="T3">Версия 0.38 Исправления и дополнения.</text:span></text:p>
      <text:p text:style-name="P136">- исправлена ошибка неправильного вычисления высоты файлового окна в зависимости от количества файлов</text:p>
      <text:p text:style-name="P136">- добавлено переключение загрузки с магнитофонного входа или с <text:span text:style-name="T4">FAT </text:span>устройств.</text:p>
      <text:p text:style-name="P136">- добавлена возможность загрузки и запуска <text:span text:style-name="T4">TAP </text:span>файлов.</text:p>
      <text:p text:style-name="P136"/>
      <text:p text:style-name="P136">23.03.2011 Версия 0.37 Дополнение.</text:p>
      <text:p text:style-name="P136">- в редакторе <text:span text:style-name="T4">CMOS </text:span>каждую секунду обновляются ячейки времени и перепечатываются на экране.</text:p>
      <text:p text:style-name="P136">- для первых 17 ячеек выводится краткое описание.</text:p>
      <text:p text:style-name="P187">- <text:span text:style-name="T3">при редактировании времени запись в </text:span>CMOS <text:span text:style-name="T3">производится сразу, для остальных ячеек запись производится по нажатию клавиши </text:span>«S»/</text:p>
      <text:p text:style-name="P187"/>
      <text:p text:style-name="P187">22.<text:span text:style-name="T3">03.2011 Версия 0.36 Исправление ошибки.</text:span></text:p>
      <text:p text:style-name="P187"><text:span text:style-name="T3">- исправлена ошибка загрузки </text:span>SCL <text:span text:style-name="T3">файлов, проявлялась только на некоторых файлах.</text:span></text:p>
      <text:p text:style-name="P187"/>
      <text:p text:style-name="P187">19.<text:span text:style-name="T3">03.2011 Версия 0.35 Изменения.</text:span></text:p>
      <text:p text:style-name="P187"><text:span text:style-name="T3">- переделал выход из прошивальщика, теперь после прошивание принудительно происходит перезапуск </text:span>ROM. <text:span text:style-name="T3">Нажатия </text:span>RESET <text:span text:style-name="T3">после прошивания теперь не требуется.</text:span></text:p>
      <text:p text:style-name="P187"><text:span text:style-name="T3">- немного навел красоту в редакторе </text:span>CMOS.</text:p>
      <text:p text:style-name="P187"/>
      <text:p text:style-name="P187">17.03.2011 <text:span text:style-name="T3">Версия 0.34 Изменения.</text:span></text:p>
      <text:p text:style-name="P187"><text:span text:style-name="T3">- написал с нуля редактор </text:span>CMOS <text:span text:style-name="T3">под режим текстмоде</text:span>, <text:span text:style-name="T3">добавлен пункт в меню </text:span>Service. <text:span text:style-name="T3">Подсказок по ячейкам пока нет.</text:span> <text:span text:style-name="T3">Старый редактор пока не удален.</text:span></text:p>
      <text:p text:style-name="P187"/>
      <text:p text:style-name="P187">27.02.2011 <text:span text:style-name="T3">Версия 0.33 Изменения.</text:span></text:p>
      <text:p text:style-name="P187"><text:span text:style-name="T3">- начал осваивать </text:span>MAGIC <text:span text:style-name="T3">и </text:span>RST 8. <text:span text:style-name="T3">Кое-какую мелочь перенес в другую страницу </text:span>ROM. <text:span text:style-name="T3">Изменения минимальны</text:span>. </text:p>
      <text:p text:style-name="P187"/>
      <text:p text:style-name="P187">12.02.2011 <text:span text:style-name="T3">Версия 0.32 Изменения.</text:span></text:p>
      <text:p text:style-name="P136">-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136">- изменено ожидание нажатия клавиш при ошибках.</text:p>
      <text:p text:style-name="P136"/>
      <text:p text:style-name="P136">07.02.2011 Версия 0.31 Дополнение.</text:p>
      <text:p text:style-name="P136">- добавил очистку 128кб памяти по сбросу.</text:p>
      <text:p text:style-name="P187"/>
      <text:p text:style-name="P187">22.01.2011 <text:span text:style-name="T3">Версия 0.3 Устранение ошибок.</text:span></text:p>
      <text:p text:style-name="P187"><text:span text:style-name="T3">- переделано копирование прошивки </text:span>DOS <text:span text:style-name="T3">с перехватом обращений к ВГ93</text:span> <text:span text:style-name="T3">в предпоследнюю </text:span><text:soft-page-break/><text:span text:style-name="T3">страницу памяти.</text:span></text:p>
      <text:p text:style-name="P187"/>
      <text:p text:style-name="P187">08.01.2011 <text:span text:style-name="T3">Версия 0.29 Устранение ошибок.</text:span></text:p>
      <text:p text:style-name="P187"><text:span text:style-name="T3">- устранена ошибка неправильного вычисления начала секторов в </text:span>FDI <text:span text:style-name="T3">на некоторых образах.</text:span></text:p>
      <text:p text:style-name="P136">- убрал громкий бум при ошибках и при выходе из страницы помощи.</text:p>
      <text:p text:style-name="P187"/>
      <text:p text:style-name="P187">30.<text:span text:style-name="T3">12.2010 Версия 0.28. Устранение ошибок.</text:span></text:p>
      <text:p text:style-name="P187"><text:span text:style-name="T3">- произведена чистка в меню </text:span>Service. <text:span text:style-name="T3">Удалены пункты форматирования рамдиска на 512 и 768 килобайт.</text:span></text:p>
      <text:p text:style-name="P136">- удалена очистка страниц памяти.</text:p>
      <text:p text:style-name="P136">- переделано форматирование рамдиска с учетом его нового формата.</text:p>
      <text:p text:style-name="P136"/>
      <text:p text:style-name="P187"><text:span text:style-name="T3">29.12.2010</text:span> <text:span text:style-name="T3">Версия 0.27 Изменения и дополнения.</text:span></text:p>
      <text:p text:style-name="P187"><text:span text:style-name="T3">- сделана поддержка </text:span>FDI <text:span text:style-name="T3">образов.</text:span></text:p>
      <text:p text:style-name="P136">- рамдиск усложнился, в первой странице рамдиска создается таблица дорожек и секторов. Для <text:span text:style-name="T4">FDI </text:span>образа конвертируется заголок, для <text:span text:style-name="T4">TRD </text:span>и <text:span text:style-name="T4">SCL </text:span>таблица создается принудительно.</text:p>
      <text:p text:style-name="P187"/>
      <text:p text:style-name="P187">07.12.2010 <text:span text:style-name="T3">Версия 0.26. Изменения и исправление ошибки.</text:span></text:p>
      <text:p text:style-name="P136">- исправлена ошибка неправильной работы с менеджером при копировании из ПЗУ.</text:p>
      <text:p text:style-name="P187">- <text:span text:style-name="T3">исправлена ошибка копирования </text:span>SCL <text:span text:style-name="T3">файлов в рамдиск, некоторые файлы могли неправильно копироваться и зависать.</text:span></text:p>
      <text:p text:style-name="P187"><text:span text:style-name="T3">- сделана установка режимов при сбросе с нажатыми </text:span>CS, SS <text:span text:style-name="T3">или </text:span>Space <text:span text:style-name="T3">в зависимости от записанных установок в </text:span>CMOS.</text:p>
      <text:p text:style-name="P187">- <text:span text:style-name="T3">временно убрал пункт в сервисе для копирования дискет.</text:span></text:p>
      <text:p text:style-name="P187"/>
      <text:p text:style-name="P187">06.12.2010<text:tab/> <text:span text:style-name="T3">Версия 0.25 Изменения.</text:span></text:p>
      <text:p text:style-name="P187"><text:span text:style-name="T3">- добавлен еще один тип разделов </text:span>FAT <text:span text:style-name="T3">при поиске в </text:span>MBR.</text:p>
      <text:p text:style-name="P136">- сделано принудительное определение <text:span text:style-name="T4">FAT </text:span>даже при наличии <text:span text:style-name="T4">MBR.</text:span></text:p>
      <text:p text:style-name="P136">- начало рамдиска переехало на одну страницу вниз.</text:p>
      <text:p text:style-name="P136"/>
      <text:p text:style-name="P136">28.11.2010 Версия 0.24 Изменения.</text:p>
      <text:p text:style-name="P136">- изменен прошивальщик ПЗУ. Теперь прошивает все ПЗУ полностью все 512 Кб. Соответственно в файловом окне отображаются только <text:span text:style-name="T4">ROM </text:span>файлы размером 512 Кб. Файлы размером 64 Кб не отображаются и не прошиваются.</text:p>
      <text:p text:style-name="P136">- добавлена индикация стирания ПЗУ и изменено окно прошивальщика из-за большего размера прошивания. </text:p>
      <text:p text:style-name="P187"/>
      <text:p text:style-name="P187">20.11.2010 <text:span text:style-name="T3">Версия 0.23 Изменения и исправления.</text:span></text:p>
      <text:p text:style-name="P136">- устранено появление мышиного курсора при выборе конфигурации и при переключении турбо режима.</text:p>
      <text:p text:style-name="P136">- добавлены горячие клавиши для пунктов не входящих в меню.</text:p>
      <text:p text:style-name="P187"><text:span text:style-name="T3">- добавлена горячая клавиша </text:span>H <text:span text:style-name="T3">для быстрого получения страницы помощи и надпись внизу экрана как вызывать.</text:span></text:p>
      <text:p text:style-name="P136">- исправлено вылезание курсора в файловом окне при отсутствии файлов и нажатии кнопки перехода на страницу вверх.</text:p>
      <text:p text:style-name="P136">- поправлена упущенная возможность запуска кодовых блоков через <text:span text:style-name="T4">«FAT boot» </text:span>с возможностью выхода в Бейсик.</text:p>
      <text:p text:style-name="P136"/>
      <text:p text:style-name="P136">13.11.2010 Версия 0.22 Добавление функционала и исправление ошибки.</text:p>
      <text:p text:style-name="P136">- исправлена ошибка высчитывания остатка загрузки в страницу памяти при загрузке <text:span text:style-name="T4">SCL </text:span>файлов.</text:p>
      <text:p text:style-name="P136">- добавлен<text:span text:style-name="T4"> </text:span>пункт <text:span text:style-name="T4">«Update FLASH ROM»</text:span> для быстрого обновления прошивок ПЗУ. </text:p>
      <text:p text:style-name="P136"/>
      <text:p text:style-name="P136">03.11.2010 Версия 0.21 Добавление функционала для поддержки <text:span text:style-name="T4">EVO-DOS.</text:span></text:p>
      <text:p text:style-name="P136">- добавлена возможность копирования в память для виртуального дисковода <text:span text:style-name="T4">TRD </text:span>и <text:span text:style-name="T4">SCL </text:span>(раскрытие <text:soft-page-break/>образов);</text:p>
      <text:p text:style-name="P136">-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4">DOS #3D13</text:span>;</text:p>
      <text:p text:style-name="P136">- на экране добавлена возможность менять виртуальный дисковод не только клавишей <text:span text:style-name="T4">“Y”, </text:span>но и при помощи мыши;</text:p>
      <text:p text:style-name="P136">- внизу экрана добавлен краткая помощь по клавишам не задействованным в меню и клавише вызова краткой помощи по основному управлению (<text:span text:style-name="T4">H+RESET);</text:span></text:p>
      <text:p text:style-name="P136">- переименованы пункты сервис меню для работы с рамдиском. Теперь пункты начинаются со слова <text:span text:style-name="T4">FORMAT, </text:span>так как именно такое действие они и производят.</text:p>
      <text:p text:style-name="P187"/>
      <text:p text:style-name="P187">22.10.2010 <text:span text:style-name="T3">Версия 0.2.2 Исправление ошибок.</text:span></text:p>
      <text:p text:style-name="P136">- исправлено невозможность выхода из ошибочной ситуации с выводом окна. При выдаче окна прерывания были запрещены.</text:p>
      <text:p text:style-name="P136"/>
      <text:p text:style-name="P136">21.10.2010 Версия 0.2.1 Исправление ошибок.</text:p>
      <text:p text:style-name="P136">- переделан инициализатор менеджера памяти для работы в режиме АТМ.</text:p>
      <text:p text:style-name="P187"><text:span text:style-name="T3">- переписаны процедуры работы с </text:span>CMOS <text:span text:style-name="T3">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187">- <text:span text:style-name="T3">убрал адрес форума, оставил только адрес сайта из инфы выводимой на экран.</text:span></text:p>
      <text:p text:style-name="P187"/>
      <text:p text:style-name="P187"><text:span text:style-name="T3">12</text:span>.10.2010 <text:span text:style-name="T3">Версия 0.</text:span>2 <text:span text:style-name="T3">Результаты тестирования и мелкие доделки.</text:span></text:p>
      <text:p text:style-name="P136">- исправлено зависание при включение мыши по кнопке 9.</text:p>
      <text:p text:style-name="P136">- исправлен вылет в Бейсик при отсуствии мыши и попытке ее включения.</text:p>
      <text:p text:style-name="P136">- переделан опрос управления (хоткеи) из-за обнаруженного бага.</text:p>
      <text:p text:style-name="P187">- <text:span text:style-name="T3">сделано: если обнаружено только одно </text:span>FAT <text:span text:style-name="T3">устройство и на нем только один файл (при отсутствии директорий в корне) при выборе опции </text:span>FAT boot <text:span text:style-name="T3">произойдет запуск этого единственного файла.</text:span></text:p>
      <text:p text:style-name="P136"/>
      <text:p text:style-name="P136">07.10.2010 Версия 0.1A4 Продолжение переделок, тестовая версия.</text:p>
      <text:p text:style-name="P136">- исправлен вывод файлов и директорий при количестве больше высоты окна (скроллинг и страничное перемещение).</text:p>
      <text:p text:style-name="P136">- исправлен неправильный вывод боковых стрелок с правой стороны файлового окна.</text:p>
      <text:p text:style-name="P187"/>
      <text:p text:style-name="P187">06.10.2010<text:span text:style-name="T3"> Версия 0.1</text:span>A3 <text:span text:style-name="T3">Продолжение переделок, тестовая версия.</text:span></text:p>
      <text:p text:style-name="P136">- исправлено отображения текущей буквы дисковода при выборе мышью.</text:p>
      <text:p text:style-name="P187"><text:span text:style-name="T3">- переписан </text:span>HDD boot. <text:span text:style-name="T3">При отсутствии </text:span>HDD <text:span text:style-name="T3">выдается соответствующая надпись.</text:span></text:p>
      <text:p text:style-name="P187">- <text:span text:style-name="T3">переделан вывод файлов на </text:span>FAT. <text:span text:style-name="T3">Теперь кроме найденных файлов выводятся и найденные директории и запускать </text:span>HOBETA <text:span text:style-name="T3">теперь можно не только из корня, но и из любого директория.</text:span></text:p>
      <text:p text:style-name="P187"><text:span text:style-name="T3">- при выводе файлов на </text:span>FAT <text:span text:style-name="T3">сделал отображение мини иконок для отображения директорий и файлов.</text:span></text:p>
      <text:p text:style-name="P187">- <text:span text:style-name="T3">немного переделан детект мыши и часов.</text:span></text:p>
      <text:p text:style-name="P136">- еще немного поэкспериментировал с отображением горячих клавиш в менюшках. <text:s/></text:p>
      <text:p text:style-name="P136"/>
      <text:p text:style-name="P187"><text:span text:style-name="T3">25.09.2010 Версия 0.1</text:span>A<text:span text:style-name="T3">2 Продолжение переделок, тестовая версия.</text:span></text:p>
      <text:p text:style-name="P136">- переделал некоторые меню по внешнему виду для общего стиля.</text:p>
      <text:p text:style-name="P136">-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187">- <text:span text:style-name="T3">сделал печать в левой части окон буквы горячей клавиши для каждого пункта.</text:span></text:p>
      <text:p text:style-name="P136"/>
      <text:p text:style-name="P187"><text:span text:style-name="T3">23</text:span>.09.2010 <text:span text:style-name="T3">Версия 0.1</text:span>A1 <text:span text:style-name="T3">Продолжение переделок, тестовая версия.</text:span></text:p>
      <text:p text:style-name="P187"><text:span text:style-name="T3">- в последние 8 байт добавлена сигнатура </text:span>«HEGLUK» <text:span text:style-name="T3">и дата сборки в упакованном виде.</text:span></text:p>
      <text:p text:style-name="P136">- переделка внешнего вида.</text:p>
      <text:p text:style-name="P136">- переделана обработка горячих клавиш.</text:p>
      <text:p text:style-name="P136">- добавлена табличная обработка выделенных зон за пределами активного окна для мыши.</text:p>
      <text:p text:style-name="P187"><text:soft-page-break/><text:span text:style-name="T3">- добавилась горячая клавиша </text:span>«V» <text:span text:style-name="T3">для кругового перебора дисководов.</text:span></text:p>
      <text:p text:style-name="P136"/>
      <text:p text:style-name="P187">17.09.2010 <text:span text:style-name="T3">Версия 0.1А Вторая ревизия сорцов, тестовая версия.</text:span></text:p>
      <text:p text:style-name="P136">- найден альтернативный компилятор, все сорцы переведены на него.</text:p>
      <text:p text:style-name="P187"><text:span text:style-name="T3">- интегрирована полная кодовая таблица шрифта (</text:span>DOS866<text:span text:style-name="T3">).</text:span></text:p>
      <text:p text:style-name="P136">-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136">-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187">- <text:span text:style-name="T3">устранена блокировка клавиатуры при наведении мыши на буквы выбора дисков и переключения режимов.</text:span></text:p>
      <text:p text:style-name="P187">- <text:span text:style-name="T3">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136">- исправил смену режимов без перерисовки экрана.</text:p>
      <text:p text:style-name="P136">- при смене дисковода перерисовка происходит из-за возможно открытого файлового меню.</text:p>
      <text:p text:style-name="P136">- при открытом файловом меню для <text:span text:style-name="T4">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187"><text:span text:style-name="T3">- сделал блокировку для не </text:span>TR-DOS <text:span text:style-name="T3">дискет. Если подсунуть такую дискету, то сразу выдается соответствующая надпись.</text:span></text:p>
      <text:p text:style-name="P187"><text:span text:style-name="T3">- в меню </text:span>Kills <text:span text:style-name="T3">добавлен сброс </text:span>NeoGS.</text:p>
      <text:p text:style-name="P136">-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136">-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187">- <text:span text:style-name="T3">пока не сделано скролирование по файловому окну мышью.</text:span></text:p>
      <text:p text:style-name="P187">- <text:span text:style-name="T3">временно отключена поддержка </text:span>HDD <text:span text:style-name="T3">на </text:span>Slave <text:span text:style-name="T3">из-за конфликтов при подключенном </text:span>CD-ROM.</text:p>
      <text:p text:style-name="P136">- возможно что-то еще забыл по мелочи, работа до версии 0.2 будут продолжена.</text:p>
      <text:p text:style-name="P187"/>
      <text:p text:style-name="P187">20.08.2010 <text:span text:style-name="T3">Версия 0.19 Устранение не моего глюка.</text:span></text:p>
      <text:p text:style-name="P187"><text:span text:style-name="T3">- из-за всплывшей ошибки в компиляторе сделал перемещение драйвера </text:span>NeoGS, <text:span text:style-name="T3">на который <text:s/>пришелся глюк компилятора</text:span> <text:span text:style-name="T3">ниже по адресам памяти. Занялся поиском альтернативного компилятора.</text:span></text:p>
      <text:p text:style-name="P187"/>
      <text:p text:style-name="P187">04.08.2010 <text:span text:style-name="T3">Версия 0.18 Добавления и изменения</text:span></text:p>
      <text:p text:style-name="P187"><text:span text:style-name="T3">- добавлена опция загрузки с ленты непосредственно из </text:span>HE GLUK.</text:p>
      <text:p text:style-name="P187"/>
      <text:p text:style-name="P187">21.05.2010 <text:span text:style-name="T3">Версия 0.17 Добавление и изменения</text:span></text:p>
      <text:p text:style-name="P187"><text:span text:style-name="T3">- в связи с надобностью изготовления </text:span>HE GLUK <text:span text:style-name="T3">для </text:span>ATM <text:span text:style-name="T3">сделал универсальную версию. Не требует перекомпиляции. Переписаны стартовые </text:span>RESET <text:span text:style-name="T3">сервисы. </text:span></text:p>
      <text:p text:style-name="P136">- стартовый экран немного оголился. Не выводятся содержимое регистров по сбросу и содержимое стека.</text:p>
      <text:p text:style-name="P187"><text:span text:style-name="T3">- исправлено процедура непосредственного чтения с </text:span>NEMO <text:span text:style-name="T3">винчестера для большей стабильности.</text:span></text:p>
      <text:p text:style-name="P187"/>
      <text:p text:style-name="P187">28.03.2010 <text:span text:style-name="T3">Версия 0.16 Добавление мелкой функции.</text:span></text:p>
      <text:p text:style-name="P136">- добавлена поддержка показа версий прошивок на Пентеве.</text:p>
      <text:p text:style-name="P187"/>
      <text:p text:style-name="P187">17.03.2010 <text:span text:style-name="T3">Версия 0.15 Исправление ошибок</text:span></text:p>
      <text:p text:style-name="P136">- исправлена ошибка невозможности выбора дисковода при отсутствии часов.</text:p>
      <text:p text:style-name="P187"/>
      <text:p text:style-name="P187">10.03.2010 <text:span text:style-name="T3">Версия 0.14 Исправление ошибок.</text:span></text:p>
      <text:p text:style-name="P187"><text:span text:style-name="T3">- исправлена ошибка не выставления режимов при переходе в Бейсики и </text:span>TR-DOS<text:span text:style-name="T3">.</text:span></text:p>
      <text:p text:style-name="P187"><text:span text:style-name="T3">- исправлено при содержимом ячейки </text:span>#11 <text:span text:style-name="T3">не равной </text:span>#55 <text:span text:style-name="T3">или </text:span>#AA <text:span text:style-name="T3">в ячейки </text:span>#0A-#11 <text:span text:style-name="T3">прописываются </text:span><text:soft-page-break/><text:span text:style-name="T3">дефолтное содержимое #20,#02,#00,#80,#00,#00,#00,#AA.</text:span></text:p>
      <text:p text:style-name="P187"/>
      <text:p text:style-name="P187">23.02.2010 <text:span text:style-name="T3">Версия 0.13 Добавил (вернул на место) драйвер </text:span>SMUC.</text:p>
      <text:p text:style-name="P187"/>
      <text:p text:style-name="P187">22.<text:span text:style-name="T3">02.2010 Версия 0.12 Исправлен еще один глюк.</text:span></text:p>
      <text:p text:style-name="P187"><text:span text:style-name="T3">- исправлено НЕ выставление режимов компа при загрузке/запуске из </text:span>HOBETA <text:span text:style-name="T3">файлов.</text:span></text:p>
      <text:p text:style-name="P136">- исправлена возможность загрузки файлов размером максимум 40960 байт. В предыдущих версиях размер был максимум 40959 байт.</text:p>
      <text:p text:style-name="P136"/>
      <text:p text:style-name="P136">22.02.2010 Версия 0.11 Исправлен первый глюк.</text:p>
      <text:p text:style-name="P136">- неправильно отдавался тип <text:span text:style-name="T4">FAT </text:span>устройства микрозагрузчику <text:span text:style-name="T4">HOBETA </text:span>файлов.</text:p>
      <text:p text:style-name="P187"/>
      <text:p text:style-name="P187">21.02.2010 <text:span text:style-name="T3">Версия 0.1 Проверка и тестирование. </text:span></text:p>
      <text:p text:style-name="P82"><text:span text:style-name="T154">- за основу взяты исходники </text:span><text:span text:style-name="T153">GLUK 6.62. </text:span><text:span text:style-name="T154">Все исходники переведены в текстовый формат для компиляции </text:span><text:span text:style-name="T3">SjASMPlus</text:span><text:span text:style-name="T153">. </text:span><text:span text:style-name="T154">При сборке используется упаковщик </text:span><text:span text:style-name="T153">MHMT.</text:span></text:p>
      <text:p text:style-name="P188"><text:span text:style-name="T164">-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53">GLUK</text:span><text:span text:style-name="T164">а. Так сказать «забадяжил» на старых дрожжах.</text:span></text:p>
      <text:p text:style-name="P188"><text:span text:style-name="T164">- при переделке не пострадали и не изменялись все функции вызываемые по «Кнопка+</text:span><text:span text:style-name="T153">RESET</text:span><text:span text:style-name="T164">».</text:span></text:p>
      <text:p text:style-name="P188"><text:span text:style-name="T164">- без изменений остались </text:span><text:span text:style-name="T153">CD Boot </text:span><text:span text:style-name="T164">и </text:span><text:span text:style-name="T153">HDD Boot.</text:span></text:p>
      <text:p text:style-name="P188"><text:span text:style-name="T164">- полностью удален </text:span><text:span text:style-name="T153">PC.</text:span></text:p>
      <text:p text:style-name="P188"><text:span text:style-name="T164">- убрано определение байта </text:span><text:span text:style-name="T153">#47 </text:span><text:span text:style-name="T164">в ячейке </text:span><text:span text:style-name="T153">#12 CMOS.</text:span></text:p>
      <text:p text:style-name="P188"><text:span text:style-name="T153">- </text:span><text:span text:style-name="T164">удалены из исходников все опции связанные с компиляцией для АТМ.</text:span></text:p>
      <text:p text:style-name="P136">- убрана прозрачность окон.</text:p>
      <text:p text:style-name="P136">- убран вывод на экран уменьшенных копий сохраненных экранов, что создавало мусор на экране.</text:p>
      <text:p text:style-name="P188"><text:span text:style-name="T164">- удалены все пункты не имеющие никакой ценности. К ним относятся следующие пункты: </text:span><text:span text:style-name="T153">P.C., P.C.512, Cache, R.C., STS, XAS, Save SCR, TR KEEPER. </text:span><text:span text:style-name="T164">Удален также вновь добавленный пункт </text:span><text:span text:style-name="T153">FATALL. </text:span></text:p>
      <text:p text:style-name="P188"><text:span text:style-name="T164">- в меню «</text:span><text:span text:style-name="T153">Kills</text:span><text:span text:style-name="T164">»</text:span><text:span text:style-name="T153"> </text:span><text:span text:style-name="T164">следующие изменения: удален пункт </text:span><text:span text:style-name="T153">Low MEM. </text:span><text:span text:style-name="T164">Пункт </text:span><text:span text:style-name="T153">Pages </text:span><text:span text:style-name="T164">переименован в </text:span><text:span text:style-name="T153">Pages 128 </text:span><text:span text:style-name="T164">по функциональности. Форматилки </text:span><text:span text:style-name="T153">RAM </text:span><text:span text:style-name="T164">диска также переименованы по смыслу и добавлена форматилка на 640 килобайт (стандартный размер </text:span><text:span text:style-name="T153">TR-DOS </text:span><text:span text:style-name="T164">дискеты</text:span><text:span text:style-name="T153">)</text:span><text:span text:style-name="T164">.</text:span></text:p>
      <text:p text:style-name="P189"><text:span text:style-name="T164">- </text:span><text:span text:style-name="T154">там же в меню «</text:span><text:span text:style-name="T164">Kills</text:span><text:span text:style-name="T154">» оставлен копировщик дискет с форматированием диска-приемника.</text:span></text:p>
      <text:p text:style-name="P136">- временно убрана раскраска главного окна.</text:p>
      <text:p text:style-name="P188"><text:span text:style-name="T164">- у часов теперь не 2 состояния, а 3. Часы не найдены, на экране надпись </text:span><text:span text:style-name="T153">«NO CMOS». </text:span><text:span text:style-name="T164">Часы найдены, но выключены. Надпись на экране </text:span><text:span text:style-name="T153">«OFF CMOS». </text:span><text:span text:style-name="T164">При найденных и включенных соответственно отображают время.</text:span></text:p>
      <text:p text:style-name="P188"><text:span text:style-name="T164">- обновление часов теперь происходит не по тайм ауту, а по установке бита 4 регистра </text:span><text:span text:style-name="T153">C </text:span><text:span text:style-name="T164">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188"><text:span text:style-name="T164">- определение часов делается по ячейке 0 (секунды). Ячейка </text:span><text:span text:style-name="T153">#11 </text:span><text:span text:style-name="T164">принимающее значение </text:span><text:span text:style-name="T153">#AA (</text:span><text:span text:style-name="T164">часы включены)</text:span><text:span text:style-name="T153"> </text:span><text:span text:style-name="T164">или </text:span><text:span text:style-name="T153">#55 </text:span><text:span text:style-name="T164">(часы выключены) не используется для определения наличия часов.</text:span></text:p>
      <text:p text:style-name="P136">-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188"><text:span text:style-name="T164">- устранен глюк связанный с надписью </text:span><text:span text:style-name="T153">«I KNOW NOW». </text:span><text:span text:style-name="T164">При выбранном диске «</text:span><text:span text:style-name="T153">D</text:span><text:span text:style-name="T164">» и при отсутствии на диске Бейсик файлов (при выборе «</text:span><text:span text:style-name="T153">GLUK BOOT</text:span><text:span text:style-name="T164">» выводится </text:span><text:span text:style-name="T153">«NO PROGS») </text:span><text:span text:style-name="T164">при повторном нажатии </text:span><text:span text:style-name="T153">«Enter» выводилась</text:span><text:span text:style-name="T164"> окошко с текстом </text:span><text:span text:style-name="T153">«I KNOW NOW» </text:span><text:span text:style-name="T164">и все вешалось с перерисовкой экрана без главного меню и выбранном диске </text:span><text:span text:style-name="T153">«A».</text:span></text:p>
      <text:p text:style-name="P82"><text:span text:style-name="T153">- </text:span><text:span text:style-name="T154">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82">- в главное меню добавлен пункт <text:span text:style-name="T4">«FAT Boot» </text:span><text:span text:style-name="T3">для загрузки кодовых блоков записанных на </text:span><text:span text:style-name="T4">FAT </text:span><text:span text:style-name="T3">в формате </text:span><text:span text:style-name="T4">HOBETA.</text:span></text:p>
      <text:p text:style-name="P188"><text:soft-page-break/>- для работы с <text:span text:style-name="T4">FAT </text:span>добавлен соответствующий код и поддержка <text:span text:style-name="T4">SD </text:span>карт на <text:span text:style-name="T4">NeoGS </text:span>и <text:span text:style-name="T4">Z-</text:span>контроллер (на <text:span text:style-name="T4">ZX Evo </text:span>контроллер встроен в плату) и контроллер винчестера подключаемый по схеме <text:span text:style-name="T4">Nemo.</text:span></text:p>
      <text:p text:style-name="P82"><text:span text:style-name="T3">- если еще что-нибудь вспомню, допишу. За 2 недели слишком много перепахано. Если кого-то что-то не устраивает исходники </text:span><text:span text:style-name="T4">GLUK</text:span><text:span text:style-name="T3">а открыты :</text:span><text:span text:style-name="T4">D</text:span></text:p>
      <text:p text:style-name="P190"><text:span text:style-name="T51">- </text:span><text:span text:style-name="T32">за глюки связанные с </text:span><text:span text:style-name="T51">TR-DOS </text:span><text:span text:style-name="T32">6.10 или подобные я не отвечаю. Там моя нога еще не ступала. Пинать меня только за эту сервис прошивку ;)</text:span></text:p>
      <text:h text:style-name="P9" text:outline-level="1"><text:bookmark-start text:name="История версий EVO-DOS"/><text:bookmark-start text:name="__RefHeading__7563_2044125182"/>История версий <text:span text:style-name="T198">EVO</text:span><text:span text:style-name="T4">-DOS</text:span><text:bookmark-end text:name="История версий EVO-DOS"/><text:span text:style-name="T199">, </text:span><text:span text:style-name="T200">NEO-DOS</text:span><text:bookmark-end text:name="__RefHeading__7563_2044125182"/></text:h>
      <text:p text:style-name="P136"/>
      <text:p text:style-name="P191">23.03.2025 <text:span text:style-name="T201">Версия 0.60</text:span></text:p>
      <text:p text:style-name="P191">- <text:span text:style-name="T3">исправлено чтение сектора </text:span><text:span text:style-name="T202">примонтированного образа</text:span><text:span text:style-name="T3"> на границах памяти 0</text:span>x3F00-0x4000 <text:span text:style-name="T3">и </text:span>0xFF00-0x0000.</text:p>
      <text:p text:style-name="P192"/>
      <text:p text:style-name="P192">12.02.2025 <text:span text:style-name="T3">Версия 0.59</text:span></text:p>
      <text:p text:style-name="P193">- исправлен неправильное выставление статуса выполнения команды принудительного прерывания <text:span text:style-name="T203">в эмуляции </text:span>ВГ (0<text:span text:style-name="T4">xDx).</text:span></text:p>
      <text:p text:style-name="P194"/>
      <text:p text:style-name="P195"><text:span text:style-name="T204">1</text:span><text:span text:style-name="T153">2.02.2024 </text:span><text:span text:style-name="T154">Версия 0.58</text:span></text:p>
      <text:p text:style-name="P195"><text:span text:style-name="T154">- добавлена расширенная команда </text:span><text:span text:style-name="T153">TURBO </text:span><text:span text:style-name="T154">для просмотра/установки частоты процессора</text:span><text:span text:style-name="T153">.</text:span></text:p>
      <text:p text:style-name="P196"><text:span text:style-name="T204"/></text:p>
      <text:p text:style-name="P196"><text:span text:style-name="T204">15.02.2023 </text:span><text:span text:style-name="T205">Версия 0.57</text:span></text:p>
      <text:p text:style-name="P197">- при попытке чтения/записи за пределами 80 дорожки выдается ошибка «массив не найден».</text:p>
      <text:p text:style-name="P198"/>
      <text:p text:style-name="P198">03.12.2022 <text:span text:style-name="T3">Версия 0.56</text:span></text:p>
      <text:p text:style-name="P198">- <text:span text:style-name="T3">поправлена эмуляция команды ВГшки </text:span>0xC0 (<text:span text:style-name="T3">только для </text:span>NEO-DOS).</text:p>
      <text:p text:style-name="P199"/>
      <text:p text:style-name="P199">1<text:span text:style-name="T206">9</text:span>.10.2022 Версия 0.55</text:p>
      <text:p text:style-name="P199">- исправлен порядок копирования сектора в буфер при записи в смонтированный образ.</text:p>
      <text:p text:style-name="P200"/>
      <text:p text:style-name="P200">08.10.2022 <text:span text:style-name="T3">Версия 0.54</text:span></text:p>
      <text:p text:style-name="P200">- <text:span text:style-name="T3">устранено зависание при попытке чтения с виртуального диска не существующего сектора (</text:span>DCU<text:span text:style-name="T3">).</text:span></text:p>
      <text:p text:style-name="P201"/>
      <text:p text:style-name="P201">20.08.2022 <text:span text:style-name="T3">Версия 0.53 </text:span><text:span text:style-name="T207">Исправление</text:span></text:p>
      <text:p text:style-name="P201">- <text:span text:style-name="T3">перемещение кода расширенных команд для восстановления векторов прерывания </text:span>im2.</text:p>
      <text:p text:style-name="P202"/>
      <text:p text:style-name="P202">15.01.2022 <text:span text:style-name="T3">Версия 0.52 </text:span><text:span text:style-name="T208">Переделка</text:span></text:p>
      <text:p text:style-name="P202"><text:span text:style-name="T208">- </text:span><text:span text:style-name="T209">таблица нумерации секторов для форматирования заменена на более быструю.</text:span></text:p>
      <text:p text:style-name="P202"><text:span text:style-name="T208">- </text:span><text:span text:style-name="T210">убрана расширенная команда .</text:span><text:span text:style-name="T147">ROM </text:span><text:span text:style-name="T210">за ненадобностью.</text:span></text:p>
      <text:p text:style-name="P203">- убраны все программные перехваты обращений к портам ВГ93.</text:p>
      <text:p text:style-name="P202"><text:span text:style-name="T3">- </text:span><text:span text:style-name="T208">переименован версия.</text:span></text:p>
      <text:p text:style-name="P204"/>
      <text:p text:style-name="P204">22.08.2019 <text:span text:style-name="T3">Версия 0.51 Переделка</text:span></text:p>
      <text:p text:style-name="P205">- переделан резидент, стек теперь не используется.</text:p>
      <text:p text:style-name="P206"/>
      <text:p text:style-name="P206">21.08.2019 <text:span text:style-name="T3">Версия 0.50 Изменение</text:span></text:p>
      <text:p text:style-name="P207">- изменен адрес стека в резиденте.</text:p>
      <text:p text:style-name="P136"/>
      <text:p text:style-name="P208">19.08.2019 <text:span text:style-name="T3">Версия 0.49 Переделки и исправления</text:span></text:p>
      <text:p text:style-name="P208"><text:span text:style-name="T3">- исправлено восстановление привязки 3 окна проецирования к порту </text:span>0x7FFD <text:span text:style-name="T3">при запуске резидента.</text:span></text:p>
      <text:p text:style-name="P209">- добавлено принудительная установка памяти 128К и частота процессора 3,5Мгц.</text:p>
      <text:p text:style-name="P208"><text:span text:style-name="T3">- добавлена порча резидента в зависимости от настройки </text:span>CMOS.</text:p>
      <text:p text:style-name="P136"/>
      <text:p text:style-name="P210">14.08.2019 <text:span text:style-name="T3">Версия 0.48 Переделки</text:span></text:p>
      <text:p text:style-name="P210"><text:span text:style-name="T3">- переделан поиск резидента </text:span><text:span text:style-name="T211">и добавлен в сборку</text:span><text:span text:style-name="T3">. Переделка минимальная, ищет через порты </text:span><text:span text:style-name="T212">0</text:span><text:span text:style-name="T3">x</text:span><text:span text:style-name="T211">F</text:span><text:span text:style-name="T3">7F7</text:span> <text:span text:style-name="T3">чтобы не зависеть от установок порта </text:span>0xEFF7.</text:p>
      <text:p text:style-name="P136"/>
      <text:p text:style-name="P211">05.<text:span text:style-name="T3">08.2019 Версия 0.47 Переделки</text:span></text:p>
      <text:p text:style-name="P212">- переделано переключение дисков.</text:p>
      <text:p text:style-name="P213"><text:soft-page-break/><text:span text:style-name="T3">- переделано переключение страниц </text:span>ROM <text:span text:style-name="T3">в зависимости от диска реальный или виртуальный.</text:span></text:p>
      <text:p text:style-name="P211"><text:span text:style-name="T3">- добавлена команда .</text:span>ROM.</text:p>
      <text:p text:style-name="P136"/>
      <text:p text:style-name="P214">28.07.2019 Версия<text:span text:style-name="T3"> 0.46 Изменение</text:span></text:p>
      <text:p text:style-name="P214"><text:span text:style-name="T3">- переделано переключение диска для старых команд командной строки вида *</text:span>”x:” <text:span text:style-name="T3">и для новых вида .</text:span>x:</text:p>
      <text:p text:style-name="P136"/>
      <text:p text:style-name="P215">14.07.2019 <text:span text:style-name="T3">Версия 0.45 Изменения</text:span></text:p>
      <text:p text:style-name="P215"><text:span text:style-name="T3">- переделано переключение страниц </text:span>ROM <text:span text:style-name="T3">при выходе из внутренней функции эмулятора диска.</text:span></text:p>
      <text:p text:style-name="P136"/>
      <text:p text:style-name="P136">07.02.2019 Версия 0.44 Исправление</text:p>
      <text:p text:style-name="P136">- исправлена ошибка не форматирования реальной дискеты.</text:p>
      <text:p text:style-name="P136">- исправлен неправильный возврат страницы памяти во 2-ом окне проецирования.</text:p>
      <text:p text:style-name="P136"/>
      <text:p text:style-name="P136">06.08.2017 Версия 0.43 Изменения</text:p>
      <text:p text:style-name="P136">- в <text:span text:style-name="T4">bat </text:span>файл добавлены ключи для разных вариантов компиляции.</text:p>
      <text:p text:style-name="P136"/>
      <text:p text:style-name="P187"><text:span text:style-name="T3">03.05.2015</text:span> <text:span text:style-name="T3">Версия 0.42 Исправления.</text:span></text:p>
      <text:p text:style-name="P187"><text:span text:style-name="T3">- исправлена порча альтернативного регистра «</text:span>A<text:span text:style-name="T3">»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136"/>
      <text:p text:style-name="P187">11.03.2015 <text:span text:style-name="T3">Версия 0.41 Исправления.</text:span></text:p>
      <text:p text:style-name="P187"><text:span text:style-name="T3">- устранена выдаваемая ошибка и зависание при выходе из </text:span>EVO-DOS <text:span text:style-name="T3">по команде </text:span>RETURN<text:span text:style-name="T3">.</text:span></text:p>
      <text:p text:style-name="P136">- устранено чтение вместо записи при работе с рамдиском.</text:p>
      <text:p text:style-name="P187"/>
      <text:p text:style-name="P187">07.12.2014 <text:span text:style-name="T3">Версия 0.40 Исправления.</text:span></text:p>
      <text:p text:style-name="P187"><text:span text:style-name="T3">- пропатчена первая пауза в вызываемом адресе </text:span>0x2F4D <text:span text:style-name="T3">из-за которой терялся номер трека с которого должна была происходить загрузка. </text:span>STS <text:span text:style-name="T3">загружал сектора с 0 дорожки вместо заданной, возможно и не только </text:span>STS.</text:p>
      <text:p text:style-name="P136"/>
      <text:p text:style-name="P136">22.11.2014 Версия 0.39 Изменения.</text:p>
      <text:p text:style-name="P136">- возвращено на старые адреса местоположение кода, кроме мест пропатченных для работы с виртуальными дисками.</text:p>
      <text:p text:style-name="P187"/>
      <text:p text:style-name="P187"><text:span text:style-name="T3">16.07.2014</text:span> <text:span text:style-name="T3">Версия 0.38 Исправления.</text:span></text:p>
      <text:p text:style-name="P187"><text:span text:style-name="T3">- исправлена ошибка сброса/зависания при попытке отформатировать дискету командой </text:span>FORMAT “a:” <text:span text:style-name="T3">без указания имени форматируемой дискеты.</text:span></text:p>
      <text:p text:style-name="P136">- сделано сохранение/восстановление конфигурации/страниц памяти в 1 и 2 окне проецирования при работе с рамдиском.</text:p>
      <text:p text:style-name="P187"><text:span text:style-name="T3">- исправлена ошибка при определении типа </text:span>FAT <text:span text:style-name="T3">при отсутствии </text:span>MBR.</text:p>
      <text:p text:style-name="P187">- <text:span text:style-name="T3">исправлено постоянное восстановление внутренних переменных при сбросе. </text:span></text:p>
      <text:p text:style-name="P187"/>
      <text:p text:style-name="P187">04.02.2014<text:span text:style-name="T3"> Версия 0.37 Исправления.</text:span></text:p>
      <text:p text:style-name="P187"><text:span text:style-name="T3">- исправлено зависание при отсутствии найденных разделов </text:span>FAT.</text:p>
      <text:p text:style-name="P187">- <text:span text:style-name="T3">исправлено ситуация «</text:span>DRIVE NOT READY<text:span text:style-name="T3">» при эмуляции </text:span>#3D2F</text:p>
      <text:p text:style-name="P187"/>
      <text:p text:style-name="P187">15.12.2013 <text:span text:style-name="T3">Версия 0.36 Исправления.</text:span></text:p>
      <text:p text:style-name="P136">- откатился до версии 0.34.</text:p>
      <text:p text:style-name="P187"><text:span text:style-name="T3">- изменен доступ к ячейкам </text:span>CMOS <text:span text:style-name="T3">с хранимыми настройками.</text:span></text:p>
      <text:p text:style-name="P187"/>
      <text:p text:style-name="P187">17.11.2013 <text:span text:style-name="T3">Версия 0.35 Изменение, не для обновления.</text:span></text:p>
      <text:p text:style-name="P187"><text:span text:style-name="T3">- основной код вернул от исходной версии </text:span>TR-DOS <text:span text:style-name="T3">кроме процедур инициализации и всего что касается эмуляции.</text:span></text:p>
      <text:p text:style-name="P187"><text:soft-page-break/><text:span text:style-name="T3">- переделана работа с номерами реального и виртуального хранящимися в </text:span>CMOS.</text:p>
      <text:p text:style-name="P187">- <text:span text:style-name="T3">после множественных изменений возможно появление всяческих глючков. Не проверялось на реале, только в эмуляторе.</text:span></text:p>
      <text:p text:style-name="P187"/>
      <text:p text:style-name="P187">24.03.2013 <text:span text:style-name="T3">Версия 0.34 Исправление</text:span></text:p>
      <text:p text:style-name="P187"><text:span text:style-name="T3">- исправлено неправильная выдача содержимого </text:span>AF <text:span text:style-name="T3">на выходе процедуры чтения/записи сектора.</text:span></text:p>
      <text:p text:style-name="P136"/>
      <text:p text:style-name="P136">08.12.2012 Версия 0.33 Исправление</text:p>
      <text:p text:style-name="P136">- исправлена ошибка определения с каким диском идет работа из-за чего не работало форматирование реальной дискеты.</text:p>
      <text:p text:style-name="P187"/>
      <text:p text:style-name="P136"><text:span text:style-name="T4">04.</text:span>12.2012 Версия 0.32 Исправление</text:p>
      <text:p text:style-name="P136">- добавил исправления ошибки описанной Углековым в описании на эмулятор <text:span text:style-name="T4">UKV.</text:span></text:p>
      <text:p text:style-name="P187"/>
      <text:p text:style-name="P136"><text:span text:style-name="T4">04.12.2012</text:span> Версия 0.31 Исправления и добавления</text:p>
      <text:p text:style-name="P136">- устранена ошибка установки адреса запуска команды <text:span text:style-name="T4">LOAD “filename” CODE </text:span>адрес запуска.</text:p>
      <text:p text:style-name="P136">- добавлен байты <text:span text:style-name="T4">#DB, #1F, #C9 </text:span>по адресу <text:span text:style-name="T4">#3C30 </text:span>для запуска не адаптированного <text:span text:style-name="T4">Honey Commander 4.00.</text:span></text:p>
      <text:p text:style-name="P136">- добавлена команды .<text:span text:style-name="T4">help </text:span>для просмотра списка доступных дополнительных команд.</text:p>
      <text:p text:style-name="P136">- добавлена команда .<text:span text:style-name="T4">clrcmos </text:span>для сброса содержимого ячеек (не всех ячеек) необходимых для работы <text:s/><text:span text:style-name="T4">EVO reset service, EVO-DOS </text:span>и <text:span text:style-name="T4">RST 8 </text:span>вызовов.</text:p>
      <text:p text:style-name="P187">- <text:span text:style-name="T3">исправлена ошибка форматирования рамдиска если ранее был загружен </text:span>FDI <text:span text:style-name="T3">образ </text:span>IS-DOS<text:span text:style-name="T3">.</text:span></text:p>
      <text:p text:style-name="P136"/>
      <text:p text:style-name="P136">27.05.2012 Версия 0.3 Добавления</text:p>
      <text:p text:style-name="P136">- добавлено несколько новых команд для работы с <text:span text:style-name="T4">FAT.</text:span></text:p>
      <text:p text:style-name="P136">- добавлена возможность монтировать/демонтировать <text:span text:style-name="T4">TRD </text:span>образа из командной строки.</text:p>
      <text:p text:style-name="P136">- сделана возможность прямого вызова функций <text:span text:style-name="T4">RST 8</text:span>.</text:p>
      <text:p text:style-name="P187"/>
      <text:p text:style-name="P187">01.01.2012 <text:span text:style-name="T3">Версия 0.29а Исправления.</text:span></text:p>
      <text:p text:style-name="P187"><text:span text:style-name="T3">- исправлена ошибка переформатирования рамдиска при входе в </text:span>DOS <text:span text:style-name="T3">через </text:span>Basic 48,<text:span text:style-name="T3"> когда стек установлен ниже </text:span>32768.</text:p>
      <text:p text:style-name="P136"/>
      <text:p text:style-name="P136">04.12.2011 Версия 0.29 Добавления.</text:p>
      <text:p text:style-name="P136">-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136">- устранена ошибка форматирования рамдиска после включения или повреждения.</text:p>
      <text:p text:style-name="P136"/>
      <text:p text:style-name="P136">09.10.2011Версия 0.28 Исправления.</text:p>
      <text:p text:style-name="P187"><text:span text:style-name="T3">- исправлена ошибка из-за которой не работали программы использующие доступ к портам ВГ93 через адрес </text:span>0x3D2F <text:span text:style-name="T3">с реальной дискетой</text:span>.</text:p>
      <text:p text:style-name="P136"/>
      <text:p text:style-name="P187"><text:span text:style-name="T3">29.09.2011</text:span> <text:span text:style-name="T3">Версия 0.27 Исправления.</text:span></text:p>
      <text:p text:style-name="P187"><text:span text:style-name="T3">- исправлена ошибка команды </text:span>«Merge» <text:span text:style-name="T3">из-за которой портилось содержимое подгруженного файла.</text:span></text:p>
      <text:p text:style-name="P187"><text:span text:style-name="T3">- исправлена не очистка буфера введенных команд при возврате в </text:span>Basic <text:span text:style-name="T3">по команде </text:span>«Return» <text:span text:style-name="T3">из-за чего вместо сообщения «</text:span>OK<text:span text:style-name="T3">» выдавалась ошибка.</text:span></text:p>
      <text:p text:style-name="P187"><text:span text:style-name="T3">- исправлена ошибка команды </text:span>«RUN “filename” CODE».</text:p>
      <text:p text:style-name="P187">- <text:span text:style-name="T3">исправлена ошибка повторных входов в </text:span>DOS <text:span text:style-name="T3">из меню </text:span>Basic 128.</text:p>
      <text:p text:style-name="P136"/>
      <text:p text:style-name="P136">04.05.2011 Версия 0.26. Изменения и исправления.</text:p>
      <text:p text:style-name="P136">- некоторые перестановки кода, возможно заработают некоторые программы переставшие работать.</text:p>
      <text:p text:style-name="P136">- исправлена ошибка загрузки файлов типа <text:span text:style-name="T4">DATA.</text:span></text:p>
      <text:p text:style-name="P187"/>
      <text:p text:style-name="P187">24.<text:span text:style-name="T3">03.2011 Версия 0.25 Исправление.</text:span></text:p>
      <text:p text:style-name="P187"><text:soft-page-break/><text:span text:style-name="T3">- поправил перехват </text:span>LDIR, <text:span text:style-name="T3">заработал </text:span>Honey Commander.</text:p>
      <text:p text:style-name="P187"/>
      <text:p text:style-name="P187">17.03.2011 <text:span text:style-name="T3">Версия 0.24 Доработки.</text:span></text:p>
      <text:p text:style-name="P136">- переделано сохранение разрешенных/запрещенных прерываний, перехватчик теперь всегда работает при запрещенных прерываниях.</text:p>
      <text:p text:style-name="P136">- переделано определение в какие порты должна происходить запись при перехвате.</text:p>
      <text:p text:style-name="P187"><text:span text:style-name="T3">- переделан перехват записи в порт </text:span>#FF, <text:span text:style-name="T3">освобожден рестарт </text:span>RST #30.</text:p>
      <text:p text:style-name="P187"/>
      <text:p text:style-name="P187">28.02.2011 <text:span text:style-name="T3">Версия 0.23 Испраление ошибок.</text:span></text:p>
      <text:p text:style-name="P136">- исправил невосстановление разрешенных прерываний при выходе из перехватчика обращений к портам ВГ93, если они были разрешены на входе. </text:p>
      <text:p text:style-name="P187"/>
      <text:p text:style-name="P187">27.02.2011 <text:span text:style-name="T3">Версия 0.22 Исправление ошибок.</text:span></text:p>
      <text:p text:style-name="P136">- устраненена неправильная запись в порты при перехвате обращений к портам, если порты не имеют отношение к ВГ93.</text:p>
      <text:p text:style-name="P187"/>
      <text:p text:style-name="P187">12.02.2011 <text:span text:style-name="T3">Версия 0.21 Исправление ошибок.</text:span></text:p>
      <text:p text:style-name="P187"><text:span text:style-name="T3">- исправлена ошибка перехвата адреса </text:span>#2A53.</text:p>
      <text:p text:style-name="P136">- перехватчик обращений к портам ВГ теперь работает при запрещенных прерываниях.</text:p>
      <text:p text:style-name="P187">- <text:span text:style-name="T3">исправлен выход из вызова </text:span>#3D13 <text:span text:style-name="T3">с разрешенными прерываниями при работе с рамдиском.</text:span></text:p>
      <text:p text:style-name="P187"><text:span text:style-name="T3">- переделано чтение порта </text:span>#1F <text:span text:style-name="T3">для рамдиска.</text:span></text:p>
      <text:p text:style-name="P136"/>
      <text:p text:style-name="P187"><text:span text:style-name="T3">07</text:span>.<text:span text:style-name="T3">02.2011 Версия 0.2 Продолжение переделок.</text:span></text:p>
      <text:p text:style-name="P136">- обновлена база фиксированного расположения кода.</text:p>
      <text:p text:style-name="P187"><text:span text:style-name="T3">- переделан выход из перехвата обращений к портам </text:span>ВГ93,<text:span text:style-name="T3"> теперь проверяется текущий выбранный дисковод и возвращается соотвествующая страница </text:span>DOS.</text:p>
      <text:p text:style-name="P136">- переделан перехват <text:span text:style-name="T4">LDIR </text:span>и добавлен перехват адреса <text:span text:style-name="T4">#1C7.</text:span></text:p>
      <text:p text:style-name="P136">- в связи с переделкой перехвата <text:span text:style-name="T4">LDIR адрес</text:span> <text:span text:style-name="T4">#</text:span>2<text:span text:style-name="T4">A53 </text:span>теперь перехватывается всегда, «Черного ворона» можно запускать в любом порядке (1 диск - рамдиск, 2 диск - реальная дискета так и наоборот).</text:p>
      <text:p text:style-name="P187"/>
      <text:p text:style-name="P187">26.<text:span text:style-name="T3">01.2011 Версия 0.19 Исправление ошибки.</text:span></text:p>
      <text:p text:style-name="P187"><text:span text:style-name="T3">- устранил последствия устранения ошибки подпрограмме </text:span>#3E44 (SEEK), <text:span text:style-name="T3">не сохранялся номер дорожки при форматировании и невозможно было отформатировать реальный диск.</text:span></text:p>
      <text:p text:style-name="P136"/>
      <text:p text:style-name="P136">22.01.2011 Версия 0.18 Исправления ошибок.</text:p>
      <text:p text:style-name="P136">- обновлена база фиксированного расположения кода.</text:p>
      <text:p text:style-name="P136">- сделан перехват команд <text:span text:style-name="T4">LDIR, </text:span>заработали почти все номера журналы <text:span text:style-name="T4">ZX-Format </text:span>в формате <text:span text:style-name="T4">TRD.</text:span></text:p>
      <text:p text:style-name="P187"/>
      <text:p text:style-name="P187">30.12.2010 <text:span text:style-name="T3">Версия 0.17 Исправление ошибок</text:span></text:p>
      <text:p text:style-name="P136">- исправлена ошибка не форматирования рамдиска. Не создавался маркер из-за чего после форматирования рамдиск пропадал.</text:p>
      <text:p text:style-name="P136">-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136"/>
      <text:p text:style-name="P136">29.12.2010 Версия 0.16 Продолжение переделок и продолжение второго этапа.</text:p>
      <text:p text:style-name="P136">- исправлена ошибка <text:span text:style-name="T4">RUN “filename” CODE.</text:span></text:p>
      <text:p text:style-name="P136">- в связи с поддержкой <text:span text:style-name="T4">FDI </text:span>изменена работа с рамдиском, сделана работа через таблицу. Сделана поддержка секторов на 256, 512, 1024 байта (для 128 не доделан). <text:span text:style-name="T4">IS-DOS </text:span>работает!!!</text:p>
      <text:p text:style-name="P216">- форматирование для рамдиска из программ отсуствует.</text:p>
      <text:p text:style-name="P216">- в титульной надписи измена надпись <text:span text:style-name="T4">«BETA 128». </text:span>Теперь отображается режим эмуляции: при работе с реальным диском <text:span text:style-name="T4">«EMUL 3D13», </text:span>при работе с рамдиском <text:span text:style-name="T4">«EMUL 3D2F».</text:span></text:p>
      <text:p text:style-name="P216">- устранено зависание при не инициализированном или не загруженном рамдиске. Теперь выводится сообщение <text:span text:style-name="T4">«No disk».</text:span></text:p>
      <text:p text:style-name="P136"/>
      <text:p text:style-name="P136"><text:soft-page-break/>11.12.2010 Версия 0.15 Продолжение переделок и переход ко второму этапу.</text:p>
      <text:p text:style-name="P136">- вернул таблицы токенов в текстовом виде для <text:span text:style-name="T4">Basic 128.</text:span></text:p>
      <text:p text:style-name="P136">- сделан перехватчик обращений к портам ВГ93 с переключением прошивок в <text:span text:style-name="T4">DOS </text:span>в зависимости от выбранного диска.</text:p>
      <text:p text:style-name="P136"><text:span text:style-name="T4">- </text:span>провел тестирование программ с рамдиска работающих <text:span text:style-name="T4">c DOS </text:span>через <text:span text:style-name="T4">#3D2F. </text:span>В тестировании принимали участие следующие программы:</text:p>
      <text:p text:style-name="P136">Демки работающие <text:span text:style-name="T4">Refresh, Insult, Dogma, Nature Rules. Eye Ache 2 </text:span>частично работает, сначала слетает звук, потом графика и перестает рабтать. Совсем не заработала <text:span text:style-name="T4">Anamnesis.</text:span> Надо еще смотреть.</text:p>
      <text:p text:style-name="P136">Не работает <text:span text:style-name="T4">Quick Comander 3.11 </text:span>с загрузчиком через <text:span text:style-name="T4">#3D2F (</text:span>с загрузчиком через <text:span text:style-name="T4">#3D13 </text:span>не проверял), так как загрузчик сделан через стек который портится.</text:p>
      <text:p text:style-name="P136">Не работают дисковые утилиты <text:span text:style-name="T4">ADS, DCU, RDS. </text:span></text:p>
      <text:p text:style-name="P136">Работают игры с загрузкой через <text:span text:style-name="T4">#3D2F, </text:span>но проверены выборочно следующие игры: <text:span text:style-name="T4">Soldier of the future, Quazatron, Lord of chaos, Lode Runner.</text:span></text:p>
      <text:p text:style-name="P187"/>
      <text:p text:style-name="P187">06.12.2010 <text:span text:style-name="T3">Версия 0.14 Продолжение переделок.</text:span></text:p>
      <text:p text:style-name="P136">- обновлена база фиксированного расположения кода.</text:p>
      <text:p text:style-name="P136">- начало рамдиска переехало на одну страницу вниз.</text:p>
      <text:p text:style-name="P187"/>
      <text:p text:style-name="P187">28.11.2010 <text:span text:style-name="T3">Версия 0.13 Исправление ошибок.</text:span></text:p>
      <text:p text:style-name="P136">- подправлена процедура обнаружения диска. Не выставлялся номер дорожки в команде поиска.</text:p>
      <text:p text:style-name="P136"/>
      <text:p text:style-name="P187"><text:span text:style-name="T3">24</text:span>.11.2010 <text:span text:style-name="T3">Версия 0.12. Исправление ошибок.</text:span></text:p>
      <text:p text:style-name="P187">- <text:span text:style-name="T3">исправлена ошибка не восстановления введеной строки в буфере редактора при дисковой ошибке.</text:span></text:p>
      <text:p text:style-name="P136"/>
      <text:p text:style-name="P136">20.11.2010 Версия 0.11. Продолжение переделок и продолжение первого этапа.</text:p>
      <text:p text:style-name="P136">- обновлена база фиксированного расположения кода, снова заработали такие программы как <text:span text:style-name="T4">DCU, ADS.</text:span></text:p>
      <text:p text:style-name="P136">- удалены команды 40 и 80, более не поддерживаются.</text:p>
      <text:p text:style-name="P136">- команда <text:span text:style-name="T4">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4">2,3,4 </text:span>и так далее. Если фоматируется виртуальный дисковод, то производится только инициализация директории. Команда вида <text:span text:style-name="T4">FORMAT “$</text:span>имядиска<text:span text:style-name="T4">” </text:span>для форматирования дискеты как 80 дорожечной односторонней более не поддерживается, символ <text:span text:style-name="T4">“$” </text:span>в имени теперь является частью имени.</text:p>
      <text:p text:style-name="P136">- переделана функция интерпретатора 1 (вызываемого через точку входа <text:span text:style-name="T4">#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187"/>
      <text:p text:style-name="P136"><text:span text:style-name="T4">13.11.2010 </text:span>Версия 0.1.1. Исправление ошибки.</text:p>
      <text:p text:style-name="P136">- исправлена ошибка работы с <text:span text:style-name="T4">CMOS </text:span>из-за чего принудительно включался турбо режим.</text:p>
      <text:p text:style-name="P136">- в связи с изменением базовой конфигурации переделана работа с <text:span text:style-name="T4">CMOS </text:span>в режиме ДОС.</text:p>
      <text:p text:style-name="P187"/>
      <text:p text:style-name="P136"><text:span text:style-name="T4">28.10.2010 </text:span>Версия 0.1 Все только начинается, первый этап.</text:p>
      <text:p text:style-name="P187">- <text:span text:style-name="T3">большая ревизия сорцов, за основу взят какой-то </text:span>TR-DOS 5.03<text:span text:style-name="T3">;</text:span></text:p>
      <text:p text:style-name="P187"><text:span text:style-name="T3">- произведено некоторое уплотнение кода, переписаны конструкции вида </text:span>CALL label:RET;</text:p>
      <text:p text:style-name="P136">- для некоторых частей кода произведена фиксация по адресам расположения для программ работающим через адрес <text:span text:style-name="T4">#3D2F, </text:span>начато создание базы по адресам кода который нельзя перемещать<text:span text:style-name="T4">;</text:span></text:p>
      <text:p text:style-name="P136">- удалено все имеюшее отношение к <text:span text:style-name="T4">Interface 1;</text:span></text:p>
      <text:p text:style-name="P136">- удален весь код обработки кнопки <text:span text:style-name="T4">Magic, </text:span>по адресу <text:span text:style-name="T4">#0066 </text:span>расположен код <text:span text:style-name="T4">EI:RETN. </text:span>Удален код имеющий отношение к команде <text:span text:style-name="T4">GOTO, </text:span>команда более не поддерживается. После удаление кода освобождено примерно 1300 байт;</text:p>
      <text:p text:style-name="P136"><text:span text:style-name="T4">- </text:span>исправлена проблема <text:span text:style-name="T4">«Out of memory». </text:span>Проблема была глубже, но никак не в команде <text:span text:style-name="T4">LIST. </text:span>Команда <text:span text:style-name="T4">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text:soft-page-break/>строки после исполнения команды;</text:p>
      <text:p text:style-name="P136">- сделано: текущий дисковод считывается из ячейки <text:span text:style-name="T4">#10</text:span> <text:span text:style-name="T4">CMOS </text:span>и устанавливается по умолчанию при любом способе входа в <text:span text:style-name="T4">DOS;</text:span></text:p>
      <text:p text:style-name="P136"><text:span text:style-name="T4">- сделана работа с рамдиском </text:span>(виртуальным диском)<text:span text:style-name="T4">, </text:span>виртуальный диск<text:span text:style-name="T4"> </text:span>начинается<text:span text:style-name="T4"> в последнем мегабайте </text:span>и начинается с номера страницы <text:span text:style-name="T4">#FE</text:span> и растет вниз;</text:p>
      <text:p text:style-name="P136"><text:span text:style-name="T4">- </text:span>сделано: введено понятие виртуального дисковода, номер виртуального дисковода считывается из ячейки <text:span text:style-name="T4">#0F CMOS. </text:span>При совпадении имени дисковода и виртуального дисководов вся работа перенаправляется на работу с рамдиском;</text:p>
      <text:p text:style-name="P217"><text:span text:style-name="T164">- работа с виртуальным дисководом сделана только для обращений через </text:span><text:span text:style-name="T153">#3D13.</text:span></text:p>
      <text:h text:style-name="P9" text:outline-level="1"><text:bookmark-start text:name="История версий ProfROM"/><text:bookmark-start text:name="__RefHeading__7565_2044125182"/><text:span text:style-name="T3">История версий </text:span>ProfROM<text:bookmark-end text:name="История версий ProfROM"/> <text:span text:style-name="T4">v</text:span>4<text:bookmark-end text:name="__RefHeading__7565_2044125182"/></text:h>
      <text:p text:style-name="P218">29.12.2012 <text:span text:style-name="T3">Версия 0.16. Исправление</text:span></text:p>
      <text:p text:style-name="P218"><text:span text:style-name="T3">- исправлена ошибка потери шрифта из-за чего не выводился текст в </text:span>Magic <text:span text:style-name="T3">режиме.</text:span></text:p>
      <text:p text:style-name="P219"/>
      <text:p text:style-name="P219">27.05.2012 Версия 0.15 Исправление</text:p>
      <text:p text:style-name="P219">- изменен автодетект винчестера из-за изменений в реализации железа.</text:p>
      <text:p text:style-name="P218"/>
      <text:p text:style-name="P218">18.<text:span text:style-name="T3">01.2012 Версия 0.14 Исправление</text:span></text:p>
      <text:p text:style-name="P218"><text:span text:style-name="T3">- исправлена ошибка обработки кнопки </text:span>Magic. </text:p>
      <text:p text:style-name="P219"/>
      <text:p text:style-name="P219">04.12.2011 Версия 0.13 Маленькое изменение</text:p>
      <text:p text:style-name="P219">- изменен номер сектора для сохранения каких-то настроек на <text:span text:style-name="T4">HDD. </text:span>Теперь сохранение происходит в сектор непосредственно следующий за <text:span text:style-name="T4">MBR.</text:span></text:p>
      <text:p text:style-name="P219"/>
      <text:p text:style-name="P218">09.10.2011 <text:span text:style-name="T3">Версия 0.12 Изменения</text:span></text:p>
      <text:p text:style-name="P218"><text:span text:style-name="T3">- переделано переключения турбо режима. Используются те же установки сохраненные в </text:span>CMOS, <text:span text:style-name="T3">что и для </text:span>Evo Service.</text:p>
      <text:p text:style-name="P219">- в теневом меню изменено отображение турбо режима с <text:span text:style-name="T4">«</text:span>Fast-Normal<text:span text:style-name="T4">» </text:span>на <text:span text:style-name="T4">«3,5-7,0-14,0».</text:span></text:p>
      <text:p text:style-name="P219"/>
      <text:p text:style-name="P218"><text:span text:style-name="T3">28.09.2011</text:span> <text:span text:style-name="T3">Версия 0.11 Исправления</text:span></text:p>
      <text:p text:style-name="P219">- исправлена ошибка вычисления дня недели из-за которой очищался экран в теневом сервисе.</text:p>
      <text:p text:style-name="P218">- <text:span text:style-name="T3">исправлена ошибка неправильной конверсии даты.</text:span></text:p>
      <text:p text:style-name="P218">- <text:span text:style-name="T3">после добавления счета времени и даты в </text:span>BASECONF <text:span text:style-name="T3">кроме двоичного еще и десятичного возвращен код преобразования даты и времени до исходного.</text:span></text:p>
      <text:p text:style-name="P219">- возвращены пункты меню по установке времени и даты.</text:p>
      <text:p text:style-name="P218"/>
      <text:p text:style-name="P218">04.09.2011 <text:span text:style-name="T3">Версия 0.1 Проверка и тестирование</text:span></text:p>
      <text:p text:style-name="P218"><text:span text:style-name="T3">- за основу взята версия </text:span>ProfROM <text:span text:style-name="T3">4.01, отсюда и добавление в названии. При входе по магику отображается в виде </text:span>V4-0.1.</text:p>
      <text:p text:style-name="P218">- <text:span text:style-name="T3">удалены остатки зашиты и контроля прошивки;</text:span></text:p>
      <text:p text:style-name="P219">- в связи с пока еще не полной переделкой временно убраны следующие пункты и подпункты меню теневого сервиса вызываемого по <text:span text:style-name="T4">MAGIC: </text:span></text:p>
      <text:p text:style-name="P219"><text:span text:style-name="T4">&gt;Main menu-Monitor </text:span>(отладчик)<text:span text:style-name="T4">;</text:span></text:p>
      <text:p text:style-name="P218">&gt;Main menu-&gt;Save &amp; load: Compression, ROM disk;</text:p>
      <text:p text:style-name="P218">&gt;Main menu-&gt;Print screen: Printer 1, Printer 2;</text:p>
      <text:p text:style-name="P219"><text:span text:style-name="T4">&gt;Main menu-&gt;Setup-&gt;Time &amp; date </text:span>пункты установки времени и даты.</text:p>
      <text:p text:style-name="P219">- параметры настройки сохраняемые в <text:span text:style-name="T4">CMOS </text:span>и <text:span text:style-name="T4">NVRAM </text:span>уплотнены и сохраняются в <text:span text:style-name="T4">CMOS PentEVO </text:span>в ячейках <text:span text:style-name="T4">#40-#7F. </text:span>Используются не все выделенные ячейки.</text:p>
      <text:p text:style-name="P219">- работа с винчестером переделана для работы встроенного <text:span text:style-name="T4">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4">ProfROM BIOS.</text:span></text:p>
      <text:p text:style-name="P219"><text:span text:style-name="T4">- </text:span>тестирование железа по сбросу или включению временно делается всегда.</text:p>
      <text:p text:style-name="P219">- удалены многие коды связанные с работой контроллера <text:span text:style-name="T4">SMUC </text:span>и всего к нему подключаемого. Сам контроллер <text:span text:style-name="T4">SMUC </text:span>не поддерживается.</text:p>
      <text:p text:style-name="P219">- переделано (не полностью) отображение времени и даты в теневом сервисе из-за другого режима счета времени. <text:span text:style-name="T4">ProfROM </text:span>заточен на двоичный счет, в <text:span text:style-name="T4">PentEVO </text:span>часах доступен только двоично-десятичный. По этой причине временно удалена установка часов и даты в меню <text:span text:style-name="T4">Setup.</text:span></text:p>
      <text:p text:style-name="P219">- пока еще не устранена причина пропадания примонтированных дискет с винчестера. Причина кроется в опции <text:span text:style-name="T4">LBA ON. </text:span>Если опция находится в положении <text:span text:style-name="T4">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4">CHS </text:span>и <text:span text:style-name="T4">LBA </text:span>адресации и недоделанности работы с винчестером в <text:span text:style-name="T4">ProfROM. </text:span>В причинах надо более глубоко разбираться.</text:p>
      <text:p text:style-name="P219"><text:soft-page-break/>- работа проверялась со старым винчестером на 2 ГБ. Переходник <text:span text:style-name="T4">SD2IDE </text:span>не заработал, возможно таймуаты надо увеличивать.</text:p>
      <text:p text:style-name="P219">- из-за особенности реализации <text:span text:style-name="T4">MAGIC </text:span>на <text:span text:style-name="T4">PentEVO </text:span>возможны проблемы при выходе из теневого сервиса при его вызове из ПЗУ.</text:p>
      <text:p text:style-name="P220">-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221"/>
      <text:p text:style-name="P2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chapter">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0</text:page-number></text:p>
      </style:footer>
    </style:master-page>
    <style:master-page style:name="Footnote" style:page-layout-name="Mpm2" draw:style-name="Mdp1">
      <style:footer>
        <text:p text:style-name="Footer"/>
      </style:footer>
    </style:master-page>
    <style:master-page style:name="Right_20_Page" style:display-name="Right Page" style:page-layout-name="Mpm3" draw:style-name="Mdp1"/>
    <style:master-page style:name="Left_20_Page" style:display-name="Left Page" style:page-layout-name="Mpm4" draw:style-name="Mdp1" style:next-style-name="Right_20_Page"/>
    <style:master-page style:name="First_20_Page" style:display-name="First Page" style:page-layout-name="Mpm5"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09-08-16T17:47:07.31</meta:creation-date>
    <dc:date>2026-01-07T12:32:48.434868900</dc:date>
    <meta:editing-duration>P45DT2H49M38S</meta:editing-duration>
    <meta:editing-cycles>765</meta:editing-cycles>
    <meta:generator>LibreOffice/25.8.4.2$Windows_X86_64 LibreOffice_project/290daaa01b999472f0c7a3890eb6a550fd74c6df</meta:generator>
    <meta:print-date>2025-03-23T15:15:15.944905600</meta:print-date>
    <meta:printed-by>Файлы PDF</meta:printed-by>
    <meta:document-statistic meta:table-count="1" meta:image-count="16" meta:object-count="0" meta:page-count="60" meta:paragraph-count="1671" meta:word-count="15585" meta:character-count="108773" meta:non-whitespace-character-count="93995"/>
  </office:meta>
</office:document-meta>
</file>